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6.6931in" table:align="left"/>
    </style:style>
    <style:style style:name="Table3.A" style:family="table-column">
      <style:table-column-properties style:column-width="1.2069in"/>
    </style:style>
    <style:style style:name="Table3.B" style:family="table-column">
      <style:table-column-properties style:column-width="2.0708in"/>
    </style:style>
    <style:style style:name="Table3.C" style:family="table-column">
      <style:table-column-properties style:column-width="3.4153in"/>
    </style:style>
    <style:style style:name="Table3.A1" style:family="table-cell">
      <style:table-cell-properties style:vertical-align="middle" fo:padding="0.0194in" fo:border="none"/>
    </style:style>
    <style:style style:name="Table4" style:family="table">
      <style:table-properties style:width="6.4229in" table:align="left"/>
    </style:style>
    <style:style style:name="Table4.A" style:family="table-column">
      <style:table-column-properties style:column-width="1.3333in"/>
    </style:style>
    <style:style style:name="Table4.B" style:family="table-column">
      <style:table-column-properties style:column-width="1.7215in"/>
    </style:style>
    <style:style style:name="Table4.C" style:family="table-column">
      <style:table-column-properties style:column-width="1.4854in"/>
    </style:style>
    <style:style style:name="Table4.D" style:family="table-column">
      <style:table-column-properties style:column-width="1.8826in"/>
    </style:style>
    <style:style style:name="Table4.A1" style:family="table-cell">
      <style:table-cell-properties style:vertical-align="middle" fo:padding="0.0194in" fo:border="none"/>
    </style:style>
    <style:style style:name="Table5" style:family="table">
      <style:table-properties style:width="4.3056in" table:align="left"/>
    </style:style>
    <style:style style:name="Table5.A" style:family="table-column">
      <style:table-column-properties style:column-width="0.6674in"/>
    </style:style>
    <style:style style:name="Table5.B" style:family="table-column">
      <style:table-column-properties style:column-width="1.7972in"/>
    </style:style>
    <style:style style:name="Table5.C" style:family="table-column">
      <style:table-column-properties style:column-width="1.841in"/>
    </style:style>
    <style:style style:name="Table5.A1" style:family="table-cell">
      <style:table-cell-properties style:vertical-align="middle" fo:padding="0.0194in" fo:border="none"/>
    </style:style>
    <style:style style:name="Table6" style:family="table">
      <style:table-properties style:width="5.65in" table:align="left"/>
    </style:style>
    <style:style style:name="Table6.A" style:family="table-column">
      <style:table-column-properties style:column-width="0.7694in"/>
    </style:style>
    <style:style style:name="Table6.B" style:family="table-column">
      <style:table-column-properties style:column-width="0.9208in"/>
    </style:style>
    <style:style style:name="Table6.C" style:family="table-column">
      <style:table-column-properties style:column-width="3.9597in"/>
    </style:style>
    <style:style style:name="Table6.A1" style:family="table-cell">
      <style:table-cell-properties style:vertical-align="middle" fo:padding="0.0194in" fo:border="none"/>
    </style:style>
    <style:style style:name="Table7" style:family="table">
      <style:table-properties style:width="6.6931in" table:align="left"/>
    </style:style>
    <style:style style:name="Table7.A" style:family="table-column">
      <style:table-column-properties style:column-width="1.5743in"/>
    </style:style>
    <style:style style:name="Table7.B" style:family="table-column">
      <style:table-column-properties style:column-width="2.5563in"/>
    </style:style>
    <style:style style:name="Table7.C" style:family="table-column">
      <style:table-column-properties style:column-width="2.5625in"/>
    </style:style>
    <style:style style:name="Table7.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Horizontal_20_Line">
      <style:text-properties fo:background-color="#ffdbb6"/>
    </style:style>
    <style:style style:name="P3" style:family="paragraph" style:parent-style-name="Text_20_body">
      <style:text-properties fo:background-color="#ffdbb6"/>
    </style:style>
    <style:style style:name="P4" style:family="paragraph" style:parent-style-name="Quotations">
      <style:text-properties fo:background-color="#ffffd7"/>
    </style:style>
    <style:style style:name="P5" style:family="paragraph" style:parent-style-name="Text_20_body" style:list-style-name="L1">
      <style:paragraph-properties fo:margin-top="0in" fo:margin-bottom="0in" style:contextual-spacing="false"/>
      <style:text-properties fo:background-color="#ffdbb6"/>
    </style:style>
    <style:style style:name="P6" style:family="paragraph" style:parent-style-name="Text_20_body" style:list-style-name="L1">
      <style:text-properties fo:background-color="#ffdbb6"/>
    </style:style>
    <style:style style:name="P7" style:family="paragraph" style:parent-style-name="Text_20_body" style:list-style-name="L5">
      <style:text-properties fo:background-color="#ffdbb6"/>
    </style:style>
    <style:style style:name="P8" style:family="paragraph" style:parent-style-name="Text_20_body" style:list-style-name="L14">
      <style:paragraph-properties fo:margin-top="0in" fo:margin-bottom="0in" style:contextual-spacing="false"/>
      <style:text-properties fo:background-color="#ffdbb6"/>
    </style:style>
    <style:style style:name="P9" style:family="paragraph" style:parent-style-name="Text_20_body" style:list-style-name="L14">
      <style:text-properties fo:background-color="#ffdbb6"/>
    </style:style>
    <style:style style:name="P10" style:family="paragraph" style:parent-style-name="Text_20_body" style:list-style-name="L15">
      <style:paragraph-properties fo:margin-top="0in" fo:margin-bottom="0in" style:contextual-spacing="false"/>
      <style:text-properties fo:background-color="#ffdbb6"/>
    </style:style>
    <style:style style:name="P11" style:family="paragraph" style:parent-style-name="Text_20_body" style:list-style-name="L15">
      <style:text-properties fo:background-color="#ffdbb6"/>
    </style:style>
    <style:style style:name="P12" style:family="paragraph" style:parent-style-name="Text_20_body" style:list-style-name="L2"/>
    <style:style style:name="P13" style:family="paragraph" style:parent-style-name="Text_20_body" style:list-style-name="L2">
      <style:paragraph-properties fo:margin-top="0in" fo:margin-bottom="0in" style:contextual-spacing="false"/>
    </style:style>
    <style:style style:name="P14" style:family="paragraph" style:parent-style-name="Text_20_body" style:list-style-name="L3"/>
    <style:style style:name="P15" style:family="paragraph" style:parent-style-name="Text_20_body" style:list-style-name="L3">
      <style:paragraph-properties fo:margin-top="0in" fo:margin-bottom="0in" style:contextual-spacing="false"/>
    </style:style>
    <style:style style:name="P16" style:family="paragraph" style:parent-style-name="Text_20_body" style:list-style-name="L4"/>
    <style:style style:name="P17" style:family="paragraph" style:parent-style-name="Text_20_body" style:list-style-name="L4">
      <style:paragraph-properties fo:margin-top="0in" fo:margin-bottom="0in" style:contextual-spacing="false"/>
    </style:style>
    <style:style style:name="P18" style:family="paragraph" style:parent-style-name="Text_20_body" style:list-style-name="L5">
      <style:paragraph-properties fo:margin-top="0in" fo:margin-bottom="0in" style:contextual-spacing="false"/>
    </style:style>
    <style:style style:name="P19" style:family="paragraph" style:parent-style-name="Text_20_body" style:list-style-name="L6"/>
    <style:style style:name="P20" style:family="paragraph" style:parent-style-name="Text_20_body" style:list-style-name="L6">
      <style:paragraph-properties fo:margin-top="0in" fo:margin-bottom="0in" style:contextual-spacing="false"/>
    </style:style>
    <style:style style:name="P21" style:family="paragraph" style:parent-style-name="Text_20_body" style:list-style-name="L7"/>
    <style:style style:name="P22" style:family="paragraph" style:parent-style-name="Text_20_body" style:list-style-name="L7">
      <style:paragraph-properties fo:margin-top="0in" fo:margin-bottom="0in" style:contextual-spacing="false"/>
    </style:style>
    <style:style style:name="P23" style:family="paragraph" style:parent-style-name="Text_20_body" style:list-style-name="L8"/>
    <style:style style:name="P24" style:family="paragraph" style:parent-style-name="Text_20_body" style:list-style-name="L8">
      <style:paragraph-properties fo:margin-top="0in" fo:margin-bottom="0in" style:contextual-spacing="false"/>
    </style:style>
    <style:style style:name="P25" style:family="paragraph" style:parent-style-name="Text_20_body" style:list-style-name="L9"/>
    <style:style style:name="P26" style:family="paragraph" style:parent-style-name="Text_20_body" style:list-style-name="L9">
      <style:paragraph-properties fo:margin-top="0in" fo:margin-bottom="0in" style:contextual-spacing="false"/>
    </style:style>
    <style:style style:name="P27" style:family="paragraph" style:parent-style-name="Text_20_body" style:list-style-name="L10"/>
    <style:style style:name="P28" style:family="paragraph" style:parent-style-name="Text_20_body" style:list-style-name="L10">
      <style:paragraph-properties fo:margin-top="0in" fo:margin-bottom="0in" style:contextual-spacing="false"/>
    </style:style>
    <style:style style:name="P29" style:family="paragraph" style:parent-style-name="Text_20_body" style:list-style-name="L11"/>
    <style:style style:name="P30" style:family="paragraph" style:parent-style-name="Text_20_body" style:list-style-name="L11">
      <style:paragraph-properties fo:margin-top="0in" fo:margin-bottom="0in" style:contextual-spacing="false"/>
    </style:style>
    <style:style style:name="P31" style:family="paragraph" style:parent-style-name="Text_20_body" style:list-style-name="L12"/>
    <style:style style:name="P32" style:family="paragraph" style:parent-style-name="Text_20_body" style:list-style-name="L12">
      <style:paragraph-properties fo:margin-top="0in" fo:margin-bottom="0in" style:contextual-spacing="false"/>
    </style:style>
    <style:style style:name="P33" style:family="paragraph" style:parent-style-name="Text_20_body" style:list-style-name="L13"/>
    <style:style style:name="P34" style:family="paragraph" style:parent-style-name="Text_20_body" style:list-style-name="L13">
      <style:paragraph-properties fo:margin-top="0in" fo:margin-bottom="0in" style:contextual-spacing="false"/>
    </style:style>
    <style:style style:name="P35" style:family="paragraph" style:parent-style-name="Text_20_body" style:list-style-name="L16"/>
    <style:style style:name="P36" style:family="paragraph" style:parent-style-name="Text_20_body" style:list-style-name="L16">
      <style:paragraph-properties fo:margin-top="0in" fo:margin-bottom="0in" style:contextual-spacing="false"/>
    </style:style>
    <style:style style:name="P37" style:family="paragraph" style:parent-style-name="Text_20_body" style:list-style-name="L17"/>
    <style:style style:name="P38" style:family="paragraph" style:parent-style-name="Text_20_body" style:list-style-name="L17">
      <style:paragraph-properties fo:margin-top="0in" fo:margin-bottom="0in" style:contextual-spacing="false"/>
    </style:style>
    <style:style style:name="P39" style:family="paragraph" style:parent-style-name="Text_20_body" style:list-style-name="L18"/>
    <style:style style:name="P40" style:family="paragraph" style:parent-style-name="Text_20_body" style:list-style-name="L18">
      <style:paragraph-properties fo:margin-top="0in" fo:margin-bottom="0in" style:contextual-spacing="false"/>
    </style:style>
    <style:style style:name="P41" style:family="paragraph" style:parent-style-name="Text_20_body" style:list-style-name="L19"/>
    <style:style style:name="P42" style:family="paragraph" style:parent-style-name="Text_20_body" style:list-style-name="L19">
      <style:paragraph-properties fo:margin-top="0in" fo:margin-bottom="0in" style:contextual-spacing="false"/>
    </style:style>
    <style:style style:name="P43" style:family="paragraph" style:parent-style-name="Text_20_body" style:list-style-name="L20"/>
    <style:style style:name="P44" style:family="paragraph" style:parent-style-name="Text_20_body" style:list-style-name="L20">
      <style:paragraph-properties fo:margin-top="0in" fo:margin-bottom="0in" style:contextual-spacing="false"/>
    </style:style>
    <style:style style:name="P45" style:family="paragraph" style:parent-style-name="Text_20_body" style:list-style-name="L21"/>
    <style:style style:name="P46" style:family="paragraph" style:parent-style-name="Text_20_body" style:list-style-name="L21">
      <style:paragraph-properties fo:margin-top="0in" fo:margin-bottom="0in" style:contextual-spacing="false"/>
    </style:style>
    <style:style style:name="P47" style:family="paragraph" style:parent-style-name="Text_20_body" style:list-style-name="L22"/>
    <style:style style:name="P48" style:family="paragraph" style:parent-style-name="Text_20_body" style:list-style-name="L22">
      <style:paragraph-properties fo:margin-top="0in" fo:margin-bottom="0in" style:contextual-spacing="false"/>
    </style:style>
    <style:style style:name="P49" style:family="paragraph" style:parent-style-name="Text_20_body" style:list-style-name="L23"/>
    <style:style style:name="P50" style:family="paragraph" style:parent-style-name="Text_20_body" style:list-style-name="L23">
      <style:paragraph-properties fo:margin-top="0in" fo:margin-bottom="0in" style:contextual-spacing="false"/>
    </style:style>
    <style:style style:name="P51" style:family="paragraph" style:parent-style-name="Text_20_body" style:list-style-name="L24"/>
    <style:style style:name="P52" style:family="paragraph" style:parent-style-name="Text_20_body" style:list-style-name="L24">
      <style:paragraph-properties fo:margin-top="0in" fo:margin-bottom="0in" style:contextual-spacing="false"/>
    </style:style>
    <style:style style:name="P53" style:family="paragraph" style:parent-style-name="Text_20_body" style:list-style-name="L25"/>
    <style:style style:name="P54" style:family="paragraph" style:parent-style-name="Text_20_body" style:list-style-name="L25">
      <style:paragraph-properties fo:margin-top="0in" fo:margin-bottom="0in" style:contextual-spacing="false"/>
    </style:style>
    <style:style style:name="P55" style:family="paragraph" style:parent-style-name="Text_20_body" style:list-style-name="L26"/>
    <style:style style:name="P56" style:family="paragraph" style:parent-style-name="Text_20_body" style:list-style-name="L26">
      <style:paragraph-properties fo:margin-top="0in" fo:margin-bottom="0in" style:contextual-spacing="false"/>
    </style:style>
    <style:style style:name="P57" style:family="paragraph" style:parent-style-name="Text_20_body" style:list-style-name="L27"/>
    <style:style style:name="P58" style:family="paragraph" style:parent-style-name="Text_20_body" style:list-style-name="L27">
      <style:paragraph-properties fo:margin-top="0in" fo:margin-bottom="0in" style:contextual-spacing="false"/>
    </style:style>
    <style:style style:name="P59" style:family="paragraph" style:parent-style-name="Text_20_body" style:list-style-name="L28"/>
    <style:style style:name="P60" style:family="paragraph" style:parent-style-name="Text_20_body" style:list-style-name="L28">
      <style:paragraph-properties fo:margin-top="0in" fo:margin-bottom="0in" style:contextual-spacing="false"/>
    </style:style>
    <style:style style:name="P61" style:family="paragraph" style:parent-style-name="Text_20_body" style:list-style-name="L29"/>
    <style:style style:name="P62" style:family="paragraph" style:parent-style-name="Text_20_body" style:list-style-name="L29">
      <style:paragraph-properties fo:margin-top="0in" fo:margin-bottom="0in" style:contextual-spacing="false"/>
    </style:style>
    <style:style style:name="P63" style:family="paragraph" style:parent-style-name="Text_20_body" style:list-style-name="L30"/>
    <style:style style:name="P64" style:family="paragraph" style:parent-style-name="Text_20_body" style:list-style-name="L30">
      <style:paragraph-properties fo:margin-top="0in" fo:margin-bottom="0in" style:contextual-spacing="false"/>
    </style:style>
    <style:style style:name="P65" style:family="paragraph" style:parent-style-name="Text_20_body" style:list-style-name="L31"/>
    <style:style style:name="P66" style:family="paragraph" style:parent-style-name="Text_20_body" style:list-style-name="L31">
      <style:paragraph-properties fo:margin-top="0in" fo:margin-bottom="0in" style:contextual-spacing="false"/>
    </style:style>
    <style:style style:name="P67" style:family="paragraph" style:parent-style-name="Text_20_body" style:list-style-name="L32"/>
    <style:style style:name="P68" style:family="paragraph" style:parent-style-name="Text_20_body" style:list-style-name="L32">
      <style:paragraph-properties fo:margin-top="0in" fo:margin-bottom="0in" style:contextual-spacing="false"/>
    </style:style>
    <style:style style:name="P69" style:family="paragraph" style:parent-style-name="Text_20_body" style:list-style-name="L33"/>
    <style:style style:name="P70" style:family="paragraph" style:parent-style-name="Text_20_body" style:list-style-name="L33">
      <style:paragraph-properties fo:margin-top="0in" fo:margin-bottom="0in" style:contextual-spacing="false"/>
    </style:style>
    <style:style style:name="P71" style:family="paragraph" style:parent-style-name="Text_20_body" style:list-style-name="L34"/>
    <style:style style:name="P72" style:family="paragraph" style:parent-style-name="Text_20_body" style:list-style-name="L34">
      <style:paragraph-properties fo:margin-top="0in" fo:margin-bottom="0in" style:contextual-spacing="false"/>
    </style:style>
    <style:style style:name="P73" style:family="paragraph" style:parent-style-name="Text_20_body" style:list-style-name="L35"/>
    <style:style style:name="P74" style:family="paragraph" style:parent-style-name="Text_20_body" style:list-style-name="L35">
      <style:paragraph-properties fo:margin-top="0in" fo:margin-bottom="0in" style:contextual-spacing="false"/>
    </style:style>
    <style:style style:name="P75" style:family="paragraph" style:parent-style-name="Text_20_body" style:list-style-name="L36"/>
    <style:style style:name="P76" style:family="paragraph" style:parent-style-name="Text_20_body" style:list-style-name="L36">
      <style:paragraph-properties fo:margin-top="0in" fo:margin-bottom="0in" style:contextual-spacing="false"/>
    </style:style>
    <style:style style:name="P77" style:family="paragraph" style:parent-style-name="Text_20_body" style:list-style-name="L37"/>
    <style:style style:name="P78" style:family="paragraph" style:parent-style-name="Text_20_body" style:list-style-name="L37">
      <style:paragraph-properties fo:margin-top="0in" fo:margin-bottom="0in" style:contextual-spacing="false"/>
    </style:style>
    <style:style style:name="P79" style:family="paragraph" style:parent-style-name="Text_20_body" style:list-style-name="L38"/>
    <style:style style:name="P80" style:family="paragraph" style:parent-style-name="Text_20_body" style:list-style-name="L38">
      <style:paragraph-properties fo:margin-top="0in" fo:margin-bottom="0in" style:contextual-spacing="false"/>
    </style:style>
    <style:style style:name="P81" style:family="paragraph" style:parent-style-name="Text_20_body" style:list-style-name="L39"/>
    <style:style style:name="P82" style:family="paragraph" style:parent-style-name="Text_20_body" style:list-style-name="L39">
      <style:paragraph-properties fo:margin-top="0in" fo:margin-bottom="0in" style:contextual-spacing="false"/>
    </style:style>
    <style:style style:name="P83" style:family="paragraph" style:parent-style-name="Text_20_body" style:list-style-name="L40"/>
    <style:style style:name="P84" style:family="paragraph" style:parent-style-name="Text_20_body" style:list-style-name="L40">
      <style:paragraph-properties fo:margin-top="0in" fo:margin-bottom="0in" style:contextual-spacing="false"/>
    </style:style>
    <style:style style:name="T1" style:family="text">
      <style:text-properties officeooo:rsid="00062a6c"/>
    </style:style>
    <style:style style:name="T2" style:family="text">
      <style:text-properties fo:background-color="#ffdbb6" loext:char-shading-value="0"/>
    </style:style>
    <style:style style:name="T3" style:family="text">
      <style:text-properties officeooo:rsid="0008d87b"/>
    </style:style>
    <style:style style:name="T4" style:family="text">
      <style:text-properties fo:background-color="#ffbf00" loext:char-shading-value="0"/>
    </style:style>
    <style:style style:name="T5" style:family="text">
      <style:text-properties fo:background-color="#ffbf00" loext:char-shading-value="0"/>
    </style:style>
    <style:style style:name="T6" style:family="text">
      <style:text-properties fo:background-color="#ffffd7" loext:char-shading-value="0"/>
    </style:style>
    <style:style style:name="T7" style:family="text">
      <style:text-properties fo:background-color="#ffffd7" loext:char-shading-value="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UM 347 — Complete Exam Preparation</text:h>
      <text:h text:style-name="Heading_20_2" text:outline-level="2">Full Model Answers (English) + Memory Guide</text:h>
      <text:p text:style-name="Horizontal_20_Line"/>
      <text:h text:style-name="Heading_20_1" text:outline-level="1"><text:span text:style-name="T1">Q</text:span>UESTION 1</text:h>
      <text:h text:style-name="Heading_20_2" text:outline-level="2">"Briefly discuss the ethical ideas of Socrates, Plato and Aristotle highlighting their views on morality, society and sense of good life. How are these classical ideas still relevant to modern technological society?"</text:h>
      <text:p text:style-name="Horizontal_20_Line"/>
      <text:h text:style-name="Heading_20_3" text:outline-level="3">PART A: The Classical Ethical Ideas</text:h>
      <text:p text:style-name="Text_20_body"><text:span text:style-name="Strong_20_Emphasis">Introduction:</text:span> The Classical Period of ethical thought extends from 500 BC to 500 AD. During this time, Greek society was transforming from an agrarian monarchy into a commercial democracy. <text:span text:style-name="T2">Ethics was regarded as the "spiritual counterpart of medicine" — just as medicine cares for the body, ethics cares for the soul</text:span>. Three dominant thinkers shaped this era: Socrates, Plato, and Aristotle.</text:p>
      <text:p text:style-name="Horizontal_20_Line"/>
      <text:p text:style-name="Text_20_body"><text:span text:style-name="Strong_20_Emphasis">1. SOCRATES (469–399 BC) — Father of Western Philosophy</text:span></text:p>
      <text:p text:style-name="Text_20_body">Socrates is considered the dominant figure of the Classical Period and the father of Western philosophy. He left no writings; his ideas are known through his student Plato's works.</text:p>
      <text:p text:style-name="Text_20_body"><text:span text:style-name="Strong_20_Emphasis">On Morality:</text:span> <text:span text:style-name="T2">Socrates rejected the Sophist idea that morality is merely tradition or personal convenience. He believed it is possible to develop a universal set of ethical principles through human reason. Morality, for him, was grounded in careful examination of beliefs and logical reasoning — not in custom or social agreement.</text:span></text:p>
      <text:p text:style-name="Text_20_body"><text:span text:style-name="Strong_20_Emphasis">On Society:</text:span> Socrates engaged society through his famous Socratic Method — rather than teaching directly, he asked fundamental questions such as "What is justice? What is virtue?" He exposed <text:span text:style-name="T2">vagueness and inconsistency in people's answers, guiding them toward deeper inquiry.</text:span> He was also the first to probe the relationship between facts and values.</text:p>
      <text:p text:style-name="Text_20_body"><text:span text:style-name="Strong_20_Emphasis">On the Good Life:</text:span> His most famous teaching was: <text:span text:style-name="Emphasis">"</text:span><text:span text:style-name="Emphasis"><text:span text:style-name="T2">The unexamined life is not worth living.</text:span></text:span><text:span text:style-name="Emphasis">"</text:span> The <text:span text:style-name="T2">good life, for Socrates, meant continuous self-examination and self-knowledge</text:span> ("Know thyself"). <text:span text:style-name="T2">He believed in moderation — nothing should be done to excess.</text:span></text:p>
      <text:p text:style-name="Horizontal_20_Line"/>
      <text:p text:style-name="Text_20_body"><text:span text:style-name="Strong_20_Emphasis"/></text:p>
      <text:p text:style-name="Text_20_body"><text:span text:style-name="Strong_20_Emphasis"/></text:p>
      <text:p text:style-name="Text_20_body"><text:soft-page-break/><text:span text:style-name="Strong_20_Emphasis">2. PLATO (427–347 BC) — Student of Socrates</text:span></text:p>
      <text:p text:style-name="Text_20_body">Plato built upon Socrates' teachings. His greatest work is <text:span text:style-name="Emphasis">The Republic</text:span>, written in dialogue form with Socrates as the main character.</text:p>
      <text:p text:style-name="Text_20_body"><text:span text:style-name="Strong_20_Emphasis">On Morality:</text:span> <text:span text:style-name="T2">Plato believed that morality is rooted in a higher reality — the world of abstract "Forms" or "Ideas."</text:span> The concrete world we perceive through our senses is merely an imperfect reflection of this ideal world. <text:span text:style-name="T2">The highest and most important Form is </text:span><text:span text:style-name="Strong_20_Emphasis"><text:span text:style-name="T2">"The Good"</text:span></text:span><text:span text:style-name="T2"> — the ultimate moral reality. Thus, the goal of ethical life is to gain a vision of The Good.</text:span></text:p>
      <text:p text:style-name="Text_20_body"><text:span text:style-name="Strong_20_Emphasis">On Society:</text:span> <text:span text:style-name="T2">In </text:span><text:span text:style-name="Emphasis"><text:span text:style-name="T2">The Republic</text:span></text:span><text:span text:style-name="T2">, Plato argued that an ideal society should be governed by a </text:span><text:span text:style-name="Strong_20_Emphasis"><text:span text:style-name="T2">Philosopher-King</text:span></text:span><text:span text:style-name="T2"> — a wise ruler who has attained knowledge of The Good. Unlike Socrates who believed in moderation at all levels,</text:span> <text:span text:style-name="T2">Plato held a more extreme view — he completely denied bodily pleasure and sensory experience as paths to truth.</text:span></text:p>
      <text:p text:style-name="Text_20_body"><text:span text:style-name="Strong_20_Emphasis">On the Good Life:</text:span> <text:span text:style-name="T2">Plato argued that intellectual pursuits are far superior to bodily pleasures. The good life means pursuing reason and wisdom, not physical satisfaction. This made him a model for later religious and idealistic ethicists.</text:span></text:p>
      <text:p text:style-name="Horizontal_20_Line"/>
      <text:p text:style-name="Text_20_body"><text:span text:style-name="Strong_20_Emphasis">3. ARISTOTLE (384–322 BC) — Student of Plato</text:span></text:p>
      <text:p text:style-name="Text_20_body">Aristotle authored nearly 400 works on diverse subjects. His <text:span text:style-name="Emphasis"><text:span text:style-name="T2">Nicomachean Ethics</text:span></text:span><text:span text:style-name="T2"> is the </text:span><text:span text:style-name="Strong_20_Emphasis"><text:span text:style-name="T2">first systematic treatment of ethics in Western civilization.</text:span></text:span></text:p>
      <text:p text:style-name="Text_20_body"><text:span text:style-name="Strong_20_Emphasis">On Morality:</text:span> <text:span text:style-name="T2">Aristotle rejected Plato's Theory of Forms, stating: </text:span><text:span text:style-name="Emphasis"><text:span text:style-name="T2">"No form without matter, no matter without form."</text:span></text:span><text:span text:style-name="T2"> He argued that moral principles are not found in a separate ideal world — they exist within the daily activities of human life and can be discovered by examining those activities.</text:span></text:p>
      <text:p text:style-name="Text_20_body"><text:span text:style-name="Strong_20_Emphasis">On Society:</text:span> <text:span text:style-name="T2">Aristotle believed humans are naturally social beings — </text:span><text:span text:style-name="Emphasis"><text:span text:style-name="T2">"Man is a political animal."</text:span></text:span><text:span text:style-name="T2"> A good society creates conditions for individuals to develop virtue and achieve happiness. Unlike Plato's idealism, Aristotle's ethics was practical and grounded in real life.</text:span></text:p>
      <text:p text:style-name="Text_20_body"><text:span text:style-name="Strong_20_Emphasis">On the Good Life (Virtue Ethics):</text:span> <text:span text:style-name="T2">Happiness (</text:span><text:span text:style-name="Emphasis"><text:span text:style-name="T2">eudaimonia</text:span></text:span><text:span text:style-name="T2">) is achieved by developing one's potential through a life of reason. Virtue, for Aristotle, represented a </text:span><text:span text:style-name="Strong_20_Emphasis"><text:span text:style-name="T2">midpoint (the "Mean") between two extremes:</text:span></text:span></text:p>
      <text:list text:style-name="L1">
        <text:list-item>
          <text:p text:style-name="P5">Courage = midpoint between cowardice and recklessness </text:p>
        </text:list-item>
        <text:list-item>
          <text:p text:style-name="P6">Generosity = midpoint between miserliness and extravagance </text:p>
        </text:list-item>
      </text:list>
      <text:p text:style-name="P3">The good life has two aims: the pursuit of truth through reflection, and the pursuit of virtue through intelligent conduct.</text:p>
      <text:p text:style-name="Horizontal_20_Line"/>
      <text:p text:style-name="Text_20_body"><text:span text:style-name="Strong_20_Emphasis"/></text:p>
      <text:h text:style-name="Heading_20_3" text:outline-level="3">PART B: Relevance to Modern Technological Society</text:h>
      <text:p text:style-name="Text_20_body">The classical ideas of Socrates, Plato, and Aristotle remain profoundly relevant to modern technological society, particularly in the field of Computer Science and Engineering (CSE).</text:p>
      <text:p text:style-name="Text_20_body"><text:soft-page-break/><text:span text:style-name="Strong_20_Emphasis">Socrates → Relevant to Critical Thinking in Technology:</text:span> Socrates' method of questioning assumptions is the foundation of today's ethical technology<text:span text:style-name="T2"> auditing</text:span>. <text:span text:style-name="T2">Engineers must ask: "Does this software harm users? Is this algorithm fair?" Just as Socrates questioned society's moral assumptions, modern CSE professionals must question whether their systems uphold justice and virtue.</text:span></text:p>
      <text:list text:style-name="L2">
        <text:list-item>
          <text:p text:style-name="P13"><text:span text:style-name="Emphasis">Example:</text:span> Facebook's algorithm promoting harmful content to teenagers — a Socratic examination would have identified this harm before deployment. </text:p>
        </text:list-item>
        <text:list-item>
          <text:p text:style-name="P12"><text:span text:style-name="T2">The idea that </text:span><text:span text:style-name="Emphasis"><text:span text:style-name="T2">"the unexamined code is not worth deploying"</text:span></text:span><text:span text:style-name="T2"> is the modern equivalent of Socrates' teaching. </text:span></text:p>
        </text:list-item>
      </text:list>
      <text:p text:style-name="Text_20_body"><text:span text:style-name="Strong_20_Emphasis"><text:span text:style-name="T2">Plato → Relevant to Technology Leadership and Governance:</text:span></text:span><text:span text:style-name="T2"> Plato's concept of the Philosopher-King translates into the need for </text:span><text:span text:style-name="Strong_20_Emphasis"><text:span text:style-name="T2">ethical technology leaders</text:span></text:span><text:span text:style-name="T2"> — people who govern AI and digital platforms with wisdom and concern for the public good ("The Good"), not merely profit.</text:span></text:p>
      <text:list text:style-name="L3">
        <text:list-item>
          <text:p text:style-name="P15"><text:span text:style-name="Emphasis"><text:span text:style-name="T2">Example:</text:span></text:span><text:span text:style-name="T2"> The Cambridge Analytica scandal demonstrated what happens when digital power is wielded without knowledge of The Good — 50 million Facebook users' data was misused for political manipulation. </text:span></text:p>
        </text:list-item>
        <text:list-item>
          <text:p text:style-name="P14"><text:span text:style-name="T2">Plato's idea of pursuing The Good aligns with today's concept of </text:span><text:span text:style-name="Strong_20_Emphasis"><text:span text:style-name="T2">public interest technology.</text:span></text:span><text:span text:style-name="T2"> </text:span></text:p>
        </text:list-item>
      </text:list>
      <text:p text:style-name="Text_20_body"><text:span text:style-name="Strong_20_Emphasis">Aristotle → </text:span><text:span text:style-name="Strong_20_Emphasis"><text:span text:style-name="T2">Relevant to Balanced and Practical Ethics i</text:span></text:span><text:span text:style-name="Strong_20_Emphasis">n CSE:</text:span> Aristotle's concept of the "Mean" is directly applicable to modern technological decisions. Extremes in technology are dangerous — <text:span text:style-name="T2">both over-automation and zero automation cause harm. </text:span>Ethical technology seeks the balanced middle path.</text:p>
      <text:list text:style-name="L4">
        <text:list-item>
          <text:p text:style-name="P17"><text:span text:style-name="Emphasis">Example</text:span><text:span text:style-name="Emphasis"><text:span text:style-name="T2">:</text:span></text:span><text:span text:style-name="T2"> AI in hiring — complete automation (extreme) creates algorithmic bias; complete human discretion (other extreme) introduces human bias. A balanced, human-in-the-loop AI system reflects Aristotle's Mean. </text:span></text:p>
        </text:list-item>
        <text:list-item>
          <text:p text:style-name="P16"><text:span text:style-name="T2">Aristotle's grounding of ethics in everyday life corresponds to the need for </text:span><text:span text:style-name="Strong_20_Emphasis"><text:span text:style-name="T2">practical, daily ethical coding practices</text:span></text:span><text:span text:style-name="T2"> rather than abstract policy documents. </text:span></text:p>
        </text:list-item>
      </text:list>
      <text:p text:style-name="Text_20_body"><text:span text:style-name="Strong_20_Emphasis">Conclusion:</text:span> The classical thinkers laid the philosophical groundwork that modern technology ethics continues to build upon. <text:span text:style-name="T2">Socrates taught us to question, Plato taught us to pursue the highest good, and Aristotle taught us to practice virtue in everyday professional life.</text:span> For CSE professionals, these are not ancient relics — they are living guides to building technology that serves humanity.</text:p>
      <text:p text:style-name="Horizontal_20_Line"/>
      <text:h text:style-name="Heading_20_1" text:outline-level="1">QUESTION 2 </text:h>
      <text:h text:style-name="Heading_20_2" text:outline-level="2">"How does ethical awareness influence decision making in areas such as software development, data handling, artificial intelligence, or digital platforms? Use relevant examples."</text:h>
      <text:p text:style-name="Horizontal_20_Line"/>
      <text:p text:style-name="Text_20_body"><text:span text:style-name="Strong_20_Emphasis">Introduction:</text:span> <text:span text:style-name="T2">Ethics is defined as the systematic study of what is morally right and wrong, good and bad, fair and unfair.</text:span> In Computer Science and Engineering, ethical awareness means being <text:soft-page-break/>conscious of the moral dimensions of one's technical work. <text:span text:style-name="T2">As CSE now shapes education, healthcare, finance, governance, and even warfare, ethical awareness is no longer optional — it is core to the identity of a responsible engineer.</text:span></text:p>
      <text:p text:style-name="Text_20_body">Ethical awareness influences decision-making in CSE across four major areas:</text:p>
      <text:p text:style-name="Horizontal_20_Line"/>
      <text:p text:style-name="Text_20_body"><text:span text:style-name="Strong_20_Emphasis"><text:span text:style-name="T2">1. Software Development:</text:span></text:span></text:p>
      <text:p text:style-name="P3">Ethical awareness fundamentally changes how software is designed and tested. Without it, engineers focus only on functionality. With it, they ask: "Who might be harmed? Who is excluded? What are the unintended consequences?"</text:p>
      <text:p text:style-name="Text_20_body">Key ethical decisions in software development include:</text:p>
      <text:list text:style-name="L5">
        <text:list-item>
          <text:p text:style-name="P18"><text:span text:style-name="T2">Ensuring </text:span><text:span text:style-name="Strong_20_Emphasis"><text:span text:style-name="T2">accessibility</text:span></text:span><text:span text:style-name="T2"> for people with disabilities </text:span></text:p>
        </text:list-item>
        <text:list-item>
          <text:p text:style-name="P18"><text:span text:style-name="T2">Avoiding </text:span><text:span text:style-name="Strong_20_Emphasis"><text:span text:style-name="T2">dark patterns</text:span></text:span><text:span text:style-name="T2"> (design tricks that manipulate users) </text:span></text:p>
        </text:list-item>
        <text:list-item>
          <text:p text:style-name="P7">Ensuring software does not discriminate based on gender, race, or religion </text:p>
        </text:list-item>
      </text:list>
      <text:p text:style-name="Text_20_body"><text:span text:style-name="Emphasis">Example:</text:span> Facebook's recommendation algorithm was found to promote content that caused depression and anxiety in teenage girls. Ethical awareness during development would have triggered safety testing for vulnerable users before deployment, preventing widespread psychological harm.</text:p>
      <text:p text:style-name="Horizontal_20_Line"/>
      <text:p text:style-name="Text_20_body"><text:span text:style-name="Strong_20_Emphasis"><text:span text:style-name="T2">2. Data Handling:</text:span></text:span></text:p>
      <text:p text:style-name="P3">Data is the foundation of modern technology. Ethical awareness guides engineers to ask: "What data should be collected? How long should it be stored? Who owns it? Who has access?"</text:p>
      <text:p text:style-name="Text_20_body"><text:span text:style-name="T2">Unethical data handling leads to </text:span><text:span text:style-name="Strong_20_Emphasis"><text:span text:style-name="T2">data breaches, surveillance, and manipulation.</text:span></text:span><text:span text:style-name="T2"> Ethical data handling requires:</text:span></text:p>
      <text:list text:style-name="L6">
        <text:list-item>
          <text:p text:style-name="P20"><text:span text:style-name="Strong_20_Emphasis"><text:span text:style-name="T2">Informed consent</text:span></text:span><text:span text:style-name="T2"> — users must know what data is collected </text:span></text:p>
        </text:list-item>
        <text:list-item>
          <text:p text:style-name="P20"><text:span text:style-name="Strong_20_Emphasis"><text:span text:style-name="T2">Data minimization</text:span></text:span><text:span text:style-name="T2"> — collect only what is necessary </text:span></text:p>
        </text:list-item>
        <text:list-item>
          <text:p text:style-name="P19"><text:span text:style-name="Strong_20_Emphasis"><text:span text:style-name="T2">Secure storage</text:span></text:span><text:span text:style-name="T2"> — protect data from unauthorized access </text:span></text:p>
        </text:list-item>
      </text:list>
      <text:p text:style-name="Text_20_body"><text:span text:style-name="Emphasis">Example:</text:span><text:span text:style-name="T2"> The Cambridge Analytica scandal (2018) — 50 million Facebook users' personal data was harvested without consent and used to target political advertisements.</text:span> This directly influenced the <text:span text:style-name="T2">US presidential election. Ethical awareness would have prevented this misuse. Similarly, in Bangladesh, over 5 crore citizens' data was exposed online due to poor security practices — a direct consequence of inadequate ethical consideration in data handling.</text:span></text:p>
      <text:p text:style-name="Horizontal_20_Line"/>
      <text:p text:style-name="Text_20_body"><text:span text:style-name="Strong_20_Emphasis"><text:span text:style-name="T2">3. Artificial Intelligence:</text:span></text:span></text:p>
      <text:p text:style-name="Text_20_body">AI presents the most complex ethical challenges in modern CSE. Ethical awareness influences every stage — from dataset selection to deployment.</text:p>
      <text:p text:style-name="Text_20_body">Major ethical issues in AI:</text:p>
      <text:list text:style-name="L7">
        <text:list-item>
          <text:p text:style-name="P22"><text:span text:style-name="Strong_20_Emphasis">Bias in training data:</text:span> If the data used to train an AI model is biased, the AI will make biased decisions (systematic errors, imbalanced representation) </text:p>
        </text:list-item>
        <text:list-item>
          <text:p text:style-name="P22"><text:soft-page-break/><text:span text:style-name="Strong_20_Emphasis">Discrimination in automated decisions:</text:span> AI making decisions based on gender, race, ethnic identity, or political belief </text:p>
        </text:list-item>
        <text:list-item>
          <text:p text:style-name="P22"><text:span text:style-name="Strong_20_Emphasis">Black Box problem:</text:span> AI decisions that cannot be explained or challenged — lack of transparency </text:p>
        </text:list-item>
        <text:list-item>
          <text:p text:style-name="P22"><text:span text:style-name="Strong_20_Emphasis">Job displacement:</text:span> Automation eliminating employment without ethical planning </text:p>
        </text:list-item>
        <text:list-item>
          <text:p text:style-name="P21"><text:span text:style-name="Strong_20_Emphasis">Deepfakes and misinformation:</text:span> AI-generated content used to deceive </text:p>
        </text:list-item>
      </text:list>
      <text:p text:style-name="Text_20_body"><text:span text:style-name="Emphasis"><text:span text:style-name="T2">Example:</text:span></text:span><text:span text:style-name="T2"> Amazon's AI recruitment tool (2018) was found to systematically downgrade résumés from women because it was trained on historical hiring data that reflected past male dominance in tech. Ethical awareness at the dataset stage — checking for balanced, representative data — would have caught this bias before deployment.</text:span></text:p>
      <text:p text:style-name="Text_20_body"><text:span text:style-name="Emphasis"><text:span text:style-name="T2">Example:</text:span></text:span><text:span text:style-name="T2"> Facial recognition software showed racial bias — higher error rates for darker-skinned faces. AI experts challenged Amazon's facial recognition after a researcher found it misidentified Black individuals at significantly higher rates.</text:span></text:p>
      <text:p text:style-name="Horizontal_20_Line"/>
      <text:p text:style-name="Text_20_body"><text:span text:style-name="Strong_20_Emphasis"><text:span text:style-name="T2">4. Digital Platforms:</text:span></text:span></text:p>
      <text:p text:style-name="Text_20_body">Social media and digital platforms have enormous power to shape public opinion, mental health, and political discourse. Ethical awareness influences how platforms are designed and regulated.</text:p>
      <text:p text:style-name="Text_20_body">Key ethical issues:</text:p>
      <text:list text:style-name="L8">
        <text:list-item>
          <text:p text:style-name="P24"><text:span text:style-name="Strong_20_Emphasis"><text:span text:style-name="T2">Spread of harmful content</text:span></text:span><text:span text:style-name="T2"> — misinformation, hate speech, violence </text:span></text:p>
        </text:list-item>
        <text:list-item>
          <text:p text:style-name="P24"><text:span text:style-name="Strong_20_Emphasis"><text:span text:style-name="T2">Manipulation through algorithms</text:span></text:span><text:span text:style-name="T2"> — keeping users engaged through outrage and fear </text:span></text:p>
        </text:list-item>
        <text:list-item>
          <text:p text:style-name="P24"><text:span text:style-name="Strong_20_Emphasis"><text:span text:style-name="T2">Echo chambers and polarization</text:span></text:span><text:span text:style-name="T2"> — algorithms showing only content that confirms existing beliefs, deepening societal division </text:span></text:p>
        </text:list-item>
        <text:list-item>
          <text:p text:style-name="P23"><text:span text:style-name="Strong_20_Emphasis"><text:span text:style-name="T2">Data harvesting for targeted advertising</text:span></text:span><text:span text:style-name="T2"> — exploiting personal data without meaningful consent</text:span> </text:p>
        </text:list-item>
      </text:list>
      <text:p text:style-name="Text_20_body"><text:span text:style-name="Emphasis">Example:</text:span> <text:span text:style-name="T2">YouTube's recommendation algorithm was found to progressively guide viewers toward increasingly extreme content, contributing to radicalization. Ethical awareness would demand that recommendation systems be designed to prioritize user wellbeing over watch-time metrics.</text:span></text:p>
      <text:p text:style-name="Horizontal_20_Line"/>
      <text:p text:style-name="Text_20_body"><text:span text:style-name="Strong_20_Emphasis">Conclusion:</text:span> Ethical awareness transforms CSE professionals from mere technical executors into responsible architects of society. Without it, technology amplifies inequality, invades privacy, and manipulates behavior. With it, technology can become a force for justice, inclusion, and human flourishing. As the slides state: <text:span text:style-name="Emphasis">"</text:span><text:span text:style-name="Emphasis"><text:span text:style-name="T2">Ethics is not optional — it is core to the identity of a responsible engineer."</text:span></text:span></text:p>
      <text:p text:style-name="Horizontal_20_Line"/>
      <text:h text:style-name="Heading_20_1" text:outline-level="1"><text:soft-page-break/>QUESTION 3 </text:h>
      <text:h text:style-name="Heading_20_2" text:outline-level="2">"Compare Kant's Deontological Ethics and Mill's Utilitarianism. How are these Modern Period ideologies relevant to CSE?"</text:h>
      <text:p text:style-name="Horizontal_20_Line"/>
      <text:p text:style-name="Text_20_body"><text:span text:style-name="Strong_20_Emphasis">Introduction:</text:span> The Modern Period of ethical thought (1500–present) marked a decisive shift from theological to scientific reasoning. Among the most influential modern ethicists are Immanuel Kant and John Stuart Mill, whose contrasting theories — <text:span text:style-name="T2">Deontology and Utilitarianism — continue to shape professional ethics, including in CSE.</text:span></text:p>
      <text:p text:style-name="Horizontal_20_Line"/>
      <text:p text:style-name="Text_20_body"><text:span text:style-name="Strong_20_Emphasis">PART A: Kant's Deontological Ethics (Ethics of Duty)</text:span></text:p>
      <text:p text:style-name="Text_20_body">Immanuel Kant (1724–1804) is considered the basis of modern ethical discussion. His theory is known as <text:span text:style-name="Strong_20_Emphasis">Deontology</text:span> — from the Greek <text:span text:style-name="Emphasis">deon</text:span> meaning duty.</text:p>
      <text:p text:style-name="Text_20_body"><text:span text:style-name="Strong_20_Emphasis">Core Principles:</text:span></text:p>
      <text:list text:style-name="L9">
        <text:list-item>
          <text:p text:style-name="P26">Morality must be grounded in <text:span text:style-name="Strong_20_Emphasis">pure reason</text:span>, not emotion or consequences </text:p>
        </text:list-item>
        <text:list-item>
          <text:p text:style-name="P26"><text:span text:style-name="Strong_20_Emphasis"><text:span text:style-name="T2">"Good Will"</text:span></text:span><text:span text:style-name="T2"> is the only thing that is unconditionally good — acting from a sense of duty is what gives an action moral worth </text:span></text:p>
        </text:list-item>
        <text:list-item>
          <text:p text:style-name="P26">Happiness is achieved through reason in a civilized society where humans are rational beings </text:p>
        </text:list-item>
        <text:list-item>
          <text:p text:style-name="P25"><text:span text:style-name="T2">Natural law operates as </text:span><text:span text:style-name="Strong_20_Emphasis"><text:span text:style-name="T2">Categorical Imperative</text:span></text:span><text:span text:style-name="T2"> — an absolute, universal moral command</text:span> </text:p>
        </text:list-item>
      </text:list>
      <text:p text:style-name="Text_20_body"><text:span text:style-name="Strong_20_Emphasis">The Three Formulations of the Categorical Imperative:</text:span></text:p>
      <text:p text:style-name="Text_20_body"><text:span text:style-name="Emphasis">1.</text:span><text:span text:style-name="Emphasis"><text:span text:style-name="T2"> Universal Law:</text:span></text:span> "Act only according to that maxim by which you can at the same time will that it should become a universal law." → Ask: If everyone did what I am about to do, would the world still function morally?</text:p>
      <text:p text:style-name="Text_20_body"><text:span text:style-name="Emphasis"><text:span text:style-name="T2">2. Humanity as End</text:span></text:span><text:span text:style-name="Emphasis">:</text:span> "Treat humanity, whether in your own person or in that of another, always as an end and never merely as a means." → Human beings have intrinsic worth — they must never be used as instruments for someone else's goals.</text:p>
      <text:p text:style-name="Text_20_body"><text:span text:style-name="Emphasis">3. </text:span><text:span text:style-name="Emphasis"><text:span text:style-name="T2">Duty Gives Moral Worth</text:span></text:span><text:span text:style-name="Emphasis">:</text:span> The moral value of an action comes from the intention and duty behind it — not the outcome it produces.</text:p>
      <text:p text:style-name="Horizontal_20_Line"/>
      <text:p text:style-name="Text_20_body"><text:span text:style-name="Strong_20_Emphasis">PART B: Mill's Utilitarianism (Ethics of Consequences)</text:span></text:p>
      <text:p text:style-name="Text_20_body">John Stuart Mill (1806–1873) developed his ethics inspired by <text:span text:style-name="T2">James Mill and Jeremy Bentham.</text:span> His theory is called <text:span text:style-name="Strong_20_Emphasis">Utilitarianism</text:span> — a form of <text:span text:style-name="Strong_20_Emphasis">Teleology</text:span> (consequence-based ethics).</text:p>
      <text:p text:style-name="Text_20_body"><text:span text:style-name="Strong_20_Emphasis">Core Principles:</text:span></text:p>
      <text:list text:style-name="L10">
        <text:list-item>
          <text:p text:style-name="P28"><text:span text:style-name="T2">The rightness or wrongness of an action is determined entirely by its </text:span><text:span text:style-name="Strong_20_Emphasis"><text:span text:style-name="T2">consequences</text:span></text:span><text:span text:style-name="T2"> </text:span></text:p>
        </text:list-item>
        <text:list-item>
          <text:p text:style-name="P28"><text:span text:style-name="T2">The standard of moral judgment is </text:span><text:span text:style-name="Strong_20_Emphasis"><text:span text:style-name="T2">pleasure or happiness</text:span></text:span><text:span text:style-name="T2"> </text:span></text:p>
        </text:list-item>
        <text:list-item>
          <text:p text:style-name="P28"><text:soft-page-break/>The greatest ethical goal: <text:span text:style-name="Emphasis">"The greatest happiness for the greatest number"</text:span> </text:p>
        </text:list-item>
        <text:list-item>
          <text:p text:style-name="P27">This is a <text:span text:style-name="Strong_20_Emphasis">Hedonist ethics</text:span> — pleasure is the measure of morality </text:p>
        </text:list-item>
      </text:list>
      <text:p text:style-name="Text_20_body"><text:span text:style-name="Strong_20_Emphasis">Two Types of Motivation (Mill):</text:span></text:p>
      <text:list text:style-name="L11">
        <text:list-item>
          <text:p text:style-name="P30"><text:span text:style-name="Strong_20_Emphasis">External motivation:</text:span> Acting because of friends' approval, social pressure, or fear of God's punishment </text:p>
        </text:list-item>
        <text:list-item>
          <text:p text:style-name="P29"><text:span text:style-name="Strong_20_Emphasis">Internal motivation:</text:span><text:span text:style-name="T2"> Acting from an inner feeling of humanity and conscience — learned from society </text:span></text:p>
        </text:list-item>
      </text:list>
      <text:p text:style-name="P3">Mill argued that internal motivation — the deeply felt sense of duty to humanity — is the higher and more reliable moral guide.</text:p>
      <text:p text:style-name="Text_20_body"><text:span text:style-name="Strong_20_Emphasis">PART D: Relevance to CSE</text:span></text:p>
      <text:p text:style-name="Text_20_body"><text:span text:style-name="Strong_20_Emphasis">Kant's Deontology in CSE:</text:span></text:p>
      <text:p text:style-name="Text_20_body">Kantian ethics provides <text:span text:style-name="Strong_20_Emphasis">absolute rules</text:span> that cannot be violated regardless of outcome — essential for establishing non-negotiable ethical boundaries in technology.</text:p>
      <text:list text:style-name="L12">
        <text:list-item>
          <text:p text:style-name="P32"><text:span text:style-name="Emphasis">Universal Law:</text:span> If every engineer violated user privacy, the entire digital ecosystem would collapse. <text:span text:style-name="T2">Therefore, privacy protection is a categorical duty. </text:span></text:p>
        </text:list-item>
        <text:list-item>
          <text:p text:style-name="P32"><text:span text:style-name="Emphasis">Humanity as End:</text:span> Users must not be treated merely as data points or revenue sources. Designing systems that exploit psychological vulnerabilities (infinite scroll, notification manipulation) violates this principle. </text:p>
        </text:list-item>
        <text:list-item>
          <text:p text:style-name="P31"><text:span text:style-name="Emphasis">Good Will:</text:span><text:span text:style-name="T2"> Engineers should build secure systems because it is the right thing to do — not merely because regulations require it. </text:span></text:p>
        </text:list-item>
      </text:list>
      <text:p text:style-name="Text_20_body"><text:span text:style-name="Emphasis">Example:</text:span> A Kantian approach to data collection would prohibit selling user data under any circumstances — because using users as means to profit violates their dignity.</text:p>
      <text:p text:style-name="Text_20_body"><text:span text:style-name="Strong_20_Emphasis">Mill's Utilitarianism in CSE:</text:span></text:p>
      <text:p text:style-name="Text_20_body">Utilitarian ethics provides a <text:span text:style-name="Strong_20_Emphasis"><text:span text:style-name="T2">cost-benefit framework</text:span></text:span><text:span text:style-name="T2"> for complex trade-offs in technology — useful when absolute rules produce impractical outcomes.</text:span></text:p>
      <text:list text:style-name="L13">
        <text:list-item>
          <text:p text:style-name="P34"><text:span text:style-name="Emphasis"><text:span text:style-name="T2">Greatest happiness:</text:span></text:span><text:span text:style-name="T2"> A public health authority sharing anonymized patient data with researchers might violate individual privacy (harm to few) but could save thousands of lives (benefit to many) — a Utilitarian calculation might justify this. </text:span></text:p>
        </text:list-item>
        <text:list-item>
          <text:p text:style-name="P33"><text:span text:style-name="Emphasis"><text:span text:style-name="T2">Consequences matter:</text:span></text:span><text:span text:style-name="T2"> An AI system that is 95% accurate but fails 5% of the time for a marginalized group causes measurable harm — the consequentialist calculus demands redesign.</text:span> </text:p>
        </text:list-item>
      </text:list>
      <text:p text:style-name="Text_20_body"><text:span text:style-name="Emphasis">Example:</text:span> Open-source software releases security vulnerability information publicly to allow faster patching — some immediate risk to justify long-term greater security for all users. This is a Utilitarian decision.</text:p>
      <text:p text:style-name="Text_20_body"><text:span text:style-name="Strong_20_Emphasis">Which is More Applicable?</text:span> <text:span text:style-name="T2">Neither alone is sufficient. Kantian ethics provides the </text:span><text:span text:style-name="Strong_20_Emphasis"><text:span text:style-name="T2">red lines</text:span></text:span><text:span text:style-name="T2"> (user consent, data dignity, no discrimination), while Utilitarian ethics helps navigate </text:span><text:span text:style-name="Strong_20_Emphasis"><text:span text:style-name="T2">grey areas</text:span></text:span><text:span text:style-name="T2"> (trade-offs between security and privacy, automation and employment). Mature CSE ethics requires both frameworks working together.</text:span></text:p>
      <text:p text:style-name="Text_20_body"><text:soft-page-break/><text:span text:style-name="Strong_20_Emphasis">Conclusion:</text:span> Kant and Mill represent two enduring pillars of moral thought that remain deeply relevant to modern CSE. Kant reminds engineers that some principles must never be compromised. Mill reminds them to always consider the real-world impact of their decisions on human happiness and welfare.</text:p>
      <text:p text:style-name="Horizontal_20_Line"/>
      <text:h text:style-name="Heading_20_1" text:outline-level="1">QUESTION 4 </text:h>
      <text:h text:style-name="Heading_20_2" text:outline-level="2">"Discuss how Social Ethics differs from Personal Morality. Why is this understanding important for CSE students?"</text:h>
      <text:p text:style-name="Horizontal_20_Line"/>
      <text:p text:style-name="Text_20_body"><text:span text:style-name="Strong_20_Emphasis">Introduction:</text:span> <text:span text:style-name="T2">Ethics is the systematic study of what is morally right and wrong.</text:span> Within ethics, an important distinction exists between personal morality — the individual's private moral code — and social ethics — the moral principles that govern collective behavior in society. For CSE students, understanding this distinction is foundational to becoming responsible professionals.</text:p>
      <text:p text:style-name="Horizontal_20_Line"/>
      <text:p text:style-name="Text_20_body"><text:span text:style-name="Strong_20_Emphasis">Personal Morality:</text:span> <text:span text:style-name="T2">Personal morality refers to an individual's own sense of right and wrong, shaped by personal experience, family upbringing, religion, and culture. It governs how a person behaves in private life.</text:span></text:p>
      <text:p text:style-name="P3">Characteristics:</text:p>
      <text:list text:style-name="L14">
        <text:list-item>
          <text:p text:style-name="P8">Subjective — varies from person to person </text:p>
        </text:list-item>
        <text:list-item>
          <text:p text:style-name="P8">Rooted in personal beliefs, religious values, and emotional responses </text:p>
        </text:list-item>
        <text:list-item>
          <text:p text:style-name="P8">Applies to individual decisions and private conduct </text:p>
        </text:list-item>
        <text:list-item>
          <text:p text:style-name="P9">Example: "I personally believe lying is wrong" </text:p>
        </text:list-item>
      </text:list>
      <text:p text:style-name="Horizontal_20_Line"/>
      <text:p text:style-name="Text_20_body"><text:span text:style-name="Strong_20_Emphasis">Social Ethics:</text:span> <text:span text:style-name="T2">Social ethics refers to the moral principles and standards that govern behavior within communities, institutions, and professional settings. It is concerned with how individuals and organizations affect others and society at large.</text:span></text:p>
      <text:p text:style-name="P3">Characteristics:</text:p>
      <text:list text:style-name="L15">
        <text:list-item>
          <text:p text:style-name="P10">Collective and institutional in nature </text:p>
        </text:list-item>
        <text:list-item>
          <text:p text:style-name="P10">Rooted in social contracts, laws, cultural norms, and professional codes </text:p>
        </text:list-item>
        <text:list-item>
          <text:p text:style-name="P10">Applies to decisions that affect groups of people </text:p>
        </text:list-item>
        <text:list-item>
          <text:p text:style-name="P11">Example: "Organizations must not collect user data without informed consent" </text:p>
        </text:list-item>
      </text:list>
      <text:p text:style-name="Horizontal_20_Line"/>
      <text:p text:style-name="Text_20_body"><text:span text:style-name="Strong_20_Emphasis">Key Differences:</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Aspect</text:p>
            </table:table-cell>
            <table:table-cell table:style-name="Table3.A1" office:value-type="string">
              <text:p text:style-name="Table_20_Heading">Personal Morality</text:p>
            </table:table-cell>
            <table:table-cell table:style-name="Table3.A1" office:value-type="string">
              <text:p text:style-name="Table_20_Heading">Social Ethics</text:p>
            </table:table-cell>
          </table:table-row>
        </table:table-header-rows>
        <table:table-row>
          <table:table-cell table:style-name="Table3.A1" office:value-type="string">
            <text:p text:style-name="Table_20_Contents">Scope</text:p>
          </table:table-cell>
          <table:table-cell table:style-name="Table3.A1" office:value-type="string">
            <text:p text:style-name="Table_20_Contents">Individual conduct</text:p>
          </table:table-cell>
          <table:table-cell table:style-name="Table3.A1" office:value-type="string">
            <text:p text:style-name="Table_20_Contents">Collective/institutional conduct</text:p>
          </table:table-cell>
        </table:table-row>
        <table:table-row>
          <table:table-cell table:style-name="Table3.A1" office:value-type="string">
            <text:p text:style-name="Table_20_Contents">Source</text:p>
          </table:table-cell>
          <table:table-cell table:style-name="Table3.A1" office:value-type="string">
            <text:p text:style-name="Table_20_Contents">Personal belief, religion, <text:soft-page-break/>upbringing</text:p>
          </table:table-cell>
          <table:table-cell table:style-name="Table3.A1" office:value-type="string">
            <text:p text:style-name="Table_20_Contents">Social contract, law, professional code</text:p>
          </table:table-cell>
        </table:table-row>
        <table:table-row>
          <table:table-cell table:style-name="Table3.A1" office:value-type="string">
            <text:p text:style-name="Table_20_Contents">Accountability</text:p>
          </table:table-cell>
          <table:table-cell table:style-name="Table3.A1" office:value-type="string">
            <text:p text:style-name="Table_20_Contents">To oneself or God</text:p>
          </table:table-cell>
          <table:table-cell table:style-name="Table3.A1" office:value-type="string">
            <text:p text:style-name="Table_20_Contents">To society, institutions, law</text:p>
          </table:table-cell>
        </table:table-row>
        <table:table-row>
          <table:table-cell table:style-name="Table3.A1" office:value-type="string">
            <text:p text:style-name="Table_20_Contents">Flexibility</text:p>
          </table:table-cell>
          <table:table-cell table:style-name="Table3.A1" office:value-type="string">
            <text:p text:style-name="Table_20_Contents">Personal and subjective</text:p>
          </table:table-cell>
          <table:table-cell table:style-name="Table3.A1" office:value-type="string">
            <text:p text:style-name="Table_20_Contents">More standardized and enforceable</text:p>
          </table:table-cell>
        </table:table-row>
        <table:table-row>
          <table:table-cell table:style-name="Table3.A1" office:value-type="string">
            <text:p text:style-name="Table_20_Contents">Example in CSE</text:p>
          </table:table-cell>
          <table:table-cell table:style-name="Table3.A1" office:value-type="string">
            <text:p text:style-name="Table_20_Contents">"I don't like writing insecure code"</text:p>
          </table:table-cell>
          <table:table-cell table:style-name="Table3.A1" office:value-type="string">
            <text:p text:style-name="Table_20_Contents">"All software must meet security standards to protect users"</text:p>
          </table:table-cell>
        </table:table-row>
      </table:table>
      <text:p text:style-name="Horizontal_20_Line"/>
      <text:p text:style-name="Text_20_body"><text:span text:style-name="Strong_20_Emphasis">Why This Is Important for CSE Students:</text:span></text:p>
      <text:p text:style-name="Text_20_body">A CSE student's future work will not remain private — it will affect millions of people. Personal morality alone is insufficient to navigate the complex ethical terrain of modern technology. Here is why:</text:p>
      <text:p text:style-name="Text_20_body"><text:span text:style-name="Strong_20_Emphasis">1. Scale of Impact:</text:span> A single software application can reach millions of users globally. Personal morality governs one-to-one interactions; social ethics governs one-to-millions interactions.</text:p>
      <text:p text:style-name="Text_20_body"><text:span text:style-name="Strong_20_Emphasis">2. Institutional Responsibility:</text:span> CSE professionals work within organizations, governments, and corporations. They must operate within ethical frameworks that go beyond personal preference — professional codes, regulations, and social accountability structures.</text:p>
      <text:p text:style-name="Text_20_body"><text:span text:style-name="Strong_20_Emphasis">3. Conflict Between Personal and Social:</text:span> <text:span text:style-name="T2">A CSE professional might personally disagree with a company's data practices but professionally be bound by social ethics to report or resist those practices (whistleblowing). Understanding the difference helps navigate such conflicts</text:span>.</text:p>
      <text:p text:style-name="Text_20_body"><text:span text:style-name="Strong_20_Emphasis">4. Technology Shapes Society:</text:span> Digital platforms, AI systems, and surveillance technologies reshape social norms and power structures. Personal good intentions are not enough — professionals must apply social ethical frameworks to ensure their work does not cause collective harm.</text:p>
      <text:p text:style-name="Text_20_body"><text:span text:style-name="Emphasis">Example:</text:span> An engineer may personally believe their facial recognition system is neutral and fair. But social ethics demands they test it against real-world<text:span text:style-name="T2"> demographic data to ensure it does not discriminate against racial minorities — because the social impact of deployment matters regardless of personal intent.</text:span></text:p>
      <text:p text:style-name="Text_20_body"><text:span text:style-name="Strong_20_Emphasis">Conclusion:</text:span> For CSE students, understanding the distinction between personal morality and social ethics is the first step toward professional ethical maturity. Technology is a social force — and its creators bear social responsibility.</text:p>
      <text:p text:style-name="Horizontal_20_Line"/>
      <text:h text:style-name="Heading_20_1" text:outline-level="1">QUESTION 5 </text:h>
      <text:h text:style-name="Heading_20_2" text:outline-level="2">"Compare the Classical, Medieval, and Modern Periods of ethical thought and their relevance to CSE."</text:h>
      <text:p text:style-name="Horizontal_20_Line"/>
      <text:p text:style-name="Text_20_body"><text:span text:style-name="Strong_20_Emphasis">Introduction:</text:span> Historians divide the history of Western ethics into three major periods: the Classical (500 BC–500 AD), the Medieval (500–1500), and the Modern (1500–present). Each period reflects <text:soft-page-break/>the dominant intellectual, social, and spiritual concerns of its time, and each contributes something essential to contemporary CSE ethics.</text:p>
      <text:p text:style-name="Horizontal_20_Line"/>
      <text:p text:style-name="Text_20_body"><text:span text:style-name="Strong_20_Emphasis">THE CLASSICAL PERIOD (500 BC – 500 AD)</text:span></text:p>
      <text:p text:style-name="Text_20_body">Context: Greek society was transitioning from agrarian monarchy to commercial democracy. Ethics was called the "spiritual counterpart of medicine" — caring for the soul as medicine cares for the body. The moral focus was the individual's duty as a citizen.</text:p>
      <text:p text:style-name="Text_20_body">Key Thinkers and Ideas:</text:p>
      <text:list text:style-name="L16">
        <text:list-item>
          <text:p text:style-name="P36"><text:span text:style-name="Strong_20_Emphasis"><text:span text:style-name="T2">Socrates:</text:span></text:span><text:span text:style-name="T2"> Morality grounded in reason; Socratic Method; "The unexamined life is not worth living"; self-knowledge as ethical foundation </text:span></text:p>
        </text:list-item>
        <text:list-item>
          <text:p text:style-name="P36"><text:span text:style-name="Strong_20_Emphasis"><text:span text:style-name="T2">Plato:</text:span></text:span><text:span text:style-name="T2"> Theory of Forms; "The Good" as highest reality; intellectual pursuits over bodily pleasure; Philosopher-King; </text:span><text:span text:style-name="Emphasis"><text:span text:style-name="T2">The Republic</text:span></text:span><text:span text:style-name="T2"> </text:span></text:p>
        </text:list-item>
        <text:list-item>
          <text:p text:style-name="P36"><text:span text:style-name="Strong_20_Emphasis"><text:span text:style-name="T2">Aristotle:</text:span></text:span><text:span text:style-name="T2"> Virtue as the mean; ethics rooted in daily life; happiness through reason; </text:span><text:span text:style-name="Emphasis"><text:span text:style-name="T2">Nicomachean Ethics</text:span></text:span><text:span text:style-name="T2"> — first systematic ethics text; "No form without matter" </text:span></text:p>
        </text:list-item>
        <text:list-item>
          <text:p text:style-name="P35"><text:span text:style-name="Strong_20_Emphasis"><text:span text:style-name="T2">Other schools:</text:span></text:span><text:span text:style-name="T2"> Hedonism (Cyrenaics, Epicureans) — pleasure as measure; Stoics and Cynics — duty and reason over desire </text:span></text:p>
        </text:list-item>
      </text:list>
      <text:p text:style-name="P2"/>
      <text:p text:style-name="Text_20_body"><text:span text:style-name="Strong_20_Emphasis">THE MEDIEVAL PERIOD (500 – 1500)</text:span></text:p>
      <text:p text:style-name="Text_20_body">Context: Christianity dominated Europe. The citizen's relationship to the state was replaced by the individual's obligation to God. Medieval ethics combined classical reason with religious faith and obedience to God's will.</text:p>
      <text:p text:style-name="Text_20_body">Key Thinkers and Ideas:</text:p>
      <text:list text:style-name="L17">
        <text:list-item>
          <text:p text:style-name="P38"><text:span text:style-name="Strong_20_Emphasis"><text:span text:style-name="T2">St. Augustine (354–430):</text:span></text:span><text:span text:style-name="T2"> Combined Platonic philosophy with Christian ethics; two-sided system — reason leads to temporal good, faith leads to eternal salvation; original sin but retained free will; virtue requires faith to have real value; </text:span><text:span text:style-name="Emphasis"><text:span text:style-name="T2">Confessions</text:span></text:span><text:span text:style-name="T2">, </text:span><text:span text:style-name="Emphasis"><text:span text:style-name="T2">The City of God</text:span></text:span><text:span text:style-name="T2"> </text:span></text:p>
        </text:list-item>
        <text:list-item>
          <text:p text:style-name="P37"><text:span text:style-name="Strong_20_Emphasis"><text:span text:style-name="T2">St. Thomas Aquinas (1225–1274):</text:span></text:span><text:span text:style-name="T2"> Rediscovered and Christianized Aristotle; ethics has two dimensions — natural (reason → earthly happiness) and theological (faith → eternal life); Natural Law theory — divine law written in the human heart, discoverable by reason; harmony of reason and faith; </text:span><text:span text:style-name="Emphasis"><text:span text:style-name="T2">Summa Theologica</text:span></text:span><text:span text:style-name="T2">; prepared the way for scientific ethics </text:span></text:p>
        </text:list-item>
      </text:list>
      <text:p text:style-name="Horizontal_20_Line"/>
      <text:p text:style-name="Text_20_body"><text:span text:style-name="Strong_20_Emphasis">THE MODERN PERIOD (1500 – Present)</text:span></text:p>
      <text:p text:style-name="Text_20_body">Context: Protestant Reformation challenged <text:span text:style-name="T2">Church authority; printing press democratized knowledge; scientific revolution (Copernicus, Galileo, Harvey) shifted focus from theology to science; individual reasoning became central.</text:span></text:p>
      <text:p text:style-name="Text_20_body">Key Thinkers and Ideas:</text:p>
      <text:list text:style-name="L18">
        <text:list-item>
          <text:p text:style-name="P40"><text:span text:style-name="Strong_20_Emphasis"><text:span text:style-name="T2">Thomas Hobbes (1588–1679):</text:span></text:span><text:span text:style-name="T2"> First to approach ethics scientifically; mechanistic materialism; human nature is self-interested; morality arises only through social contract; sovereign authority ensures order; </text:span><text:span text:style-name="Emphasis"><text:span text:style-name="T2">Leviathan</text:span></text:span><text:span text:style-name="T2"> </text:span></text:p>
        </text:list-item>
        <text:list-item>
          <text:p text:style-name="P40"><text:soft-page-break/><text:span text:style-name="Strong_20_Emphasis"><text:span text:style-name="T2">Reaction to Hobbes:</text:span></text:span><text:span text:style-name="T2"> Humans have moral faculty — intuition, moral sense, conscience — beyond mere self-interest </text:span></text:p>
        </text:list-item>
        <text:list-item>
          <text:p text:style-name="P40"><text:span text:style-name="Strong_20_Emphasis"><text:span text:style-name="T2">David Hume (1711–1766):</text:span></text:span><text:span text:style-name="T2"> Moral judgment involves feeling; two-sided standard — objective consequences + subjective pleasure; moral sentiment over pure reason; naturally inclined to benefit others </text:span></text:p>
        </text:list-item>
        <text:list-item>
          <text:p text:style-name="P40"><text:span text:style-name="Strong_20_Emphasis"><text:span text:style-name="T2">Immanuel Kant (1724–1804):</text:span></text:span><text:span text:style-name="T2"> Deontology — ethics of duty; Good Will; Categorical Imperative; morality grounded in pure reason; humans as rational beings </text:span></text:p>
        </text:list-item>
        <text:list-item>
          <text:p text:style-name="P39"><text:span text:style-name="Strong_20_Emphasis"><text:span text:style-name="T2">John Stuart Mill (1806–1873):</text:span></text:span><text:span text:style-name="T2"> Utilitarianism — ethics of consequences; greatest happiness for greatest number; hedonist ethics; internal and external motivation </text:span></text:p>
        </text:list-item>
      </text:list>
      <text:p text:style-name="Horizontal_20_Line"/>
      <text:p text:style-name="Text_20_body"><text:span text:style-name="Strong_20_Emphasis">Comparative Summary:</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Aspect</text:p>
            </table:table-cell>
            <table:table-cell table:style-name="Table4.A1" office:value-type="string">
              <text:p text:style-name="Table_20_Heading">Classical</text:p>
            </table:table-cell>
            <table:table-cell table:style-name="Table4.A1" office:value-type="string">
              <text:p text:style-name="Table_20_Heading">Medieval</text:p>
            </table:table-cell>
            <table:table-cell table:style-name="Table4.A1" office:value-type="string">
              <text:p text:style-name="Table_20_Heading">Modern</text:p>
            </table:table-cell>
          </table:table-row>
        </table:table-header-rows>
        <table:table-row>
          <table:table-cell table:style-name="Table4.A1" office:value-type="string">
            <text:p text:style-name="Table_20_Contents">Central Focus</text:p>
          </table:table-cell>
          <table:table-cell table:style-name="Table4.A1" office:value-type="string">
            <text:p text:style-name="Table_20_Contents">Citizen &amp; city-state</text:p>
          </table:table-cell>
          <table:table-cell table:style-name="Table4.A1" office:value-type="string">
            <text:p text:style-name="Table_20_Contents">God &amp; Church</text:p>
          </table:table-cell>
          <table:table-cell table:style-name="Table4.A1" office:value-type="string">
            <text:p text:style-name="Table_20_Contents">Individual &amp; science</text:p>
          </table:table-cell>
        </table:table-row>
        <table:table-row>
          <table:table-cell table:style-name="Table4.A1" office:value-type="string">
            <text:p text:style-name="Table_20_Contents">Foundation</text:p>
          </table:table-cell>
          <table:table-cell table:style-name="Table4.A1" office:value-type="string">
            <text:p text:style-name="Table_20_Contents">Human reason</text:p>
          </table:table-cell>
          <table:table-cell table:style-name="Table4.A1" office:value-type="string">
            <text:p text:style-name="Table_20_Contents">Faith + reason</text:p>
          </table:table-cell>
          <table:table-cell table:style-name="Table4.A1" office:value-type="string">
            <text:p text:style-name="Table_20_Contents">Scientific reason</text:p>
          </table:table-cell>
        </table:table-row>
        <table:table-row>
          <table:table-cell table:style-name="Table4.A1" office:value-type="string">
            <text:p text:style-name="Table_20_Contents">Source of morality</text:p>
          </table:table-cell>
          <table:table-cell table:style-name="Table4.A1" office:value-type="string">
            <text:p text:style-name="Table_20_Contents">Reason &amp; virtue</text:p>
          </table:table-cell>
          <table:table-cell table:style-name="Table4.A1" office:value-type="string">
            <text:p text:style-name="Table_20_Contents">God's will</text:p>
          </table:table-cell>
          <table:table-cell table:style-name="Table4.A1" office:value-type="string">
            <text:p text:style-name="Table_20_Contents">Duty / consequences</text:p>
          </table:table-cell>
        </table:table-row>
        <table:table-row>
          <table:table-cell table:style-name="Table4.A1" office:value-type="string">
            <text:p text:style-name="Table_20_Contents">Key question</text:p>
          </table:table-cell>
          <table:table-cell table:style-name="Table4.A1" office:value-type="string">
            <text:p text:style-name="Table_20_Contents">What is the good life?</text:p>
          </table:table-cell>
          <table:table-cell table:style-name="Table4.A1" office:value-type="string">
            <text:p text:style-name="Table_20_Contents">What does God will?</text:p>
          </table:table-cell>
          <table:table-cell table:style-name="Table4.A1" office:value-type="string">
            <text:p text:style-name="Table_20_Contents">What is the right action?</text:p>
          </table:table-cell>
        </table:table-row>
        <table:table-row>
          <table:table-cell table:style-name="Table4.A1" office:value-type="string">
            <text:p text:style-name="Table_20_Contents">Key thinkers</text:p>
          </table:table-cell>
          <table:table-cell table:style-name="Table4.A1" office:value-type="string">
            <text:p text:style-name="Table_20_Contents">Socrates, Plato, Aristotle</text:p>
          </table:table-cell>
          <table:table-cell table:style-name="Table4.A1" office:value-type="string">
            <text:p text:style-name="Table_20_Contents">Augustine, Aquinas</text:p>
          </table:table-cell>
          <table:table-cell table:style-name="Table4.A1" office:value-type="string">
            <text:p text:style-name="Table_20_Contents">Hobbes, Hume, Kant, Mill</text:p>
          </table:table-cell>
        </table:table-row>
      </table:table>
      <text:p text:style-name="Horizontal_20_Line"/>
      <text:p text:style-name="Text_20_body"><text:span text:style-name="Strong_20_Emphasis">Relevance to CSE:</text:span></text:p>
      <text:p text:style-name="P3">Classical → Questioning assumptions, virtue in everyday coding practice, balance (Aristotle's Mean) in technology deployment</text:p>
      <text:p text:style-name="P3">Medieval → Natural Law foreshadows modern international cyber law and universal human rights in technology; the idea that ethics is accessible through reason supports secular technology ethics frameworks</text:p>
      <text:p text:style-name="P3">Modern → Kant's Categorical Imperative informs data ethics (user consent, privacy as duty); Mill's Utilitarianism informs cost-benefit analysis in AI deployment and policy; Hobbes' Social Contract theory underpins digital governance and cybersecurity law</text:p>
      <text:p text:style-name="Text_20_body"><text:span text:style-name="Strong_20_Emphasis">Conclusion:</text:span> The three periods collectively form the philosophical heritage of modern CSE ethics. Classical thinkers gave us the questions; medieval thinkers embedded ethics in universal law; modern thinkers gave us the frameworks we still use to answer ethical dilemmas in technology today.</text:p>
      <text:p text:style-name="Horizontal_20_Line"/>
      <text:p text:style-name="Horizontal_20_Line"/>
      <text:h text:style-name="Heading_20_1" text:outline-level="1">🧠 MEMORIZATION GUIDE — How to Remember Everything</text:h>
      <text:p text:style-name="Horizontal_20_Line"/>
      <text:h text:style-name="Heading_20_2" text:outline-level="2"><text:soft-page-break/>STRATEGY 1: The "SPA" Framework for Classical Period</text:h>
      <text:p text:style-name="Text_20_body">Remember the 3 classical philosophers as <text:span text:style-name="Strong_20_Emphasis">SPA:</text:span></text:p>
      <text:p text:style-name="Preformatted_20_Text"><text:span text:style-name="Source_20_Text">S → Socrates <text:s/>→ Self-examination → "Question everything"</text:span></text:p>
      <text:p text:style-name="Preformatted_20_Text"><text:span text:style-name="Source_20_Text">P → Plato <text:s text:c="4"/>→ Perfect Forms <text:s text:c="2"/>→ "The Good is real"</text:span></text:p>
      <text:p text:style-name="P1"><text:span text:style-name="Source_20_Text">A → Aristotle → Activity/Daily <text:s/>→ "Virtue is the Mean"</text:span></text:p>
      <text:p text:style-name="Text_20_body">For each philosopher remember <text:span text:style-name="Strong_20_Emphasis">3 things: Person → Key idea → Famous phrase</text:spa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Person</text:p>
            </table:table-cell>
            <table:table-cell table:style-name="Table5.A1" office:value-type="string">
              <text:p text:style-name="Table_20_Heading">Key Idea</text:p>
            </table:table-cell>
            <table:table-cell table:style-name="Table5.A1" office:value-type="string">
              <text:p text:style-name="Table_20_Heading">Famous Phrase/Concept</text:p>
            </table:table-cell>
          </table:table-row>
        </table:table-header-rows>
        <table:table-row>
          <table:table-cell table:style-name="Table5.A1" office:value-type="string">
            <text:p text:style-name="Table_20_Contents">Socrates</text:p>
          </table:table-cell>
          <table:table-cell table:style-name="Table5.A1" office:value-type="string">
            <text:p text:style-name="Table_20_Contents">Reason + Self-knowledge</text:p>
          </table:table-cell>
          <table:table-cell table:style-name="Table5.A1" office:value-type="string">
            <text:p text:style-name="Table_20_Contents">"Unexamined life..."</text:p>
          </table:table-cell>
        </table:table-row>
        <table:table-row>
          <table:table-cell table:style-name="Table5.A1" office:value-type="string">
            <text:p text:style-name="Table_20_Contents">Plato</text:p>
          </table:table-cell>
          <table:table-cell table:style-name="Table5.A1" office:value-type="string">
            <text:p text:style-name="Table_20_Contents">Forms + The Good</text:p>
          </table:table-cell>
          <table:table-cell table:style-name="Table5.A1" office:value-type="string">
            <text:p text:style-name="Table_20_Contents">"The Republic"</text:p>
          </table:table-cell>
        </table:table-row>
        <table:table-row>
          <table:table-cell table:style-name="Table5.A1" office:value-type="string">
            <text:p text:style-name="Table_20_Contents">Aristotle</text:p>
          </table:table-cell>
          <table:table-cell table:style-name="Table5.A1" office:value-type="string">
            <text:p text:style-name="Table_20_Contents">Virtue as Mean</text:p>
          </table:table-cell>
          <table:table-cell table:style-name="Table5.A1" office:value-type="string">
            <text:p text:style-name="Table_20_Contents">"Nicomachean Ethics"</text:p>
          </table:table-cell>
        </table:table-row>
      </table:table>
      <text:p text:style-name="Horizontal_20_Line"/>
      <text:h text:style-name="Heading_20_2" text:outline-level="2">STRATEGY 2: The "3 C's" for Historical Periods</text:h>
      <text:p text:style-name="Preformatted_20_Text"><text:span text:style-name="Source_20_Text">Classical <text:s/>→ CITIZEN (duty to the city-state)</text:span></text:p>
      <text:p text:style-name="Preformatted_20_Text"><text:span text:style-name="Source_20_Text">Christian <text:s/>→ CHURCH (duty to God) = Medieval</text:span></text:p>
      <text:p text:style-name="P1"><text:span text:style-name="Source_20_Text">Current <text:s text:c="3"/>→ CONSCIENCE (duty to reason/science) = Modern</text:span></text:p>
      <text:p text:style-name="Horizontal_20_Line"/>
      <text:h text:style-name="Heading_20_2" text:outline-level="2">STRATEGY 3: The "K vs M" Shortcut for Modern Period</text:h>
      <text:p text:style-name="Preformatted_20_Text"><text:span text:style-name="Source_20_Text">KANT <text:s/>= K = "Keep the rule" (Duty-based, never break rules)</text:span></text:p>
      <text:p text:style-name="P1"><text:span text:style-name="Source_20_Text">MILL <text:s/>= M = "Measure the result" (Consequence-based, count happiness)</text:span></text:p>
      <text:p text:style-name="Text_20_body">To remember Kant's Categorical Imperative — <text:span text:style-name="Strong_20_Emphasis">"U-H-D":</text:span></text:p>
      <text:list text:style-name="L19">
        <text:list-item>
          <text:p text:style-name="P42"><text:span text:style-name="Strong_20_Emphasis">U</text:span>niversal law — Would it work if everyone did it? </text:p>
        </text:list-item>
        <text:list-item>
          <text:p text:style-name="P42"><text:span text:style-name="Strong_20_Emphasis">H</text:span>umanity as end — Never use people as tools </text:p>
        </text:list-item>
        <text:list-item>
          <text:p text:style-name="P41"><text:span text:style-name="Strong_20_Emphasis">D</text:span>uty gives worth — Intention matters, not result </text:p>
        </text:list-item>
      </text:list>
      <text:p text:style-name="Horizontal_20_Line"/>
      <text:h text:style-name="Heading_20_2" text:outline-level="2">STRATEGY 4: Story Method for Medieval Thinkers</text:h>
      <text:p text:style-name="Text_20_body"><text:span text:style-name="Strong_20_Emphasis">Augustine's Story:</text:span></text:p>
      <text:p text:style-name="Quotations">Augustine was a wild young man who converted to Christianity. He combined his old love of Plato with his new faith → Plato + Christianity = Augustine. He said: "This world is temporary, heaven is real."</text:p>
      <text:p text:style-name="Text_20_body"><text:span text:style-name="Strong_20_Emphasis">Aquinas's Story:</text:span></text:p>
      <text:p text:style-name="Quotations">Aquinas arrived and said "Wait — people forgot Aristotle!" He brought Aristotle back and added Christianity → Aristotle + Christianity = Aquinas. He said: "Reason and faith are friends, not enemies."</text:p>
      <text:p text:style-name="Text_20_body">Memory hook: <text:span text:style-name="Strong_20_Emphasis">"A before Q" = Augustine came before Aquinas (chronologically)</text:span></text:p>
      <text:list text:style-name="L20">
        <text:list-item>
          <text:p text:style-name="P44">Augustine = A = Earlier (354–430) </text:p>
        </text:list-item>
        <text:list-item>
          <text:p text:style-name="P43"><text:soft-page-break/>Aquinas = Q (Thomas aQuinas) = Later (1225–1274) </text:p>
        </text:list-item>
      </text:list>
      <text:p text:style-name="Horizontal_20_Line"/>
      <text:h text:style-name="Heading_20_2" text:outline-level="2">STRATEGY 5: Acronym for CSE Ethical Issues</text:h>
      <text:p text:style-name="Text_20_body">Remember <text:span text:style-name="Strong_20_Emphasis">"DC-SAI-WE"</text:span> (think: "DC's AI world"):</text:p>
      <text:p text:style-name="Preformatted_20_Text"><text:span text:style-name="Source_20_Text">D → Data Privacy &amp; Surveillance</text:span></text:p>
      <text:p text:style-name="Preformatted_20_Text"><text:span text:style-name="Source_20_Text">C → Cybersecurity</text:span></text:p>
      <text:p text:style-name="Preformatted_20_Text"><text:span text:style-name="Source_20_Text">S → Social Media Ethics</text:span></text:p>
      <text:p text:style-name="Preformatted_20_Text"><text:span text:style-name="Source_20_Text">A → AI &amp; Algorithmic Fairness</text:span></text:p>
      <text:p text:style-name="Preformatted_20_Text"><text:span text:style-name="Source_20_Text">I → Intellectual Property</text:span></text:p>
      <text:p text:style-name="Preformatted_20_Text"><text:span text:style-name="Source_20_Text">W → Workplace Ethics</text:span></text:p>
      <text:p text:style-name="P1"><text:span text:style-name="Source_20_Text">E → Environmental Sustainability</text:span></text:p>
      <text:p text:style-name="Horizontal_20_Line"/>
      <text:h text:style-name="Heading_20_2" text:outline-level="2">STRATEGY 6: The "BURN" Method for Exam Day</text:h>
      <text:p text:style-name="Text_20_body">Before writing any answer, quickly write on scratch paper:</text:p>
      <text:p text:style-name="Preformatted_20_Text"><text:span text:style-name="Source_20_Text">B → Background (Which period? Which thinker? Context?)</text:span></text:p>
      <text:p text:style-name="Preformatted_20_Text"><text:span text:style-name="Source_20_Text">U → Understanding (What is the core idea/theory?)</text:span></text:p>
      <text:p text:style-name="Preformatted_20_Text"><text:span text:style-name="Source_20_Text">R → Relevance (How does it connect to CSE/modern world?)</text:span></text:p>
      <text:p text:style-name="P1"><text:span text:style-name="Source_20_Text">N → Now (Give a real-world example)</text:span></text:p>
      <text:p text:style-name="Text_20_body">This ensures every answer has introduction, theory, application, and example — the full 15-mark structure.</text:p>
      <text:p text:style-name="Horizontal_20_Line"/>
      <text:h text:style-name="Heading_20_2" text:outline-level="2">STRATEGY 7: Dates Anchor System</text:h>
      <text:p text:style-name="Text_20_body">Anchor dates to memorable event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Thinker</text:p>
            </table:table-cell>
            <table:table-cell table:style-name="Table6.A1" office:value-type="string">
              <text:p text:style-name="Table_20_Heading">Dates</text:p>
            </table:table-cell>
            <table:table-cell table:style-name="Table6.A1" office:value-type="string">
              <text:p text:style-name="Table_20_Heading">Memory Trick</text:p>
            </table:table-cell>
          </table:table-row>
        </table:table-header-rows>
        <table:table-row>
          <table:table-cell table:style-name="Table6.A1" office:value-type="string">
            <text:p text:style-name="Table_20_Contents">Socrates</text:p>
          </table:table-cell>
          <table:table-cell table:style-name="Table6.A1" office:value-type="string">
            <text:p text:style-name="Table_20_Contents">469–399 BC</text:p>
          </table:table-cell>
          <table:table-cell table:style-name="Table6.A1" office:value-type="string">
            <text:p text:style-name="Table_20_Contents">"4-6-9 = almost like 1-2-3 backwards"</text:p>
          </table:table-cell>
        </table:table-row>
        <table:table-row>
          <table:table-cell table:style-name="Table6.A1" office:value-type="string">
            <text:p text:style-name="Table_20_Contents">Plato</text:p>
          </table:table-cell>
          <table:table-cell table:style-name="Table6.A1" office:value-type="string">
            <text:p text:style-name="Table_20_Contents">427–347 BC</text:p>
          </table:table-cell>
          <table:table-cell table:style-name="Table6.A1" office:value-type="string">
            <text:p text:style-name="Table_20_Contents">"Plato's plate has 4 corners (427)"</text:p>
          </table:table-cell>
        </table:table-row>
        <table:table-row>
          <table:table-cell table:style-name="Table6.A1" office:value-type="string">
            <text:p text:style-name="Table_20_Contents">Aristotle</text:p>
          </table:table-cell>
          <table:table-cell table:style-name="Table6.A1" office:value-type="string">
            <text:p text:style-name="Table_20_Contents">384–322 BC</text:p>
          </table:table-cell>
          <table:table-cell table:style-name="Table6.A1" office:value-type="string">
            <text:p text:style-name="Table_20_Contents">"384 = 3 before 8 before 4"</text:p>
          </table:table-cell>
        </table:table-row>
        <table:table-row>
          <table:table-cell table:style-name="Table6.A1" office:value-type="string">
            <text:p text:style-name="Table_20_Contents">Augustine</text:p>
          </table:table-cell>
          <table:table-cell table:style-name="Table6.A1" office:value-type="string">
            <text:p text:style-name="Table_20_Contents">354–430</text:p>
          </table:table-cell>
          <table:table-cell table:style-name="Table6.A1" office:value-type="string">
            <text:p text:style-name="Table_20_Contents">"Augustine came after Rome fell (430 AD = Rome falls)"</text:p>
          </table:table-cell>
        </table:table-row>
        <table:table-row>
          <table:table-cell table:style-name="Table6.A1" office:value-type="string">
            <text:p text:style-name="Table_20_Contents">Aquinas</text:p>
          </table:table-cell>
          <table:table-cell table:style-name="Table6.A1" office:value-type="string">
            <text:p text:style-name="Table_20_Contents">1225–1274</text:p>
          </table:table-cell>
          <table:table-cell table:style-name="Table6.A1" office:value-type="string">
            <text:p text:style-name="Table_20_Contents">"12 hundred" — Medieval middle</text:p>
          </table:table-cell>
        </table:table-row>
        <table:table-row>
          <table:table-cell table:style-name="Table6.A1" office:value-type="string">
            <text:p text:style-name="Table_20_Contents">Hobbes</text:p>
          </table:table-cell>
          <table:table-cell table:style-name="Table6.A1" office:value-type="string">
            <text:p text:style-name="Table_20_Contents">1588–1679</text:p>
          </table:table-cell>
          <table:table-cell table:style-name="Table6.A1" office:value-type="string">
            <text:p text:style-name="Table_20_Contents">"1588 = Spanish Armada year — easy anchor"</text:p>
          </table:table-cell>
        </table:table-row>
        <table:table-row>
          <table:table-cell table:style-name="Table6.A1" office:value-type="string">
            <text:p text:style-name="Table_20_Contents">Kant</text:p>
          </table:table-cell>
          <table:table-cell table:style-name="Table6.A1" office:value-type="string">
            <text:p text:style-name="Table_20_Contents">1724–1804</text:p>
          </table:table-cell>
          <table:table-cell table:style-name="Table6.A1" office:value-type="string">
            <text:p text:style-name="Table_20_Contents">"Kant CAN'T be remembered — 1-7-2-4, just memorize"</text:p>
          </table:table-cell>
        </table:table-row>
        <table:table-row>
          <table:table-cell table:style-name="Table6.A1" office:value-type="string">
            <text:p text:style-name="Table_20_Contents">Mill</text:p>
          </table:table-cell>
          <table:table-cell table:style-name="Table6.A1" office:value-type="string">
            <text:p text:style-name="Table_20_Contents">1806–1873</text:p>
          </table:table-cell>
          <table:table-cell table:style-name="Table6.A1" office:value-type="string">
            <text:p text:style-name="Table_20_Contents">"Mill ran in the 1800s"</text:p>
          </table:table-cell>
        </table:table-row>
      </table:table>
      <text:p text:style-name="Horizontal_20_Line"/>
      <text:h text:style-name="Heading_20_2" text:outline-level="2">STRATEGY 8: One-Line Summaries (Perfect for Quick Revision)</text:h>
      <text:p text:style-name="Text_20_body">Write these on a small card and read before sleeping:</text:p>
      <text:p text:style-name="Quotations"><text:span text:style-name="Strong_20_Emphasis">Socrates:</text:span> "Question everything with reason — the unexamined life is not worth living."</text:p>
      <text:p text:style-name="Quotations"><text:soft-page-break/><text:span text:style-name="Strong_20_Emphasis">Plato:</text:span> "The highest reality is The Good — pursue it through intellect, not pleasure."</text:p>
      <text:p text:style-name="Quotations"><text:span text:style-name="Strong_20_Emphasis">Aristotle:</text:span> "Virtue is the mean — ethics lives in daily life, not abstract ideals."</text:p>
      <text:p text:style-name="Quotations"><text:span text:style-name="Strong_20_Emphasis">Augustine:</text:span> "Reason gives earthly good; faith gives eternal good — this life is only preparation."</text:p>
      <text:p text:style-name="Quotations"><text:span text:style-name="Strong_20_Emphasis">Aquinas:</text:span> "Reason and faith are in harmony — Natural Law is God's law written in our hearts."</text:p>
      <text:p text:style-name="Quotations"><text:span text:style-name="Strong_20_Emphasis">Hobbes:</text:span> "Humans are self-interested — only social contract and sovereign authority create morality."</text:p>
      <text:p text:style-name="Quotations"><text:span text:style-name="Strong_20_Emphasis">Kant:</text:span> "Act from duty — treat humans as ends, follow universal law, let Good Will guide you."</text:p>
      <text:p text:style-name="Quotations"><text:span text:style-name="Strong_20_Emphasis">Mill:</text:span> "Judge by consequences — the greatest happiness for the greatest number is the moral goal."</text:p>
      <text:p text:style-name="Horizontal_20_Line"/>
      <text:h text:style-name="Heading_20_1" text:outline-level="1">QUESTION <text:span text:style-name="T3">6</text:span></text:h>
      <text:h text:style-name="Heading_20_2" text:outline-level="2">"What is Ethics? Discuss its key definitions, origin, and significance."</text:h>
      <text:p text:style-name="Horizontal_20_Line"/>
      <text:h text:style-name="Heading_20_3" text:outline-level="3">PART A: The Concept and Definitions of Ethics</text:h>
      <text:p text:style-name="Text_20_body"><text:span text:style-name="Strong_20_Emphasis">Origin of the Word:</text:span> The word "Ethics" derives from the Greek word <text:span text:style-name="Strong_20_Emphasis">'Ethos'</text:span>, which means "the characteristic spirit or attributes of a community, people, or system." From this root, ethics developed into a formal academic discipline concerned with understanding the moral dimensions of human life and conduct.</text:p>
      <text:p text:style-name="Text_20_body"><text:span text:style-name="Strong_20_Emphasis">Core Definition:</text:span> Ethics is the <text:span text:style-name="Strong_20_Emphasis">systematic study of what is morally right and wrong, good and bad, fair and unfair.</text:span> It provides principles to guide human behavior, social interaction, and professional practice. In the academic journey — especially in sociology and engineering — ethics helps students understand how decisions impact individuals and society.</text:p>
      <text:p text:style-name="Text_20_body"><text:span text:style-name="Strong_20_Emphasis">Four Key Definitions of Ethics:</text:span></text:p>
      <text:p text:style-name="Text_20_body"><text:span text:style-name="Strong_20_Emphasis">Definition 1 — Ethics as a set of moral principles:</text:span> Ethics is a collection of moral principles that guide human conduct. These principles distinguish acceptable behavior from unacceptable behavior in a given community or profession. They are not merely personal preferences but structured, reasoned standards.</text:p>
      <text:p text:style-name="Text_20_body"><text:span text:style-name="Strong_20_Emphasis">Definition 2 — Ethics as the art of human living:</text:span> Ethics is described as "the art of human living" — meaning it is not simply a theoretical subject but a practical guide for how to live well, make good decisions, and interact justly with others in everyday life.</text:p>
      <text:p text:style-name="Text_20_body"><text:soft-page-break/><text:span text:style-name="Strong_20_Emphasis">Definition 3 — Ethics as the formation of good character:</text:span> Ethics intends to form good men and women. The ultimate purpose of ethical study and practice is character formation — developing individuals who consistently choose what is right, not because they are forced to, but because they have internalized moral values.</text:p>
      <text:p text:style-name="Text_20_body"><text:span text:style-name="Strong_20_Emphasis">Definition 4 — Ethics as systematic analysis of morality:</text:span> Ethics is the scientific evolvement and demonstration of morality — meaning it applies rigorous, systematic analysis to moral questions rather than relying on intuition, tradition, or emotion alone.</text:p>
      <text:p text:style-name="Text_20_body"><text:span text:style-name="Strong_20_Emphasis">The End Goal of Ethics:</text:span> The final product of ethical development should be <text:span text:style-name="Strong_20_Emphasis">ease in being a good person in every circumstance</text:span> — a person who does not struggle to choose right from wrong but acts morally as a matter of character and habit.</text:p>
      <text:p text:style-name="Horizontal_20_Line"/>
      <text:p text:style-name="Text_20_body"><text:span text:style-name="Strong_20_Emphasis">What Ethics Studies:</text:span> Ethics provides principles to guide:</text:p>
      <text:list text:style-name="L21">
        <text:list-item>
          <text:p text:style-name="P46">Human behavior in personal life </text:p>
        </text:list-item>
        <text:list-item>
          <text:p text:style-name="P46">Social interaction in community </text:p>
        </text:list-item>
        <text:list-item>
          <text:p text:style-name="P45">Professional practice in careers </text:p>
        </text:list-item>
      </text:list>
      <text:p text:style-name="Text_20_body">In the academic context, particularly in engineering and sociology, ethics helps students understand:</text:p>
      <text:list text:style-name="L22">
        <text:list-item>
          <text:p text:style-name="P48">How decisions impact individuals and society </text:p>
        </text:list-item>
        <text:list-item>
          <text:p text:style-name="P48">What responsibilities professionals carry </text:p>
        </text:list-item>
        <text:list-item>
          <text:p text:style-name="P48">Why moral reasoning matters in modern life </text:p>
        </text:list-item>
        <text:list-item>
          <text:p text:style-name="P47">How social norms shape our sense of right and wrong </text:p>
        </text:list-item>
      </text:list>
      <text:p text:style-name="Horizontal_20_Line"/>
      <text:p text:style-name="Text_20_body"><text:span text:style-name="Strong_20_Emphasis">What Ethics Is NOT:</text:span> Ethics is not simply following laws — laws set minimum standards, but ethics demands higher reflection. Ethics is not merely cultural custom — customs vary, but ethical reasoning seeks universal principles. Ethics is not emotion alone — while feelings matter, ethics requires reason and analysis.</text:p>
      <text:p text:style-name="Horizontal_20_Line"/>
      <text:h text:style-name="Heading_20_3" text:outline-level="3">PART B: Significance of Ethics in CSE</text:h>
      <text:p text:style-name="Text_20_body">Understanding what ethics is becomes especially critical in Computer Science and Engineering, because CSE now shapes nearly every sector — education, communication, health, finance, public governance, surveillance, and even warfare.</text:p>
      <text:p text:style-name="Text_20_body"><text:span text:style-name="Strong_20_Emphasis">Why Ethics matters in CSE:</text:span></text:p>
      <text:p text:style-name="Text_20_body">Ethics is <text:span text:style-name="Strong_20_Emphasis">not optional</text:span> — it is core to the identity of a responsible engineer. Ethical literacy helps future engineers:</text:p>
      <text:list text:style-name="L23">
        <text:list-item>
          <text:p text:style-name="P50">Understand the societal impact of their work </text:p>
        </text:list-item>
        <text:list-item>
          <text:p text:style-name="P50">Identify harms and unintended consequences before they occur </text:p>
        </text:list-item>
        <text:list-item>
          <text:p text:style-name="P50">Make decisions that protect people, organizations, and the environment </text:p>
        </text:list-item>
        <text:list-item>
          <text:p text:style-name="P49">Build public trust in technology </text:p>
        </text:list-item>
      </text:list>
      <text:p text:style-name="Text_20_body"><text:soft-page-break/>Without a clear understanding of what ethics is and why it matters, a CSE professional becomes a technically skilled but morally unguided force — capable of immense harm despite good intentions.</text:p>
      <text:p text:style-name="Text_20_body"><text:span text:style-name="Emphasis">Example:</text:span> The Cambridge Analytica scandal demonstrated what happens when engineers build powerful data tools without understanding ethics — 50 million Facebook users' data was harvested and used to manipulate elections. The engineers involved were technically skilled but ethically unaware.</text:p>
      <text:p text:style-name="Text_20_body"><text:span text:style-name="Emphasis">Example in Bangladesh:</text:span> Over 5 crore Bangladeshi citizens' personal data was exposed online due to poor security practices — a direct result of engineers not understanding their ethical responsibility to protect user data.</text:p>
      <text:p text:style-name="Text_20_body"><text:span text:style-name="Strong_20_Emphasis">Conclusion:</text:span> Ethics is the foundation of responsible human life and professional practice. For CSE students, understanding what ethics is — its origin, its definitions, and its goals — is the first step toward becoming engineers who build technology that serves rather than harms humanity. As the definition states: the end product of ethics should be ease in being a good person in every circumstance — including every professional circumstance an engineer faces.</text:p>
      <text:p text:style-name="Horizontal_20_Line"/>
      <text:h text:style-name="Heading_20_1" text:outline-level="1">QUESTION <text:span text:style-name="T3">7</text:span></text:h>
      <text:h text:style-name="Heading_20_2" text:outline-level="2">"How can CSE professionals contribute ethically to social development in Bangladesh? Reflect on issues such as digital divide, data privacy, social media use, and automation."</text:h>
      <text:p text:style-name="Horizontal_20_Line"/>
      <text:h text:style-name="Heading_20_3" text:outline-level="3">PART A: Ethical Issues Relevant to Bangladesh's Social Development</text:h>
      <text:p text:style-name="Text_20_body">Bangladesh is a rapidly digitalizing nation. While technology offers enormous opportunity — mobile banking, e-government, digital education — it also brings serious ethical challenges that CSE professionals are uniquely positioned to address. Understanding these issues is the foundation for ethical contribution.</text:p>
      <text:p text:style-name="Text_20_body"><text:span text:style-name="Strong_20_Emphasis">Issue 1 — Digital Divide:</text:span> The digital divide refers to the gap between those who have access to digital technology and those who do not — divided along lines of income, geography, gender, and education. In Bangladesh, this divide is particularly stark between urban centers like Dhaka and rural areas, and between men and women.</text:p>
      <text:p text:style-name="Text_20_body"><text:span text:style-name="Strong_20_Emphasis">Issue 2 — Data Privacy:</text:span> Bangladesh has experienced severe data privacy failures. In 2023, over 5 crore (50 million) Bangladeshi citizens' personal data — including NID information — was found exposed online due to inadequate security in government systems. This represents a massive ethical failure in data handling.</text:p>
      <text:p text:style-name="Text_20_body"><text:span text:style-name="Strong_20_Emphasis">Issue 3 — Social Media Use:</text:span> Social media platforms like Facebook are widely used in Bangladesh but have been implicated in the spread of misinformation, hate speech, and communal violence. Algorithmic amplification of outrage content has real-world consequences in the Bangladeshi social context.</text:p>
      <text:p text:style-name="Text_20_body"><text:soft-page-break/><text:span text:style-name="Strong_20_Emphasis">Issue 4 — Automation:</text:span> As automation increasingly enters Bangladesh's garment sector — the backbone of its economy — millions of low-skilled workers, predominantly women, face the threat of job displacement. The ethical implications of deploying automation without social safety nets are profound.</text:p>
      <text:p text:style-name="Horizontal_20_Line"/>
      <text:h text:style-name="Heading_20_3" text:outline-level="3">PART B: How CSE Professionals Can Contribute Ethically</text:h>
      <text:p text:style-name="Text_20_body"><text:span text:style-name="Strong_20_Emphasis">1. Bridging the Digital Divide:</text:span></text:p>
      <text:p text:style-name="Text_20_body">CSE professionals can contribute by designing technology that is <text:span text:style-name="Strong_20_Emphasis">inclusive by default</text:span> — accessible to low-income users, available in Bangla, and functional on low-end devices with limited connectivity.</text:p>
      <text:p text:style-name="Text_20_body">Ethical contributions include:</text:p>
      <text:list text:style-name="L24">
        <text:list-item>
          <text:p text:style-name="P52">Developing <text:span text:style-name="Strong_20_Emphasis">low-bandwidth applications</text:span> for rural users </text:p>
        </text:list-item>
        <text:list-item>
          <text:p text:style-name="P52">Creating <text:span text:style-name="Strong_20_Emphasis">Bangla-language digital content</text:span> and interfaces to reduce language barriers </text:p>
        </text:list-item>
        <text:list-item>
          <text:p text:style-name="P52">Building <text:span text:style-name="Strong_20_Emphasis">affordable tech solutions</text:span> for small farmers, rural health workers, and local entrepreneurs </text:p>
        </text:list-item>
        <text:list-item>
          <text:p text:style-name="P51">Advocating for <text:span text:style-name="Strong_20_Emphasis">universal internet access</text:span> as a social right </text:p>
        </text:list-item>
      </text:list>
      <text:p text:style-name="Text_20_body"><text:span text:style-name="Emphasis">Example:</text:span> bKash — a Bangladeshi mobile financial service — extended financial services to millions of unbanked citizens. CSE professionals who built bKash with accessibility in mind contributed directly to financial inclusion and social development.</text:p>
      <text:p text:style-name="Text_20_body"><text:span text:style-name="Strong_20_Emphasis">2. Protecting Data Privacy:</text:span></text:p>
      <text:p text:style-name="Text_20_body">CSE professionals must treat data protection as an ethical duty, not merely a regulatory requirement. In Bangladesh, where data protection legislation is still developing, engineers must be proactive.</text:p>
      <text:p text:style-name="Text_20_body">Ethical contributions include:</text:p>
      <text:list text:style-name="L25">
        <text:list-item>
          <text:p text:style-name="P54">Designing systems with <text:span text:style-name="Strong_20_Emphasis">privacy by design</text:span> — building protection into architecture from the start, not adding it later </text:p>
        </text:list-item>
        <text:list-item>
          <text:p text:style-name="P54">Implementing <text:span text:style-name="Strong_20_Emphasis">strong encryption</text:span> and <text:span text:style-name="Strong_20_Emphasis">access controls</text:span> for systems handling citizens' data </text:p>
        </text:list-item>
        <text:list-item>
          <text:p text:style-name="P54">Advocating for <text:span text:style-name="Strong_20_Emphasis">informed consent mechanisms</text:span> — ensuring citizens know what data is collected and how it is used </text:p>
        </text:list-item>
        <text:list-item>
          <text:p text:style-name="P53">Reporting data vulnerabilities through proper channels rather than ignoring them </text:p>
        </text:list-item>
      </text:list>
      <text:p text:style-name="Text_20_body"><text:span text:style-name="Emphasis">Example:</text:span> The 2023 Bangladeshi data breach could have been prevented if the engineers who built the government database had implemented basic security standards and conducted regular vulnerability testing. CSE professionals who understand their ethical responsibility would have raised alarms before public exposure.</text:p>
      <text:p text:style-name="Text_20_body"><text:span text:style-name="Strong_20_Emphasis">3. Responsible Social Media Design and Use:</text:span></text:p>
      <text:p text:style-name="Text_20_body">CSE professionals working on platforms used in Bangladesh — or building local platforms — have an ethical responsibility to prevent their systems from becoming tools of division and violence.</text:p>
      <text:p text:style-name="Text_20_body">Ethical contributions include:</text:p>
      <text:list text:style-name="L26">
        <text:list-item>
          <text:p text:style-name="P56"><text:soft-page-break/>Designing <text:span text:style-name="Strong_20_Emphasis">content moderation systems</text:span> sensitive to the Bangladeshi social and political context </text:p>
        </text:list-item>
        <text:list-item>
          <text:p text:style-name="P56">Building <text:span text:style-name="Strong_20_Emphasis">fact-checking integrations</text:span> to slow the spread of misinformation </text:p>
        </text:list-item>
        <text:list-item>
          <text:p text:style-name="P56">Avoiding algorithmic designs that prioritize engagement over truth — echo chambers and polarization must be actively countered </text:p>
        </text:list-item>
        <text:list-item>
          <text:p text:style-name="P55">Collaborating with civil society organizations to understand how platforms are being misused </text:p>
        </text:list-item>
      </text:list>
      <text:p text:style-name="Text_20_body"><text:span text:style-name="Emphasis">Example:</text:span> During periods of communal tension in Bangladesh, Facebook has been used to spread false information that triggered real-world violence. CSE professionals who understand social media ethics could design algorithmic safeguards that reduce the viral spread of unverified content in sensitive periods.</text:p>
      <text:p text:style-name="Text_20_body"><text:span text:style-name="Strong_20_Emphasis">4. Ethical Automation:</text:span></text:p>
      <text:p text:style-name="Text_20_body">As automation enters Bangladesh's industrial sectors, CSE professionals must balance technological efficiency with human welfare.</text:p>
      <text:p text:style-name="Text_20_body">Ethical contributions include:</text:p>
      <text:list text:style-name="L27">
        <text:list-item>
          <text:p text:style-name="P58">Conducting <text:span text:style-name="Strong_20_Emphasis">social impact assessments</text:span> before deploying automation in labor-intensive sectors </text:p>
        </text:list-item>
        <text:list-item>
          <text:p text:style-name="P58">Designing automation systems that <text:span text:style-name="Strong_20_Emphasis">augment rather than replace</text:span> human workers where possible </text:p>
        </text:list-item>
        <text:list-item>
          <text:p text:style-name="P58">Collaborating with policymakers to design <text:span text:style-name="Strong_20_Emphasis">reskilling and retraining programs</text:span> for displaced workers </text:p>
        </text:list-item>
        <text:list-item>
          <text:p text:style-name="P57">Refusing to deploy automation systems that disproportionately harm marginalized groups — particularly women in the garment sector — without adequate social protection </text:p>
        </text:list-item>
      </text:list>
      <text:p text:style-name="Text_20_body"><text:span text:style-name="Emphasis">Example:</text:span> A CSE professional designing an automated quality control system for a garment factory should simultaneously advocate for worker retraining programs so that displaced workers can move into operating or maintaining the new systems rather than simply losing their livelihoods.</text:p>
      <text:p text:style-name="Horizontal_20_Line"/>
      <text:p text:style-name="Text_20_body"><text:span text:style-name="Strong_20_Emphasis">Conclusion:</text:span> CSE professionals in Bangladesh carry a unique responsibility at the intersection of technology and social development. Their technical skills give them the power to either deepen inequality or dismantle it, to either expose citizens to harm or protect them. Ethical contribution requires more than technical competence — it requires social awareness, moral courage, and a commitment to the public good. As ethics teaches us: the goal of moral life is ease in doing good in every circumstance — and for CSE professionals in Bangladesh, that means building technology that uplifts society rather than exploits it.</text:p>
      <text:p text:style-name="Horizontal_20_Line"/>
      <text:h text:style-name="Heading_20_1" text:outline-level="1"><text:soft-page-break/>QUESTION <text:span text:style-name="T3">8</text:span></text:h>
      <text:h text:style-name="Heading_20_2" text:outline-level="2">"What is Kant's Categorical Imperative? Explain its three formulations and discuss its relevance to CSE ethics."</text:h>
      <text:p text:style-name="Horizontal_20_Line"/>
      <text:h text:style-name="Heading_20_3" text:outline-level="3">PART A: Kant's Ethical Philosophy and the Categorical Imperative</text:h>
      <text:p text:style-name="Text_20_body"><text:span text:style-name="Strong_20_Emphasis">Background — Immanuel Kant (1724–1804):</text:span> Immanuel Kant is considered the basis of modern ethical discussion. He belongs to the Modern Period of ethical thought (1500–present), during which individual reasoning and scientific thinking replaced theological authority as the foundation of ethics. <text:span text:style-name="T2">Kant's ethical theory is called </text:span><text:span text:style-name="Strong_20_Emphasis"><text:span text:style-name="T2">Deontology</text:span></text:span><text:span text:style-name="T2"> — from the Greek </text:span><text:span text:style-name="Emphasis"><text:span text:style-name="T2">deon</text:span></text:span><text:span text:style-name="T2"> meaning duty.</text:span></text:p>
      <text:p text:style-name="Text_20_body"><text:span text:style-name="Strong_20_Emphasis">Core Foundations of Kant's Ethics:</text:span></text:p>
      <text:p text:style-name="Text_20_body">Kant argued that morality must be grounded in <text:span text:style-name="Strong_20_Emphasis">pure reason</text:span>, not in emotion, tradition, or consequences. He believed that:</text:p>
      <text:list text:style-name="L28">
        <text:list-item>
          <text:p text:style-name="P60"><text:span text:style-name="Strong_20_Emphasis">"Good Will"</text:span> is the only thing that is unconditionally good. An action has moral worth only when it is done out of duty — from a good will — not from inclination, desire, or self-interest. </text:p>
        </text:list-item>
        <text:list-item>
          <text:p text:style-name="P60">Happiness will be achieved through reason — not through the pursuit of pleasure or emotional satisfaction. </text:p>
        </text:list-item>
        <text:list-item>
          <text:p text:style-name="P60">In a civilized society, human beings are <text:span text:style-name="Strong_20_Emphasis">rational beings</text:span> — and this rationality is the basis of their dignity and moral standing. </text:p>
        </text:list-item>
        <text:list-item>
          <text:p text:style-name="P59">Natural law operates as <text:span text:style-name="Strong_20_Emphasis">categorical imperativeness</text:span> — absolute moral commands that apply universally, without exception. </text:p>
        </text:list-item>
      </text:list>
      <text:p text:style-name="Text_20_body"><text:span text:style-name="Strong_20_Emphasis">What is the Categorical Imperative?</text:span> The Categorical Imperative is Kant's supreme principle of morality — a universal moral law derived from reason that applies to all rational beings in all situations, without condition or exception. It is "categorical" because it commands unconditionally — unlike a "hypothetical imperative" which says "do X if you want Y," the Categorical Imperative says "do X — full stop."</text:p>
      <text:p text:style-name="Horizontal_20_Line"/>
      <text:p text:style-name="Text_20_body"><text:span text:style-name="Strong_20_Emphasis">The Three Formulations of the Categorical Imperative:</text:span></text:p>
      <text:p text:style-name="Text_20_body"><text:span text:style-name="Strong_20_Emphasis">Formulation 1 — The Universal Law:</text:span> <text:span text:style-name="Emphasis">"Act only according to that maxim by which you can at the same time will that it should become a universal law."</text:span></text:p>
      <text:p text:style-name="Text_20_body">Before acting, ask: "What if everyone in the world did exactly what I am about to do?" If the world would collapse morally or practically, then the action is wrong. If it would function perfectly, then the action is permissible.</text:p>
      <text:p text:style-name="Text_20_body">Example: If I am considering lying — ask: "What if everyone lied all the time?" Communication would break down, trust would disappear, and society would collapse. Therefore lying is categorically wrong, regardless of convenience or outcome.</text:p>
      <text:p text:style-name="Text_20_body"><text:soft-page-break/><text:span text:style-name="Strong_20_Emphasis">Formulation 2 — Humanity as End:</text:span> <text:span text:style-name="Emphasis">"Act so that you treat humanity, whether in your own person or in that of another, always as an end and never as a means only."</text:span></text:p>
      <text:p text:style-name="Text_20_body">Human beings have intrinsic dignity and worth — they must never be treated merely as instruments or tools for achieving someone else's goals. Every person is an end in themselves.</text:p>
      <text:p text:style-name="Text_20_body">Example: Using someone's emotional vulnerability to sell them a product they do not need treats them as a means to profit — this violates their dignity as a rational being.</text:p>
      <text:p text:style-name="Text_20_body"><text:span text:style-name="Strong_20_Emphasis">Formulation 3 — Duty Gives Moral Worth:</text:span> The moral worth of an action comes entirely from the <text:span text:style-name="Strong_20_Emphasis">duty and intention</text:span> behind it — not from the result it produces. A person who tells the truth only because it is convenient acts from self-interest. A person who tells the truth because it is their duty acts morally, even if the outcome is painful.</text:p>
      <text:p text:style-name="Horizontal_20_Line"/>
      <text:h text:style-name="Heading_20_3" text:outline-level="3">PART B: Relevance of Kant's Categorical Imperative to CSE Ethics</text:h>
      <text:p text:style-name="Text_20_body">Kant's Categorical Imperative provides CSE with <text:span text:style-name="Strong_20_Emphasis">absolute ethical boundaries</text:span> — non-negotiable rules that protect human dignity regardless of business pressure, technical capability, or expected outcomes.</text:p>
      <text:p text:style-name="Text_20_body"><text:span text:style-name="Strong_20_Emphasis">Formulation 1 — Universal Law in CSE:</text:span></text:p>
      <text:p text:style-name="Text_20_body">Ask: "What if every CSE professional did what I am about to do?"</text:p>
      <text:list text:style-name="L29">
        <text:list-item>
          <text:p text:style-name="P62">If every engineer collected user data without consent — the entire digital ecosystem would collapse. No one would trust any platform. Therefore, unauthorized data collection is categorically wrong. </text:p>
        </text:list-item>
        <text:list-item>
          <text:p text:style-name="P62">If every developer introduced backdoors into security systems "just to see if it works" — cybersecurity would be universally compromised. Therefore, this is categorically impermissible. </text:p>
        </text:list-item>
        <text:list-item>
          <text:p text:style-name="P61">If every company sold user data to the highest bidder — users would be permanently exposed to manipulation. Therefore, selling personal data without explicit consent violates the Universal Law. </text:p>
        </text:list-item>
      </text:list>
      <text:p text:style-name="Text_20_body"><text:span text:style-name="Strong_20_Emphasis">Formulation 2 — Humanity as End in CSE:</text:span></text:p>
      <text:p text:style-name="Text_20_body">Users are not data points. Citizens are not revenue streams. Communities are not test subjects.</text:p>
      <text:list text:style-name="L30">
        <text:list-item>
          <text:p text:style-name="P64"><text:span text:style-name="Strong_20_Emphasis">Social media design:</text:span> Designing algorithms that exploit psychological vulnerabilities — fear, outrage, loneliness — to maximize engagement treats users as means to profit. This is a categorical violation of human dignity. </text:p>
        </text:list-item>
        <text:list-item>
          <text:p text:style-name="P64"><text:span text:style-name="Strong_20_Emphasis">AI systems:</text:span> Using communities of color as test subjects for facial recognition without their knowledge or consent — as happened with several US police departments — treats those communities as means, not ends. </text:p>
        </text:list-item>
        <text:list-item>
          <text:p text:style-name="P63"><text:span text:style-name="Strong_20_Emphasis">Targeted advertising:</text:span> Harvesting intimate personal data to manipulate purchasing decisions exploits human rationality rather than respecting it. </text:p>
        </text:list-item>
      </text:list>
      <text:p text:style-name="Text_20_body"><text:span text:style-name="Emphasis">Example:</text:span> Cambridge Analytica used psychological profiling to manipulate voters' political behavior without their knowledge — treating 50 million people as means to a political end. This is one of the clearest Kantian violations in the history of technology ethics.</text:p>
      <text:p text:style-name="Text_20_body"><text:soft-page-break/><text:span text:style-name="Strong_20_Emphasis">Formulation 3 — Duty in CSE:</text:span></text:p>
      <text:p text:style-name="Text_20_body">Engineers must build ethical systems because it is <text:span text:style-name="Strong_20_Emphasis">the right thing to do</text:span> — not because regulations demand it, not because a manager requires it, and not because a data breach would be bad publicity.</text:p>
      <text:list text:style-name="L31">
        <text:list-item>
          <text:p text:style-name="P66">A security engineer who writes robust encryption code because they believe in protecting users' right to privacy is acting from duty — this has moral worth. </text:p>
        </text:list-item>
        <text:list-item>
          <text:p text:style-name="P66">A security engineer who writes the same code only because their company will be fined for non-compliance is acting from self-interest — same technical output, but no moral worth. </text:p>
        </text:list-item>
        <text:list-item>
          <text:p text:style-name="P65">Whistleblowing — reporting unethical practices within one's organization — is a duty under Kantian ethics, even when it is personally costly. </text:p>
        </text:list-item>
      </text:list>
      <text:p text:style-name="Text_20_body"><text:span text:style-name="Strong_20_Emphasis">Conclusion:</text:span> Kant's Categorical Imperative gives CSE professionals a powerful ethical compass. It reminds them that some actions are simply wrong — not because they produce bad outcomes, but because they violate the rational dignity of human beings. In a field where technical capability often runs far ahead of ethical reflection, Kantian ethics provides the non-negotiable boundaries that protect humanity from technological exploitation.</text:p>
      <text:p text:style-name="Horizontal_20_Line"/>
      <text:h text:style-name="Heading_20_1" text:outline-level="1">QUESTION <text:span text:style-name="T3">9</text:span></text:h>
      <text:h text:style-name="Heading_20_2" text:outline-level="2">"Discuss Aquinas's Natural Law Theory and its significance in the history of ethics. How does it remain relevant today?"</text:h>
      <text:p text:style-name="Horizontal_20_Line"/>
      <text:h text:style-name="Heading_20_3" text:outline-level="3">PART A: St. Thomas Aquinas and the Natural Law Theory</text:h>
      <text:p text:style-name="Text_20_body"><text:span text:style-name="Strong_20_Emphasis">Background — St. Thomas Aquinas (1225–1274):</text:span> St. Thomas Aquinas is the second and most philosophically sophisticated thinker of the Medieval Period of ethical thought (500–1500 AD). The Medieval Period was defined by the dominance of Christianity across Europe, where ethics was understood primarily as obedience to God's will as set forth in the Bible and interpreted by the Church.</text:p>
      <text:p text:style-name="Text_20_body">Aquinas's greatest works were <text:span text:style-name="Strong_20_Emphasis">Summa Theologica</text:span> and <text:span text:style-name="Strong_20_Emphasis">Summa Contra Gentes</text:span> — comprehensive attempts to demonstrate the harmony between Aristotelian reason and Christian faith.</text:p>
      <text:p text:style-name="Text_20_body"><text:span text:style-name="Strong_20_Emphasis">The Historical Context of Aquinas's Achievement:</text:span> In the early Medieval Period, St. Augustine's Platonic-Christian system dominated ethical thought, and Aristotle had been largely forgotten in Western Europe. Aquinas <text:span text:style-name="Strong_20_Emphasis">rediscovered Aristotle</text:span>, Christianized his philosophy, and made it the philosophical basis of the later Middle Ages. This was a pivotal intellectual achievement.</text:p>
      <text:p text:style-name="Horizontal_20_Line"/>
      <text:p text:style-name="Text_20_body"><text:span text:style-name="Strong_20_Emphasis">The Natural Law Theory:</text:span></text:p>
      <text:p text:style-name="Text_20_body"><text:span text:style-name="T5">Aquinas's central contribution is his </text:span><text:span text:style-name="Strong_20_Emphasis"><text:span text:style-name="T5">Natural Law Theory</text:span></text:span><text:span text:style-name="T5"> — the idea that God's eternal moral law is not only found in Scripture but is also </text:span><text:span text:style-name="Strong_20_Emphasis"><text:span text:style-name="T5">written in the heart of every human being</text:span></text:span><text:span text:style-name="T5"> and can be discovered through reason and cultivated through conscience.</text:span></text:p>
      <text:p text:style-name="Text_20_body"><text:soft-page-break/>This means:</text:p>
      <text:list text:style-name="L32">
        <text:list-item>
          <text:p text:style-name="P68">Moral truth is <text:span text:style-name="Strong_20_Emphasis">universally accessible</text:span> — not only to Christians or those who have read the Bible, but to all rational human beings </text:p>
        </text:list-item>
        <text:list-item>
          <text:p text:style-name="P68">Reason is a valid and reliable path to moral knowledge </text:p>
        </text:list-item>
        <text:list-item>
          <text:p text:style-name="P67">Conscience is the faculty through which natural law is recognized and applied in daily life </text:p>
        </text:list-item>
      </text:list>
      <text:p text:style-name="Horizontal_20_Line"/>
      <text:p text:style-name="Text_20_body"><text:span text:style-name="Strong_20_Emphasis">The Two Dimensions of Ethics (Aquinas):</text:span></text:p>
      <text:p text:style-name="Text_20_body">Aquinas taught that ethics has <text:span text:style-name="Strong_20_Emphasis">two dimensions</text:span> — the natural and the theological — which are complementary, not contradictory:</text:p>
      <text:p text:style-name="Text_20_body"><text:span text:style-name="Strong_20_Emphasis">Dimension 1 — Natural Ethics:</text:span> Natural ethics, as detailed by Aristotle, consists of the <text:span text:style-name="Strong_20_Emphasis">development of reason and practice in living morally</text:span>. It leads to <text:span text:style-name="Strong_20_Emphasis">earthly happiness</text:span>. This dimension is accessible to all people through reason alone — no special revelation or religious belief is required.</text:p>
      <text:p text:style-name="Text_20_body"><text:span text:style-name="Strong_20_Emphasis">Dimension 2 — Theological Ethics:</text:span> Theological ethics consists of achieving the virtues of <text:span text:style-name="Strong_20_Emphasis">faith, hope, and charity</text:span> through God's grace. It leads to <text:span text:style-name="Strong_20_Emphasis">eternal life with God</text:span>. This dimension goes beyond what reason alone can achieve.</text:p>
      <text:p text:style-name="Text_20_body"><text:span text:style-name="Strong_20_Emphasis">The Relationship Between the Two:</text:span> Aquinas demonstrated that natural ethics and theological ethics are not in conflict — they are <text:span text:style-name="Strong_20_Emphasis">complementary levels of the same moral reality.</text:span> Reason and faith are in harmony. This was a revolutionary claim in an age when many believed that secular knowledge was dangerous to faith.</text:p>
      <text:p text:style-name="Horizontal_20_Line"/>
      <text:p text:style-name="Text_20_body"><text:span text:style-name="Strong_20_Emphasis">The Significance of Aquinas's Natural Law Theory:</text:span></text:p>
      <text:p text:style-name="Text_20_body"><text:span text:style-name="Strong_20_Emphasis">1. Harmony of Reason and Faith:</text:span> Aquinas resolved the perceived conflict between reason and religious belief. He showed that rational inquiry into ethics and theological obedience lead to compatible conclusions. This intellectual reconciliation was the foundation of scholastic philosophy and laid the groundwork for universities and formal education in Europe.</text:p>
      <text:p text:style-name="Text_20_body"><text:span text:style-name="Strong_20_Emphasis">2. Ethics Accessible Through Reason:</text:span> By arguing that natural law can be discovered by reason and does not require religious revelation, Aquinas made ethics universally accessible. This has profound implications — it means that people of all faiths and cultures share a common moral foundation accessible through rational reflection.</text:p>
      <text:p text:style-name="Text_20_body"><text:span text:style-name="Strong_20_Emphasis">3. Path Toward Scientific Ethics:</text:span> Most significantly, by allowing people to turn to <text:span text:style-name="Strong_20_Emphasis">secular knowledge without guilt</text:span>, Aquinas prepared the way for the emergence of a more scientific view of humanity and of ethics. He effectively gave permission for future generations to pursue philosophy, science, and rational inquiry as legitimate paths to truth — without abandoning faith. This intellectual opening contributed to the conditions that eventually produced the Scientific Revolution and the Modern Period of ethical thought.</text:p>
      <text:p text:style-name="Horizontal_20_Line"/>
      <text:h text:style-name="Heading_20_3" text:outline-level="3"><text:soft-page-break/>PART B: Relevance of Aquinas's Natural Law Theory Today</text:h>
      <text:p text:style-name="Text_20_body"><text:span text:style-name="Strong_20_Emphasis">1. Foundation of International Law and Human Rights:</text:span> The idea that there is a <text:span text:style-name="Strong_20_Emphasis">universal moral law accessible to all rational beings</text:span> — regardless of their religion or culture — is the philosophical foundation of modern international human rights law. The Universal Declaration of Human Rights (1948) assumes that certain rights belong to all humans by virtue of their rational nature — a fundamentally Aquinian idea.</text:p>
      <text:p text:style-name="Text_20_body"><text:span text:style-name="Emphasis">Relevance to CSE:</text:span> International cybersecurity law, digital rights frameworks, and data protection regulations like GDPR are grounded in the idea that all people — regardless of nationality — have fundamental digital rights that no government or corporation may violate. This is Natural Law theory applied to the digital age.</text:p>
      <text:p text:style-name="Text_20_body"><text:span text:style-name="Strong_20_Emphasis">2. Reason and Ethics in Technology:</text:span> Aquinas's argument that ethics is accessible through reason — not only through religious or cultural authority — supports the development of <text:span text:style-name="Strong_20_Emphasis">secular technology ethics frameworks</text:span> that can be applied universally across cultures.</text:p>
      <text:p text:style-name="Text_20_body"><text:span text:style-name="Emphasis">Relevance to CSE:</text:span> When global technology companies like Google, Microsoft, or Facebook develop AI ethics principles, they are implicitly applying a form of Natural Law reasoning — seeking universal ethical standards through rational analysis rather than religious or national authority.</text:p>
      <text:p text:style-name="Text_20_body"><text:span text:style-name="Strong_20_Emphasis">3. Conscience as Ethical Guide:</text:span> Aquinas's emphasis on conscience as the application of Natural Law to specific situations maps directly onto the modern concept of <text:span text:style-name="Strong_20_Emphasis">professional conscience</text:span> — the internal moral guide that tells an engineer when something is wrong, even when no rule explicitly prohibits it.</text:p>
      <text:p text:style-name="Text_20_body"><text:span text:style-name="Emphasis">Relevance to CSE:</text:span> A CSE professional who refuses to build a surveillance system that would be used to oppress minorities — even when legally permitted and economically incentivized — is exercising conscience in exactly the way Aquinas described: recognizing the natural law written in their heart and acting accordingly.</text:p>
      <text:p text:style-name="Text_20_body"><text:span text:style-name="Strong_20_Emphasis">4. Complementarity of Technical and Ethical Knowledge:</text:span> Just as Aquinas argued that secular knowledge and theological knowledge are complementary, not contradictory, the same principle applies to technical knowledge and ethical knowledge in CSE. Engineering expertise and ethical reflection are not in conflict — they are two dimensions of the same professional responsibility.</text:p>
      <text:p text:style-name="Text_20_body"><text:span text:style-name="Strong_20_Emphasis">Conclusion:</text:span> Aquinas's Natural Law Theory, developed in the 13th century, continues to provide the philosophical foundation for universal human rights, international law, professional conscience, and secular ethics frameworks. For CSE professionals, its most enduring lesson is that moral knowledge is accessible to all rational beings — which means that every engineer, regardless of their background, has both the capacity and the responsibility to reason ethically about the technology they build.</text:p>
      <text:p text:style-name="Horizontal_20_Line"/>
      <text:h text:style-name="Heading_20_1" text:outline-level="1"><text:soft-page-break/>QUESTION <text:span text:style-name="T3">10</text:span> (NEW)</text:h>
      <text:h text:style-name="Heading_20_2" text:outline-level="2">"Discuss Hobbes's Social Contract Theory and its relevance to digital governance and cybersecurity."</text:h>
      <text:p text:style-name="Horizontal_20_Line"/>
      <text:h text:style-name="Heading_20_3" text:outline-level="3">PART A: Hobbes's Social Contract Theory</text:h>
      <text:p text:style-name="Text_20_body"><text:span text:style-name="Strong_20_Emphasis">Background — Thomas Hobbes (1588–1679):</text:span> Thomas Hobbes belongs to the Modern Period of ethical thought. He was the <text:span text:style-name="Strong_20_Emphasis">first thinker to systematically approach ethics from a scientific viewpoint</text:span>. His major philosophical work was <text:span text:style-name="Strong_20_Emphasis">Leviathan</text:span> (1651). Hobbes applied the principle of <text:span text:style-name="Strong_20_Emphasis">mechanistic materialism</text:span> — central to the physics of his time — to ethics, arguing that human behavior follows predictable, mechanical patterns just as physical objects do.</text:p>
      <text:p text:style-name="Text_20_body"><text:span text:style-name="Strong_20_Emphasis">The State of Nature:</text:span> Hobbes began with a thought experiment: what would human life be like without society or government — in its "natural" or primitive state?</text:p>
      <text:p text:style-name="Text_20_body">His conclusion was stark: without civil society, human beings are driven entirely by <text:span text:style-name="Strong_20_Emphasis">self-interest and self-preservation.</text:span> In this natural condition:</text:p>
      <text:list text:style-name="L33">
        <text:list-item>
          <text:p text:style-name="P70">There is no concept of right or wrong — morality does not yet exist </text:p>
        </text:list-item>
        <text:list-item>
          <text:p text:style-name="P70">Every person competes with every other for survival and resources </text:p>
        </text:list-item>
        <text:list-item>
          <text:p text:style-name="P69">Life would be, in his famous words: <text:span text:style-name="Emphasis">"solitary, poor, nasty, brutish, and short"</text:span> </text:p>
        </text:list-item>
      </text:list>
      <text:p text:style-name="Text_20_body"><text:span text:style-name="Strong_20_Emphasis">The Social Contract:</text:span> To escape this condition of perpetual conflict, Hobbes argued that human beings collectively agree — through an implicit <text:span text:style-name="Strong_20_Emphasis">Social Contract</text:span> — to give up some of their freedom and transfer power to a <text:span text:style-name="Strong_20_Emphasis">Sovereign</text:span> (a ruler or governing body). In return, the Sovereign guarantees order, safety, and the conditions for social life.</text:p>
      <text:p text:style-name="Text_20_body">Key elements:</text:p>
      <text:list text:style-name="L34">
        <text:list-item>
          <text:p text:style-name="P72">Morality and the concepts of right and wrong <text:span text:style-name="Strong_20_Emphasis">only begin to exist</text:span> when civil society is formed — they are products of social agreement, not natural facts </text:p>
        </text:list-item>
        <text:list-item>
          <text:p text:style-name="P72">The Sovereign — whether a monarch or an assembly — must have sufficient authority to control individual self-interest and prevent conflict </text:p>
        </text:list-item>
        <text:list-item>
          <text:p text:style-name="P71">Hobbes believed in the <text:span text:style-name="Strong_20_Emphasis">Golden Rule</text:span> (treat others as you wish to be treated) but argued that people cannot be trusted to follow it voluntarily — hence the necessity of sovereign authority </text:p>
        </text:list-item>
      </text:list>
      <text:p text:style-name="Text_20_body"><text:span text:style-name="Strong_20_Emphasis">Reaction to Hobbes:</text:span> Many ethicists disagreed with Hobbes's bleak view of human nature. They argued that human beings possess a <text:span text:style-name="Strong_20_Emphasis">moral faculty</text:span> beyond mere self-interest — variously described as:</text:p>
      <text:list text:style-name="L35">
        <text:list-item>
          <text:p text:style-name="P74"><text:span text:style-name="Strong_20_Emphasis">Intuition:</text:span> A natural sense of right and wrong </text:p>
        </text:list-item>
        <text:list-item>
          <text:p text:style-name="P74"><text:span text:style-name="Strong_20_Emphasis">Moral sense:</text:span> A natural affection for virtue </text:p>
        </text:list-item>
        <text:list-item>
          <text:p text:style-name="P73"><text:span text:style-name="Strong_20_Emphasis">Conscience:</text:span> An internal guide to ethical conduct </text:p>
        </text:list-item>
      </text:list>
      <text:p text:style-name="Horizontal_20_Line"/>
      <text:h text:style-name="Heading_20_3" text:outline-level="3"><text:soft-page-break/>PART B: Relevance to Digital Governance and Cybersecurity</text:h>
      <text:p text:style-name="Text_20_body"><text:span text:style-name="Strong_20_Emphasis">1. The Internet as a "State of Nature":</text:span> Hobbes's description of the natural state — where self-interest dominates and there are no enforced rules — is a remarkably accurate description of the early internet and continues to describe the "dark web" today. Without governance, digital spaces become environments of exploitation, fraud, harassment, and cybercrime.</text:p>
      <text:p text:style-name="Text_20_body"><text:span text:style-name="Emphasis">Application:</text:span> Just as Hobbes argued that sovereign authority is necessary to create social order from natural chaos, <text:span text:style-name="Strong_20_Emphasis">digital governance frameworks</text:span> — national cybersecurity laws, international internet governance bodies, platform content moderation — are the modern equivalents of the Hobbesian Sovereign. They impose order on what would otherwise be digital anarchy.</text:p>
      <text:p text:style-name="Text_20_body"><text:span text:style-name="Strong_20_Emphasis">2. Cybersecurity as Social Contract:</text:span> Hobbes's Social Contract implies that citizens give up certain freedoms (absolute privacy, anonymous harmful behavior) in exchange for security. This trade-off is at the heart of modern cybersecurity debates:</text:p>
      <text:list text:style-name="L36">
        <text:list-item>
          <text:p text:style-name="P76">Governments argue for <text:span text:style-name="Strong_20_Emphasis">backdoors in encryption</text:span> — some privacy surrendered for national security (Hobbesian) </text:p>
        </text:list-item>
        <text:list-item>
          <text:p text:style-name="P75">Civil libertarians argue this violates fundamental rights — a rejection of Hobbes in favor of moral faculty theories </text:p>
        </text:list-item>
      </text:list>
      <text:p text:style-name="Text_20_body"><text:span text:style-name="Emphasis">Example:</text:span> The ongoing debate about end-to-end encryption between governments and technology companies is fundamentally a Hobbesian argument: how much privacy (individual freedom) should citizens surrender to the Sovereign (government) for collective security?</text:p>
      <text:p text:style-name="Text_20_body"><text:span text:style-name="Strong_20_Emphasis">3. Platform Governance:</text:span> Social media platforms function as quasi-Hobbesian sovereigns — they establish rules (community standards), enforce them (content moderation), and penalize violations (banning users). Without this governance, platforms descend into the equivalent of Hobbes's state of nature: harassment, misinformation, and exploitation dominate.</text:p>
      <text:p text:style-name="Text_20_body"><text:span text:style-name="Emphasis">Bangladesh example:</text:span> The spread of communal violence-inciting content on Facebook in Bangladesh demonstrates the consequences of insufficient platform governance — a digital state of nature where self-interest (engagement, outrage) dominates over collective safety.</text:p>
      <text:p text:style-name="Text_20_body"><text:span text:style-name="Strong_20_Emphasis">4. The Moral Faculty Response in CSE:</text:span> The ethicists who reacted against Hobbes — arguing that humans have intuition, moral sense, and conscience — remind CSE professionals that governance frameworks alone are insufficient. Engineers must internalize ethical values, not merely comply with external rules.</text:p>
      <text:p text:style-name="Text_20_body"><text:span text:style-name="Strong_20_Emphasis">Conclusion:</text:span> Hobbes's Social Contract Theory provides a powerful framework for understanding why digital governance, cybersecurity regulation, and platform content moderation are ethically necessary — not merely politically convenient. At the same time, the reaction to Hobbes reminds us that external rules must be complemented by internal conscience for technology to truly serve humanity.</text:p>
      <text:p text:style-name="Horizontal_20_Line"/>
      <text:h text:style-name="Heading_20_1" text:outline-level="1"><text:soft-page-break/>QUESTION <text:span text:style-name="T3">11</text:span> (NEW)</text:h>
      <text:h text:style-name="Heading_20_2" text:outline-level="2">"Discuss the role of Hedonism and Duty-based Ethics in the history of ethical thought. Compare them and evaluate their relevance to CSE."</text:h>
      <text:p text:style-name="Horizontal_20_Line"/>
      <text:h text:style-name="Heading_20_3" text:outline-level="3">PART A: Hedonism in Ethical History</text:h>
      <text:p text:style-name="Text_20_body"><text:span text:style-name="Strong_20_Emphasis">Definition:</text:span> Hedonism is the ethical theory that <text:span text:style-name="Strong_20_Emphasis">pleasure is the highest good</text:span> and the proper aim of human life. The measure of any action is the amount of pleasure it brings. The word comes from the Greek <text:span text:style-name="Emphasis">hedone</text:span> meaning pleasure.</text:p>
      <text:p text:style-name="Text_20_body"><text:span text:style-name="Strong_20_Emphasis">Classical Hedonism — The Cyrenaics:</text:span> The Cyrenaics were an early Greek school who argued that any pleasure — physical or mental — is inherently good. They emphasized immediate, present pleasure as the goal of action.</text:p>
      <text:p text:style-name="Text_20_body"><text:span text:style-name="Strong_20_Emphasis">Refined Hedonism — The Epicureans:</text:span> Epicurus (341–270 BC) made an important refinement. He distinguished between:</text:p>
      <text:list text:style-name="L37">
        <text:list-item>
          <text:p text:style-name="P78"><text:span text:style-name="Strong_20_Emphasis">Natural pleasures:</text:span> Peace of mind, absence of hunger, simple friendship — these are genuinely good </text:p>
        </text:list-item>
        <text:list-item>
          <text:p text:style-name="P77"><text:span text:style-name="Strong_20_Emphasis">Unnatural pleasures:</text:span> Greed, lust, excessive ambition — these ultimately cause more pain than pleasure </text:p>
        </text:list-item>
      </text:list>
      <text:p text:style-name="Text_20_body">Epicurus approved only natural pleasures. True happiness comes from tranquility (<text:span text:style-name="Emphasis">ataraxia</text:span>) — freedom from anxiety — not from the pursuit of intense sensory pleasure.</text:p>
      <text:p text:style-name="Text_20_body"><text:span text:style-name="Strong_20_Emphasis">Modern Hedonism — David Hume and John Stuart Mill:</text:span> David Hume (1711–1766) incorporated hedonistic elements — arguing that pleasure and utility are the standards of moral judgment. Mill's Utilitarianism is explicitly hedonistic: "pleasure or happiness is the standard of moral judgment," and the goal is "the greatest happiness for the greatest number."</text:p>
      <text:p text:style-name="Horizontal_20_Line"/>
      <text:h text:style-name="Heading_20_3" text:outline-level="3">PART B: Duty-Based Ethics (Deontology) in Ethical History</text:h>
      <text:p text:style-name="Text_20_body"><text:span text:style-name="Strong_20_Emphasis">Classical Duty Ethics — The Stoics:</text:span> The Stoics (ancient Greece and Rome) stood in direct opposition to the Hedonists. They argued that the path to the good life is not pleasure but <text:span text:style-name="Strong_20_Emphasis">virtue through rational self-discipline.</text:span> Emotions and desires must be overcome; duty as revealed by reason must be followed.</text:p>
      <text:p text:style-name="Text_20_body"><text:span text:style-name="Strong_20_Emphasis">Modern Duty Ethics — Immanuel Kant:</text:span> Kant (1724–1804) developed the most sophisticated duty-based ethical theory. His Deontology argues that:</text:p>
      <text:list text:style-name="L38">
        <text:list-item>
          <text:p text:style-name="P80">Morality is grounded in <text:span text:style-name="Strong_20_Emphasis">pure reason</text:span>, not emotion or pleasure </text:p>
        </text:list-item>
        <text:list-item>
          <text:p text:style-name="P80"><text:span text:style-name="Strong_20_Emphasis">Good Will</text:span> — acting from duty — is the only unconditionally good thing </text:p>
        </text:list-item>
        <text:list-item>
          <text:p text:style-name="P80">The <text:span text:style-name="Strong_20_Emphasis">Categorical Imperative</text:span> provides universal moral commands that apply regardless of consequences </text:p>
        </text:list-item>
        <text:list-item>
          <text:p text:style-name="P79">Humans are rational beings whose dignity demands they never be treated merely as means </text:p>
        </text:list-item>
      </text:list>
      <text:p text:style-name="Horizontal_20_Line"><text:soft-page-break/></text:p>
      <text:h text:style-name="Heading_20_3" text:outline-level="3">PART C: Comparison</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Aspect</text:p>
            </table:table-cell>
            <table:table-cell table:style-name="Table7.A1" office:value-type="string">
              <text:p text:style-name="Table_20_Heading">Hedonism</text:p>
            </table:table-cell>
            <table:table-cell table:style-name="Table7.A1" office:value-type="string">
              <text:p text:style-name="Table_20_Heading">Duty-Based Ethics (Deontology)</text:p>
            </table:table-cell>
          </table:table-row>
        </table:table-header-rows>
        <table:table-row>
          <table:table-cell table:style-name="Table7.A1" office:value-type="string">
            <text:p text:style-name="Table_20_Contents">Foundation of morality</text:p>
          </table:table-cell>
          <table:table-cell table:style-name="Table7.A1" office:value-type="string">
            <text:p text:style-name="Table_20_Contents">Pleasure and happiness</text:p>
          </table:table-cell>
          <table:table-cell table:style-name="Table7.A1" office:value-type="string">
            <text:p text:style-name="Table_20_Contents">Reason and duty</text:p>
          </table:table-cell>
        </table:table-row>
        <table:table-row>
          <table:table-cell table:style-name="Table7.A1" office:value-type="string">
            <text:p text:style-name="Table_20_Contents">What makes an action right?</text:p>
          </table:table-cell>
          <table:table-cell table:style-name="Table7.A1" office:value-type="string">
            <text:p text:style-name="Table_20_Contents">It produces pleasure/good consequences</text:p>
          </table:table-cell>
          <table:table-cell table:style-name="Table7.A1" office:value-type="string">
            <text:p text:style-name="Table_20_Contents">It is performed from duty/good will</text:p>
          </table:table-cell>
        </table:table-row>
        <table:table-row>
          <table:table-cell table:style-name="Table7.A1" office:value-type="string">
            <text:p text:style-name="Table_20_Contents">Role of emotion</text:p>
          </table:table-cell>
          <table:table-cell table:style-name="Table7.A1" office:value-type="string">
            <text:p text:style-name="Table_20_Contents">Central — pleasure is the guide</text:p>
          </table:table-cell>
          <table:table-cell table:style-name="Table7.A1" office:value-type="string">
            <text:p text:style-name="Table_20_Contents">Must be excluded — reason commands</text:p>
          </table:table-cell>
        </table:table-row>
        <table:table-row>
          <table:table-cell table:style-name="Table7.A1" office:value-type="string">
            <text:p text:style-name="Table_20_Contents">On lying</text:p>
          </table:table-cell>
          <table:table-cell table:style-name="Table7.A1" office:value-type="string">
            <text:p text:style-name="Table_20_Contents">Acceptable if it produces greater pleasure</text:p>
          </table:table-cell>
          <table:table-cell table:style-name="Table7.A1" office:value-type="string">
            <text:p text:style-name="Table_20_Contents">Always wrong — violates universal law</text:p>
          </table:table-cell>
        </table:table-row>
        <table:table-row>
          <table:table-cell table:style-name="Table7.A1" office:value-type="string">
            <text:p text:style-name="Table_20_Contents">Key thinkers</text:p>
          </table:table-cell>
          <table:table-cell table:style-name="Table7.A1" office:value-type="string">
            <text:p text:style-name="Table_20_Contents">Cyrenaics, Epicureans, Hume, Mill</text:p>
          </table:table-cell>
          <table:table-cell table:style-name="Table7.A1" office:value-type="string">
            <text:p text:style-name="Table_20_Contents">Stoics, Kant</text:p>
          </table:table-cell>
        </table:table-row>
        <table:table-row>
          <table:table-cell table:style-name="Table7.A1" office:value-type="string">
            <text:p text:style-name="Table_20_Contents">Strength</text:p>
          </table:table-cell>
          <table:table-cell table:style-name="Table7.A1" office:value-type="string">
            <text:p text:style-name="Table_20_Contents">Practical, measurable, human-centered</text:p>
          </table:table-cell>
          <table:table-cell table:style-name="Table7.A1" office:value-type="string">
            <text:p text:style-name="Table_20_Contents">Principled, consistent, protects dignity</text:p>
          </table:table-cell>
        </table:table-row>
        <table:table-row>
          <table:table-cell table:style-name="Table7.A1" office:value-type="string">
            <text:p text:style-name="Table_20_Contents">Weakness</text:p>
          </table:table-cell>
          <table:table-cell table:style-name="Table7.A1" office:value-type="string">
            <text:p text:style-name="Table_20_Contents">Can justify harmful acts if they maximize pleasure</text:p>
          </table:table-cell>
          <table:table-cell table:style-name="Table7.A1" office:value-type="string">
            <text:p text:style-name="Table_20_Contents">Can be rigid and impractical in complex situations</text:p>
          </table:table-cell>
        </table:table-row>
      </table:table>
      <text:p text:style-name="Horizontal_20_Line"/>
      <text:h text:style-name="Heading_20_3" text:outline-level="3">PART D: Relevance to CSE</text:h>
      <text:p text:style-name="Text_20_body"><text:span text:style-name="Strong_20_Emphasis">Hedonism (Utilitarian form) in CSE:</text:span> Utilitarian/hedonistic thinking is used when engineers must make trade-off decisions — maximizing overall benefit while minimizing total harm.</text:p>
      <text:list text:style-name="L39">
        <text:list-item>
          <text:p text:style-name="P82">Open-source software: Releasing code publicly causes some risk (bad actors can study it) but produces vastly more pleasure/benefit (global community can improve and use it) — Utilitarian decision </text:p>
        </text:list-item>
        <text:list-item>
          <text:p text:style-name="P82">AI healthcare tools: A medical AI that is 98% accurate might cause harm to 2% of users — a Utilitarian analysis weighs the massive benefit to the 98% against the harm to the 2% </text:p>
        </text:list-item>
        <text:list-item>
          <text:p text:style-name="P81">Public data sharing for research: Some privacy loss produces large gains in scientific knowledge — a hedonistic calculation </text:p>
        </text:list-item>
      </text:list>
      <text:p text:style-name="Text_20_body"><text:span text:style-name="Emphasis">Risk of pure Hedonism in CSE:</text:span> It can justify exploitative practices. Cambridge Analytica's data harvesting "maximized utility" for political clients — while harming millions of users. This shows why pure Hedonism without constraints is dangerous.</text:p>
      <text:p text:style-name="Text_20_body"><text:span text:style-name="Strong_20_Emphasis">Duty-Based Ethics in CSE:</text:span> Kantian/Stoic duty-ethics provides the absolute rules that protect against the excesses of pure outcome-thinking.</text:p>
      <text:list text:style-name="L40">
        <text:list-item>
          <text:p text:style-name="P84">User data must never be sold without consent — regardless of how much revenue it would generate </text:p>
        </text:list-item>
        <text:list-item>
          <text:p text:style-name="P84">Security vulnerabilities must be disclosed responsibly — it is a professional duty </text:p>
        </text:list-item>
        <text:list-item>
          <text:p text:style-name="P83">Discriminatory AI must be redesigned — not deployed even if it is technically impressive or economically profitable </text:p>
        </text:list-item>
      </text:list>
      <text:p text:style-name="Text_20_body"><text:span text:style-name="Strong_20_Emphasis">Synthesis:</text:span> The most mature CSE ethics combines both: <text:span text:style-name="Strong_20_Emphasis">Hedonism/Utilitarianism provides the framework for navigating trade-offs, while Duty Ethics provides the non-negotiable boundaries.</text:span> Kant draws the red lines; Mill helps navigate the grey areas within them.</text:p>
      <text:p text:style-name="Text_20_body"><text:soft-page-break/><text:span text:style-name="Strong_20_Emphasis">Conclusion:</text:span> The ancient debate between pleasure-based and duty-based ethics — begun in the Classical Period between Epicureans and Stoics — continues in modern CSE ethics. Understanding both traditions equips engineers to make nuanced decisions that are both practically effective and morally principled.</text:p>
      <text:p text:style-name="Horizontal_20_Line"/>
      <text:h text:style-name="Heading_20_1" text:outline-level="1">🧠 UPDATED MEMORIZATION GUIDE</text:h>
      <text:p text:style-name="Text_20_body"><text:span text:style-name="Emphasis">(Combines all questions including newly added ones)</text:span></text:p>
      <text:p text:style-name="Horizontal_20_Line"/>
      <text:h text:style-name="Heading_20_2" text:outline-level="2">MASTER MEMORY MAP</text:h>
      <text:p text:style-name="Preformatted_20_Text"><text:span text:style-name="Source_20_Text">ETHICS HISTORY</text:span></text:p>
      <text:p text:style-name="Preformatted_20_Text"><text:span text:style-name="Source_20_Text">│</text:span></text:p>
      <text:p text:style-name="Preformatted_20_Text"><text:span text:style-name="Source_20_Text">├── CLASSICAL (500 BC – 500 AD)</text:span></text:p>
      <text:p text:style-name="Preformatted_20_Text"><text:span text:style-name="Source_20_Text">│ <text:s text:c="2"/>├── S → Socrates → Self-examination → "Unexamined life..."</text:span></text:p>
      <text:p text:style-name="Preformatted_20_Text"><text:span text:style-name="Source_20_Text">│ <text:s text:c="2"/>├── P → Plato → Perfect Good/Forms → "The Republic"</text:span></text:p>
      <text:p text:style-name="Preformatted_20_Text"><text:span text:style-name="Source_20_Text">│ <text:s text:c="2"/>├── A → Aristotle → Active virtue/Mean → "Nicomachean Ethics"</text:span></text:p>
      <text:p text:style-name="Preformatted_20_Text"><text:span text:style-name="Source_20_Text">│ <text:s text:c="2"/>├── H → Hedonists (Cyrenaics + Epicureans) → Pleasure</text:span></text:p>
      <text:p text:style-name="Preformatted_20_Text"><text:span text:style-name="Source_20_Text">│ <text:s text:c="2"/>└── D → Duty (Cynics + Stoics) → Reason over desire</text:span></text:p>
      <text:p text:style-name="Preformatted_20_Text"><text:span text:style-name="Source_20_Text">│</text:span></text:p>
      <text:p text:style-name="Preformatted_20_Text"><text:span text:style-name="Source_20_Text">├── MEDIEVAL (500 – 1500)</text:span></text:p>
      <text:p text:style-name="Preformatted_20_Text"><text:span text:style-name="Source_20_Text">│ <text:s text:c="2"/>├── AU → Augustine → Plato + Christianity → Faith + Reason</text:span></text:p>
      <text:p text:style-name="Preformatted_20_Text"><text:span text:style-name="Source_20_Text">│ <text:s text:c="2"/>└── AQ → Aquinas → Aristotle + Christianity → Natural Law</text:span></text:p>
      <text:p text:style-name="Preformatted_20_Text"><text:span text:style-name="Source_20_Text">│</text:span></text:p>
      <text:p text:style-name="Preformatted_20_Text"><text:span text:style-name="Source_20_Text">└── MODERN (1500 – Present)</text:span></text:p>
      <text:p text:style-name="Preformatted_20_Text"><text:span text:style-name="Source_20_Text"><text:s text:c="4"/>├── HO → Hobbes → Self-interest → Social Contract</text:span></text:p>
      <text:p text:style-name="Preformatted_20_Text"><text:span text:style-name="Source_20_Text"><text:s text:c="4"/>├── HU → Hume → Feeling → Moral Sentiment</text:span></text:p>
      <text:p text:style-name="Preformatted_20_Text"><text:span text:style-name="Source_20_Text"><text:s text:c="4"/>├── K <text:s/>→ Kant → Duty → Categorical Imperative (U-H-D)</text:span></text:p>
      <text:p text:style-name="P1"><text:span text:style-name="Source_20_Text"><text:s text:c="4"/>└── M <text:s/>→ Mill → Consequences → Utilitarianism</text:span></text:p>
      <text:p text:style-name="Horizontal_20_Line"/>
      <text:h text:style-name="Heading_20_2" text:outline-level="2">ONE-CARD REVISION SHEET</text:h>
      <text:p text:style-name="Text_20_body"><text:span text:style-name="Strong_20_Emphasis">ETHICS:</text:span> Greek <text:span text:style-name="Emphasis">Ethos</text:span> → systematic study of right/wrong → forms good people → art of human living</text:p>
      <text:p text:style-name="Text_20_body"><text:span text:style-name="Strong_20_Emphasis">SOCRATES:</text:span> Reason + Self-knowledge | "Unexamined life..." | Socratic Method | No writings</text:p>
      <text:p text:style-name="Text_20_body"><text:span text:style-name="Strong_20_Emphasis">PLATO:</text:span> The Good + Forms | The Republic | Philosopher-King | Denied bodily pleasure</text:p>
      <text:p text:style-name="Text_20_body"><text:span text:style-name="Strong_20_Emphasis">ARISTOTLE:</text:span> Virtue = Mean | Daily life ethics | Nicomachean Ethics | "No form without matter"</text:p>
      <text:p text:style-name="Text_20_body"><text:span text:style-name="Strong_20_Emphasis">AUGUSTINE:</text:span> Plato + Christianity | Earthly vs Eternal good | Faith needed for virtue | Confessions + City of God</text:p>
      <text:p text:style-name="Text_20_body"><text:span text:style-name="Strong_20_Emphasis">AQUINAS:</text:span> Aristotle + Christianity | Natural Law | Reason + Faith in harmony | Summa Theologica | Path to scientific ethics</text:p>
      <text:p text:style-name="Text_20_body"><text:span text:style-name="Strong_20_Emphasis">HOBBES:</text:span> Self-interest | State of nature = chaos | Social Contract → Sovereign | Leviathan</text:p>
      <text:p text:style-name="Text_20_body"><text:span text:style-name="Strong_20_Emphasis">HUME:</text:span> Feeling over reason | Two-sided judgment (objective + subjective) | Moral sentiment</text:p>
      <text:p text:style-name="Text_20_body"><text:soft-page-break/><text:span text:style-name="Strong_20_Emphasis">KANT:</text:span> Duty (Deontology) | Good Will | Categorical Imperative: Universal Law + Humanity as End + Duty gives worth</text:p>
      <text:p text:style-name="Text_20_body"><text:span text:style-name="Strong_20_Emphasis">MILL:</text:span> Consequences (Utilitarianism/Teleology) | Greatest happiness | Hedonist | External + Internal motivation</text:p>
      <text:p text:style-name="Text_20_body"><text:span text:style-name="Strong_20_Emphasis">CSE ISSUES (DC-SAI-WE):</text:span> D=Data Privacy | C=Cybersecurity | S=Social Media | A=AI Fairness | I=Intellectual Property | W=Workplace | E=Environment</text:p>
      <text:p text:style-name="Text_20_body"><text:span text:style-name="Strong_20_Emphasis">BANGLADESH ISSUES:</text:span> Digital divide | 5 crore data breach | Social media misuse | Automation job loss</text:p>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Exam-Ready English Examples for DCSAIEW</text:h>
      <text:p text:style-name="Horizontal_20_Line"/>
      <text:h text:style-name="Heading_20_3" text:outline-level="3">D — Data Privacy &amp; Surveillance</text:h>
      <text:p text:style-name="Text_20_body"><text:span text:style-name="Strong_20_Emphasis">2.1.1 Unauthorized Data Collection</text:span></text:p>
      <text:p text:style-name="P4">In 2023, the personal data of over 50 million Bangladeshi citizens — including NID numbers, phone numbers, and addresses — was found exposed online through a government website vulnerability. Citizens had no idea their data was being collected or stored insecurely.</text:p>
      <text:p text:style-name="Text_20_body"><text:span text:style-name="Strong_20_Emphasis">2.1.2 Surveillance Systems</text:span></text:p>
      <text:p text:style-name="P4">China's Social Credit System monitors citizens through facial recognition cameras, tracking their behavior in public spaces. People with low scores face travel bans and restricted access to services — a chilling example of state surveillance overriding individual privacy.</text:p>
      <text:p text:style-name="Text_20_body"><text:span text:style-name="Strong_20_Emphasis">2.1.3 Misuse of Personal Information</text:span></text:p>
      <text:p text:style-name="P4">In the Cambridge Analytica scandal (2018), personal data from 87 million Facebook users was harvested without consent and used to psychologically profile voters during the US Presidential Election, manipulating political decisions at a massive scale.</text:p>
      <text:p text:style-name="Text_20_body"><text:span text:style-name="Strong_20_Emphasis">2.1.4 Data Breaches Due to Poor Security</text:span></text:p>
      <text:p text:style-name="P4">In 2017, Equifax — one of the largest credit reporting agencies — suffered a data breach exposing the financial records of 147 million Americans due to an unpatched software vulnerability. Engineers had ignored the security warning for months.</text:p>
      <text:p text:style-name="Horizontal_20_Line"/>
      <text:h text:style-name="Heading_20_3" text:outline-level="3">C — Cybersecurity &amp; Responsible Security Practices</text:h>
      <text:p text:style-name="Text_20_body"><text:span text:style-name="Strong_20_Emphasis">2.2.1 Ethical Problems in Penetration Testing</text:span></text:p>
      <text:p text:style-name="Quotations"><text:span text:style-name="T7">A cybersecurity firm hired to test a hospital's network discovered patient records were accessible. Without proper authorization documentation, sharing this finding could violate confidentiality laws. This illustrates why </text:span><text:span text:style-name="Strong_20_Emphasis"><text:span text:style-name="T7">prior consent and defined scope</text:span></text:span><text:span text:style-name="T7"> are essential in ethical pen testing.</text:span></text:p>
      <text:p text:style-name="Text_20_body"><text:span text:style-name="Strong_20_Emphasis">2.2.2 Handling Zero-Day Vulnerabilities</text:span></text:p>
      <text:p text:style-name="Quotations"><text:span text:style-name="T7">In 2021, the Microsoft Exchange Server zero-day vulnerability was exploited by hackers before Microsoft could release a patch. Over 250,000 servers worldwide were compromised. Responsible disclosure and </text:span><text:span text:style-name="Strong_20_Emphasis"><text:span text:style-name="T7">proactive multilayer prevention</text:span></text:span><text:span text:style-name="T7"> could have reduced the damage.</text:span></text:p>
      <text:p text:style-name="Text_20_body"><text:span text:style-name="Strong_20_Emphasis">2.2.3 Ethical vs Malicious Hacking</text:span></text:p>
      <text:p text:style-name="Quotations"><text:span text:style-name="T7">Kevin Mitnick, once the world's most wanted hacker (Black Hat), later became a cybersecurity consultant (White Hat). The difference? </text:span><text:span text:style-name="Strong_20_Emphasis"><text:span text:style-name="T7">Authorization and intent.</text:span></text:span><text:span text:style-name="T7"> </text:span><text:soft-page-break/><text:span text:style-name="T7">Ethical hackers operate within legal boundaries with written permission; malicious hackers do not.</text:span></text:p>
      <text:p text:style-name="Text_20_body"><text:span text:style-name="Strong_20_Emphasis">2.2.4 Engineers Discovering Security Flaws</text:span></text:p>
      <text:p text:style-name="Quotations"><text:span text:style-name="T7">A software engineer at Yahoo discovered in 2014 that 3 billion user accounts were compromised. However, Yahoo delayed public disclosure for </text:span><text:span text:style-name="Strong_20_Emphasis"><text:span text:style-name="T7">two years</text:span></text:span><text:span text:style-name="T7">, violating the ethical duty of prompt response and putting users at ongoing risk</text:span>.</text:p>
      <text:p text:style-name="Horizontal_20_Line"/>
      <text:h text:style-name="Heading_20_3" text:outline-level="3">S — Social Media Ethics</text:h>
      <text:p text:style-name="Text_20_body"><text:span text:style-name="Strong_20_Emphasis">2.3.1 Spread of Harmful Content</text:span></text:p>
      <text:p text:style-name="P4">In 2017, Facebook's algorithm amplified anti-Rohingya hate speech in Myanmar, contributing to real-world ethnic violence. UN investigators stated that Facebook played a "determining role" in spreading content that incited genocide. The platform failed to moderate harmful content in a minority language.</text:p>
      <text:p text:style-name="Text_20_body"><text:span text:style-name="Strong_20_Emphasis">2.3.2 Manipulation Through Algorithms</text:span></text:p>
      <text:p text:style-name="P4">Netflix's recommendation algorithm and YouTube's autoplay feature are designed to maximize watch time — not user wellbeing. Studies show YouTube's algorithm frequently leads users from moderate content toward increasingly extreme videos, radicalizing opinions without users realizing it.</text:p>
      <text:p text:style-name="Text_20_body"><text:span text:style-name="Strong_20_Emphasis">2.3.3 Echo Chambers and Polarization</text:span></text:p>
      <text:p text:style-name="P4">During the 2022 Brazilian election, WhatsApp groups circulated massive volumes of misinformation. Users who received false content only interacted with others who believed the same things — a classic echo chamber — making it nearly impossible to correct misinformation once it spread.</text:p>
      <text:p text:style-name="Text_20_body"><text:span text:style-name="Strong_20_Emphasis">2.3.4 Data Harvesting for Targeted Advertising</text:span></text:p>
      <text:p text:style-name="Quotations"><text:span text:style-name="T7">Facebook tracks users even when they are </text:span><text:span text:style-name="Strong_20_Emphasis"><text:span text:style-name="T7">not on Facebook</text:span></text:span><text:span text:style-name="T7"> — through invisible "Like" buttons embedded on third-party websites. This harvested behavioral data is sold to advertisers for micro-targeted ads, often exploiting emotional vulnerabilities without users' genuine informed consent.</text:span></text:p>
      <text:p text:style-name="Horizontal_20_Line"/>
      <text:h text:style-name="Heading_20_3" text:outline-level="3">A — AI &amp; Algorithmic Fairness</text:h>
      <text:p text:style-name="Text_20_body"><text:span text:style-name="Strong_20_Emphasis">2.4.1 Bias in Machine Learning Datasets</text:span></text:p>
      <text:p text:style-name="Quotations"><text:span text:style-name="T7">Amazon built an AI recruitment tool trained on 10 years of resumes — mostly from men. The system learned to </text:span><text:span text:style-name="Strong_20_Emphasis"><text:span text:style-name="T7">penalize resumes containing the word "women's"</text:span></text:span><text:span text:style-name="T7"> (e.g., "women's chess club"). Amazon scrapped the tool in 2018 </text:span>after discovering it systematically discriminated against female applicants.</text:p>
      <text:p text:style-name="Text_20_body"><text:span text:style-name="Strong_20_Emphasis">2.4.2 Discrimination in Automated Decision Systems</text:span></text:p>
      <text:p text:style-name="Quotations"><text:soft-page-break/><text:span text:style-name="T7">The COMPAS algorithm used in US courts to predict criminal recidivism was found to be </text:span><text:span text:style-name="Strong_20_Emphasis"><text:span text:style-name="T7">twice as likely to falsely flag Black defendants as future criminals</text:span></text:span><text:span text:style-name="T7"> compared to white defendants. Judges relied on this score in sentencing decisions, embedding racial bias into the justice system.</text:span></text:p>
      <text:p text:style-name="Text_20_body"><text:span text:style-name="Strong_20_Emphasis">2.4.3 Lack of Transparency — Black Box System</text:span></text:p>
      <text:p text:style-name="P4">When a person is denied a bank loan by an AI system, they often receive no explanation. The AI processes hundreds of variables and produces a decision — but neither the applicant nor even the bank's own staff can explain exactly why the loan was denied. This lack of transparency violates principles of fairness and accountability.</text:p>
      <text:p text:style-name="Text_20_body"><text:span text:style-name="Strong_20_Emphasis">2.4.4 Job Displacement Due to Automation</text:span></text:p>
      <text:p text:style-name="Quotations"><text:span text:style-name="T7">McKinsey Global Institute estimates that by 2030, automation could displace up to </text:span><text:span text:style-name="Strong_20_Emphasis"><text:span text:style-name="T7">375 million workers</text:span></text:span><text:span text:style-name="T7"> globally. In Bangladesh's garment industry, automated sewing machines already threaten millions of jobs held mostly by women — raising serious questions about who bears the cost of technological progress.</text:span></text:p>
      <text:p text:style-name="Text_20_body"><text:span text:style-name="Strong_20_Emphasis">2.4.5 Deepfakes and Misinformation</text:span></text:p>
      <text:p text:style-name="P4">In 2023, AI-generated deepfake audio clips of political leaders making inflammatory statements were circulated on social media in several countries before elections. These were entirely fabricated but were convincing enough to spark public outrage, demonstrating how AI can be weaponized for misinformation at scale.</text:p>
      <text:p text:style-name="Horizontal_20_Line"/>
      <text:h text:style-name="Heading_20_3" text:outline-level="3">I — Intellectual Property &amp; Software Piracy</text:h>
      <text:p text:style-name="Text_20_body"><text:span text:style-name="Strong_20_Emphasis">2.5.1 Ownership of Code</text:span></text:p>
      <text:p text:style-name="Quotations"><text:span text:style-name="T7">When a developer writes code as part of their employment contract, the </text:span><text:span text:style-name="Strong_20_Emphasis"><text:span text:style-name="T7">company typically owns that code</text:span></text:span><text:span text:style-name="T7"> — not the developer. This became a major legal dispute when a former Google engineer took proprietary self-driving car code to Uber. Uber paid $245 million in settlement, highlighting the legal weight of code ownership.</text:span></text:p>
      <text:p text:style-name="Text_20_body"><text:span text:style-name="Strong_20_Emphasis">2.5.2 Open-Source vs Proprietary Conflicts</text:span></text:p>
      <text:p text:style-name="P4">Oracle sued Google for using Java APIs in Android without a license, claiming $9 billion in damages. After a decade-long legal battle, the US Supreme Court ruled in Google's favor in 2021 — a landmark case defining the boundaries between open-source principles and proprietary IP rights.</text:p>
      <text:p text:style-name="Text_20_body"><text:span text:style-name="Strong_20_Emphasis">2.5.3 Plagiarism in Academic or Professional Coding</text:span></text:p>
      <text:p text:style-name="P4">A computer science student submitted an assignment using code copied from GitHub without attribution. The professor detected it using plagiarism detection software. In professional settings, copying proprietary code without a license can lead to lawsuits, job termination, and reputational damage.</text:p>
      <text:p text:style-name="Text_20_body"><text:span text:style-name="Strong_20_Emphasis">2.5.4 Patents and Licensing Issues</text:span></text:p>
      <text:p text:style-name="Quotations"><text:span text:style-name="T7">Apple and Samsung engaged in one of the most expensive patent wars in tech history (2011–2018), with Apple claiming Samsung copied iPhone's rounded-rectangle design</text:span> <text:soft-page-break/><text:span text:style-name="T7">and touch interface. The case resulted in over </text:span><text:span text:style-name="Strong_20_Emphasis"><text:span text:style-name="T7">$1 billion</text:span></text:span><text:span text:style-name="T7"> in damages being awarded to Apple, illustrating how seriously IP law treats design and software patents.</text:span></text:p>
      <text:p text:style-name="Horizontal_20_Line"/>
      <text:h text:style-name="Heading_20_3" text:outline-level="3">E — Environmental &amp; Sustainability Concerns</text:h>
      <text:p text:style-name="Text_20_body"><text:span text:style-name="Strong_20_Emphasis">2.6.1 High Energy Consumption of Data Centers and Blockchain</text:span></text:p>
      <text:p text:style-name="Quotations"><text:span text:style-name="T7">Bitcoin mining alone consumes approximately </text:span><text:span text:style-name="Strong_20_Emphasis"><text:span text:style-name="T7">150 terawatt-hours of electricity per year</text:span></text:span><text:span text:style-name="T7"> — more than the entire country of Argentina. Google's data centers consume enough electricity to power a mid-sized city. The carbon footprint of the internet and digital infrastructure is now larger than the aviation industry.</text:span></text:p>
      <text:p text:style-name="Text_20_body"><text:span text:style-name="Strong_20_Emphasis">2.6.2 E-Waste from Rapid Hardware Obsolescence</text:span></text:p>
      <text:p text:style-name="P4">Agbogbloshie in Accra, Ghana has become one of the world's largest e-waste dumpsites. Old electronics from Europe and North America — computers, phones, and cables — are shipped there illegally. Local workers, including children, burn the waste to extract copper, suffering severe lead and mercury poisoning, causing cancer and neurological damage.</text:p>
      <text:p text:style-name="Text_20_body"><text:span text:style-name="Strong_20_Emphasis">2.6.3 Sustainable Software Practices</text:span></text:p>
      <text:p text:style-name="Quotations"><text:span text:style-name="T7">"Green coding" is an emerging practice where developers optimize software to use </text:span><text:span text:style-name="Strong_20_Emphasis"><text:span text:style-name="T7">less processing power</text:span></text:span><text:span text:style-name="T7">, reducing energy consumption. For example, inefficient code that runs unnecessarily complex operations forces servers to consume more electricity. Microsoft and Google have both committed to carbon-neutral cloud computing by 2030 as part of sustainable software responsibility.</text:span></text:p>
      <text:p text:style-name="Horizontal_20_Line"/>
      <text:h text:style-name="Heading_20_3" text:outline-level="3">W — Workplace &amp; Professional Ethics</text:h>
      <text:p text:style-name="Text_20_body"><text:span text:style-name="Strong_20_Emphasis">2.7.1 Conflicts of Interest</text:span></text:p>
      <text:p text:style-name="Quotations"><text:span text:style-name="T7">A software engineer working for a government e-governance platform discovers that their company is also privately contracted by a competing political party to build voter data tools. Using the same data access for both creates a serious </text:span><text:span text:style-name="Strong_20_Emphasis"><text:span text:style-name="T7">conflict of interest</text:span></text:span><text:span text:style-name="T7"> that compromises public trust and professional integrity.</text:span></text:p>
      <text:p text:style-name="Text_20_body"><text:span text:style-name="Strong_20_Emphasis">2.7.2 Whistleblowing Dilemmas</text:span></text:p>
      <text:p text:style-name="Quotations"><text:span text:style-name="T7">Frances Haugen, a former Facebook product manager, leaked thousands of internal documents in 2021 proving that Facebook knew Instagram caused mental health harm to teenage girls — but chose profit over safety. She testified before the US Senate. Her case shows the enormous personal and professional </text:span><text:span text:style-name="Strong_20_Emphasis"><text:span text:style-name="T7">risk of whistleblowing</text:span></text:span><text:span text:style-name="T7">, but also its necessity for public good.</text:span></text:p>
      <text:p text:style-name="Text_20_body"><text:span text:style-name="Strong_20_Emphasis">2.7.3 Ethical Responsibilities During Product Development</text:span></text:p>
      <text:p text:style-name="Quotations"><text:span text:style-name="T7">Engineers at Boeing were reportedly aware of safety concerns with the 737 MAX autopilot system but faced pressure to meet deadlines. The plane crashed twice, killing </text:span><text:span text:style-name="Strong_20_Emphasis"><text:span text:style-name="T7">346 people</text:span></text:span><text:span text:style-name="T7">. This is a defining case of how ignoring ethical responsibility during product development leads to catastrophic real-world consequences.</text:span></text:p>
      <text:p text:style-name="Text_20_body"><text:soft-page-break/><text:span text:style-name="Strong_20_Emphasis">2.7.4 Handling Pressure from Employers</text:span></text:p>
      <text:p text:style-name="Quotations"><text:span text:style-name="T7">Volkswagen engineers were aware that their vehicles were programmed to cheat emissions tests — performing better during testing than in real-world driving. Instead of reporting this, engineers complied under management pressure. The scandal eventually exposed </text:span><text:span text:style-name="Strong_20_Emphasis"><text:span text:style-name="T7">11 million fraudulent vehicles</text:span></text:span><text:span text:style-name="T7"> globally and cost Volkswagen over $30 billion in fines and settlemen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9T15:49:20.081104878</meta:creation-date>
    <dc:date>2026-04-30T01:02:02.307362644</dc:date>
    <meta:editing-duration>PT2H25M39S</meta:editing-duration>
    <meta:editing-cycles>19</meta:editing-cycles>
    <meta:generator>LibreOffice/24.2.7.2$Linux_X86_64 LibreOffice_project/420$Build-2</meta:generator>
    <meta:document-statistic meta:table-count="5" meta:image-count="0" meta:object-count="0" meta:page-count="34" meta:paragraph-count="624" meta:word-count="10950" meta:character-count="74420" meta:non-whitespace-character-count="63796"/>
  </office:meta>
</office:document-meta>
</file>