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8813in" table:align="left"/>
    </style:style>
    <style:style style:name="Table1.A" style:family="table-column">
      <style:table-column-properties style:column-width="0.9361in"/>
    </style:style>
    <style:style style:name="Table1.B" style:family="table-column">
      <style:table-column-properties style:column-width="2.3507in"/>
    </style:style>
    <style:style style:name="Table1.C" style:family="table-column">
      <style:table-column-properties style:column-width="2.5944in"/>
    </style:style>
    <style:style style:name="Table1.A1" style:family="table-cell">
      <style:table-cell-properties style:vertical-align="middle" fo:padding="0.0194in" fo:border="none"/>
    </style:style>
    <style:style style:name="P1" style:family="paragraph" style:parent-style-name="Heading_20_2">
      <style:text-properties fo:font-size="12pt" fo:font-weight="normal" style:font-size-asian="12pt" style:font-weight-asian="normal" style:font-size-complex="12pt" style:font-weight-complex="normal"/>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Heading_20_2">
      <style:text-properties fo:color="#00a933" loext:opacity="100%" fo:font-size="12pt" fo:font-weight="normal" style:font-size-asian="12pt" style:font-weight-asian="normal" style:font-size-complex="12pt" style:font-weight-complex="normal"/>
    </style:style>
    <style:style style:name="P4" style:family="paragraph" style:parent-style-name="Standard">
      <style:text-properties fo:color="#00a933" loext:opacity="100%" officeooo:paragraph-rsid="00222597"/>
    </style:style>
    <style:style style:name="P5" style:family="paragraph" style:parent-style-name="Standard">
      <style:text-properties officeooo:paragraph-rsid="001da531"/>
    </style:style>
    <style:style style:name="P6" style:family="paragraph" style:parent-style-name="Standard">
      <style:text-properties officeooo:paragraph-rsid="001f6b94"/>
    </style:style>
    <style:style style:name="P7" style:family="paragraph" style:parent-style-name="Standard">
      <style:text-properties officeooo:paragraph-rsid="0020a1fb"/>
    </style:style>
    <style:style style:name="P8" style:family="paragraph" style:parent-style-name="Standard">
      <style:text-properties officeooo:paragraph-rsid="00222597"/>
    </style:style>
    <style:style style:name="P9" style:family="paragraph" style:parent-style-name="Standard">
      <style:text-properties fo:color="#c9211e" loext:opacity="100%" officeooo:paragraph-rsid="00222597"/>
    </style:style>
    <style:style style:name="P10" style:family="paragraph" style:parent-style-name="Standard">
      <style:text-properties officeooo:paragraph-rsid="00231186"/>
    </style:style>
    <style:style style:name="P11" style:family="paragraph" style:parent-style-name="Standard">
      <style:text-properties officeooo:paragraph-rsid="002491d8"/>
    </style:style>
    <style:style style:name="P12" style:family="paragraph" style:parent-style-name="Text_20_body">
      <style:text-properties officeooo:paragraph-rsid="002662de"/>
    </style:style>
    <style:style style:name="P13" style:family="paragraph" style:parent-style-name="Quotations" style:list-style-name="L1"/>
    <style:style style:name="P14" style:family="paragraph" style:parent-style-name="Quotations" style:list-style-name="L1">
      <style:paragraph-properties fo:margin-top="0in" fo:margin-bottom="0in" style:contextual-spacing="false"/>
    </style:style>
    <style:style style:name="P15" style:family="paragraph" style:parent-style-name="Quotations" style:list-style-name="L2"/>
    <style:style style:name="P16" style:family="paragraph" style:parent-style-name="Quotations" style:list-style-name="L2">
      <style:paragraph-properties fo:margin-top="0in" fo:margin-bottom="0in" style:contextual-spacing="false"/>
    </style:style>
    <style:style style:name="P17" style:family="paragraph" style:parent-style-name="Quotations" style:list-style-name="L3"/>
    <style:style style:name="P18" style:family="paragraph" style:parent-style-name="Quotations" style:list-style-name="L3">
      <style:paragraph-properties fo:margin-top="0in" fo:margin-bottom="0in" style:contextual-spacing="false"/>
    </style:style>
    <style:style style:name="P19" style:family="paragraph" style:parent-style-name="Standard">
      <style:text-properties officeooo:paragraph-rsid="00222597"/>
    </style:style>
    <style:style style:name="P20" style:family="paragraph" style:parent-style-name="Text_20_body">
      <style:text-properties fo:font-size="18pt" fo:font-weight="bold" officeooo:paragraph-rsid="00222597" style:font-size-asian="18pt" style:font-weight-asian="bold" style:font-size-complex="18pt" style:font-weight-complex="bold"/>
    </style:style>
    <style:style style:name="T1" style:family="text">
      <style:text-properties officeooo:rsid="001bf45b"/>
    </style:style>
    <style:style style:name="T2" style:family="text">
      <style:text-properties officeooo:rsid="0020a1fb"/>
    </style:style>
    <style:style style:name="T3" style:family="text">
      <style:text-properties officeooo:rsid="00231186"/>
    </style:style>
    <style:style style:name="T4" style:family="text">
      <style:text-properties fo:font-weight="bold" style:font-weight-asian="bold" style:font-weight-complex="bold"/>
    </style:style>
    <style:style style:name="T5" style:family="text">
      <style:text-properties officeooo:rsid="002491d8"/>
    </style:style>
    <style:style style:name="T6" style:family="text">
      <style:text-properties officeooo:rsid="002662de"/>
    </style:style>
    <style:style style:name="T7" style:family="text">
      <style:text-properties fo:color="#00a933" loext:opacity="100%"/>
    </style:style>
    <style:style style:name="T8" style:family="text">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CLASSICAL PERIOD</text:p>
      <text:p text:style-name="Standard"/>
      <text:p text:style-name="Standard">500 B.C. to A.D. 500</text:p>
      <text:p text:style-name="Standard">rapid change was taking place in Greek society</text:p>
      <text:p text:style-name="Standard">agrarian monarchy <text:span text:style-name="T1">to</text:span> a commercial industrial democracy</text:p>
      <text:p text:style-name="Standard">the moral focus was the duty of the individual as a citizen</text:p>
      <text:p text:style-name="Standard">Ethics was regarded as the spiritual counterpart of medicine, its function being to provide care of the soul as medicine provides care of the body</text:p>
      <text:p text:style-name="Standard">Their general view was that good and evil are matters of personal decision or social agreement.</text:p>
      <text:p text:style-name="P5">Some of the more liberal Sophists suggested that all morality was a matter of convenience only.</text:p>
      <text:p text:style-name="P5"/>
      <text:p text:style-name="P5">Socrates (469-399 B.C.) </text:p>
      <text:p text:style-name="P5">was the dominant figure of the classical period</text:p>
      <text:p text:style-name="P5">he is generally regarded as the father of Western philosophy.</text:p>
      <text:p text:style-name="P5">Like the Sophists, Socrates rejected the idea that tradition justifies conduct</text:p>
      <text:p text:style-name="P5">he believed that morality is more than a matter of personal choice or convenience.</text:p>
      <text:p text:style-name="P5">It is possible, he believed, </text:p>
      <text:p text:style-name="P5"><text:tab/><text:tab/>to develop a universal set of ethical principles to guide conduct, and </text:p>
      <text:p text:style-name="P5"><text:tab/><text:tab/>the key to doing so is human reason, </text:p>
      <text:p text:style-name="P5"><text:tab/><text:tab/>the careful examination of beliefs and actions and </text:p>
      <text:p text:style-name="P5"><text:tab/><text:tab/>the logic that underlies them.</text:p>
      <text:p text:style-name="P5">His focus was on self-knowledge. </text:p>
      <text:p text:style-name="P5">"The unexamined life is not worth living."</text:p>
      <text:p text:style-name="P5">Socrates is best known for his philosophical method. </text:p>
      <text:p text:style-name="P5">Rather than teach directly, </text:p>
      <text:p text:style-name="P5"><text:tab/>he conversed with others, </text:p>
      <text:p text:style-name="P5"><text:tab/>asking basic questions about important matters (for example, What is justice? What is <text:tab/>virtue?) and </text:p>
      <text:p text:style-name="P5"><text:tab/>then examining the answers people gave, </text:p>
      <text:p text:style-name="P5"><text:tab/>exposing vagueness and inconsistency, </text:p>
      <text:p text:style-name="P5"><text:tab/>clarifying problems, and </text:p>
      <text:p text:style-name="P5"><text:tab/>pointing the way to further inquiry.</text:p>
      <text:p text:style-name="P5">He was also the first to probe the relationships between facts and values an ethical issue that virtually all ethicists since his time have grappled with.</text:p>
      <text:p text:style-name="P5"/>
      <text:p text:style-name="P5"/>
      <text:p text:style-name="P5"/>
      <text:p text:style-name="P5"/>
      <text:p text:style-name="P5">Plato (427-347 B.C.)</text:p>
      <text:p text:style-name="P5"/>
      <text:p text:style-name="P5">Plato (427-347 B.C.) built upon the teaching of Socrates. </text:p>
      <text:p text:style-name="P5">Plato's writings are in dialogue form, and Socrates is the main character in most of them. </text:p>
      <text:p text:style-name="P5">Plato's greatest work is The Republic. </text:p>
      <text:p text:style-name="P5">He shared Socrates' view that the life of reason is the happiest and best life. </text:p>
      <text:p text:style-name="P5">For both men sense perception and bodily pleasure were less desirable than intellectual pursuits, but the two men differed somewhat in their emphases. </text:p>
      <text:p text:style-name="P6">Socrates apparently believed in </text:p>
      <text:p text:style-name="P6"><text:tab/>enjoying himself at all levels of experience in a balanced way. </text:p>
      <text:p text:style-name="P5"><text:tab/>nothing should be done to excess,</text:p>
      <text:p text:style-name="P6"><text:tab/>that moderation should be the rule in everything. </text:p>
      <text:p text:style-name="P6"/>
      <text:p text:style-name="P6"/>
      <text:p text:style-name="P6"><text:soft-page-break/>Plato's view was more extreme.</text:p>
      <text:p text:style-name="P6"><text:tab/>His denial of bodily pleasure and sense perception made him a model for later religious and <text:tab/>idealistic ethicists.</text:p>
      <text:p text:style-name="P6">Plato's central notion was that </text:p>
      <text:p text:style-name="P6"><text:tab/>the real world is not the world that our senses perceive, </text:p>
      <text:p text:style-name="P6"><text:tab/>but the world of ideas. </text:p>
      <text:p text:style-name="P6"><text:s text:c="11"/>The concrete reality that surrounds us is merely an imperfect reflection of the world of abstract ideas or "forms," which are timeless and unchanging. </text:p>
      <text:p text:style-name="P6"><text:tab/>The most important reality in this world of ideas is the idea of the Good. </text:p>
      <text:p text:style-name="P6"><text:tab/>Goodness for Plato was a central fact about the universe. </text:p>
      <text:p text:style-name="P6">Thus the main goal of his ethical system is to gain a vision of the Good.</text:p>
      <text:p text:style-name="P6"/>
      <text:p text:style-name="P6"/>
      <text:p text:style-name="P6"/>
      <text:p text:style-name="P6"/>
      <text:p text:style-name="P6"/>
      <text:p text:style-name="P6"/>
      <text:p text:style-name="P7">Aristotle (384-322 B.C.)</text:p>
      <text:p text:style-name="P7"/>
      <text:p text:style-name="P6">Aristotle (384-322 B.C.) was a student of Plato and followed his and Socrates' philosophical tradition. </text:p>
      <text:p text:style-name="P7">Nevertheless, Aristotle's emphasis was quite different from Plato's.</text:p>
      <text:p text:style-name="P7">Aristotle authored as many as four hundred works on a variety of subjects from theoretical and practical science to politics, rhetoric, logic, and ethics. </text:p>
      <text:p text:style-name="P7">His Nichomachean Ethics is the first systematic treatment of ethics in Western civilization.</text:p>
      <text:p text:style-name="P7">Aristotle disputed Plato's theory of forms. </text:p>
      <text:p text:style-name="P7">There is no world of separate, abstract forms corresponding to the concrete things we perceive, he reasoned. </text:p>
      <text:p text:style-name="P7">Form cannot exist apart from particular objects, or as he put it, "No form without matter,</text:p>
      <text:p text:style-name="P7">no matter without form." </text:p>
      <text:p text:style-name="P7">Accordingly, Aristotle rejected the notion that the Good exists independently of daily experience and human personality. </text:p>
      <text:p text:style-name="P7">In his view moral principles exist in the daily activities of human life and can be discovered by</text:p>
      <text:p text:style-name="P7">examining those activities. </text:p>
      <text:p text:style-name="P7">Happiness is to be attained by developing one's potential for a life of reason. </text:p>
      <text:p text:style-name="P7">The life of reason has two aims</text:p>
      <text:p text:style-name="P7"><text:tab/><text:tab/>the pursuit of truth through reflection and</text:p>
      <text:p text:style-name="P7"><text:tab/><text:tab/>understanding and the pursuit of virtue through intelligent conduct. </text:p>
      <text:p text:style-name="P7">Virtue, for Aristotle, represented a midpoint between extremes of excess and defect. </text:p>
      <text:p text:style-name="P7">(Some actions, however, like murder or theft <text:span text:style-name="T2">are</text:span> bad in themselves and therefore having no midpoint.)</text:p>
      <text:p text:style-name="P7"/>
      <text:p text:style-name="P7"/>
      <text:p text:style-name="P7">The Cyrenaics, the Epicureans emphasized human feelings and desires and taught that the measure of an action is the amount of pleasure it brings. (This view is known as hedonism.) </text:p>
      <text:p text:style-name="P7">Epicurus <text:s/>made a sharp distinction between "natural" pleasures, such as peace of mind and the absence of hunger, and "unnatural" pleasures, such as greed and lust, approving only the former. </text:p>
      <text:p text:style-name="P7">In contrast to the Cyrenaics and Epicureans were the Cynics and then the Stoics. </text:p>
      <text:p text:style-name="P7">These groups stressed overcoming feelings and desires and serving the demands of duty as revealed by reason.</text:p>
      <text:p text:style-name="P7"/>
      <text:p text:style-name="P7"/>
      <text:p text:style-name="P7"><text:soft-page-break/>THE MEDIEVAL PERIOD <text:span text:style-name="T2">(500 to 1500)</text:span></text:p>
      <text:p text:style-name="P7"/>
      <text:p text:style-name="P7"/>
      <text:p text:style-name="P7">Its intellectual and social context was Christianity</text:p>
      <text:p text:style-name="P7">Medieval ethics combined the classical emphasis on human reason with the idea of obedience to God's will.</text:p>
      <text:p text:style-name="P7"/>
      <text:p text:style-name="P7"/>
      <text:p text:style-name="P7"/>
      <text:p text:style-name="P8">Saint Augustine (354-430)</text:p>
      <text:p text:style-name="P8"/>
      <text:p text:style-name="P8">The first was Saint Augustine (354-430). In his numerous works, notable among them Confessions and The City of God, </text:p>
      <text:p text:style-name="P8">Augustine made Plato's philosophy the basis of Christian ethics. </text:p>
      <text:p text:style-name="P8">Augustine's system was two-sided -</text:p>
      <text:p text:style-name="P8"><text:tab/>the life of reason leads to temporal well-being </text:p>
      <text:p text:style-name="P8"><text:tab/>faith leads to salvation and eternal happiness. </text:p>
      <text:p text:style-name="P8">(Since this life is only a preparation for the afterlife, no real happiness is possible here.) </text:p>
      <text:p text:style-name="P8">The concept of Good for Augustine was similarly two-sided: </text:p>
      <text:p text:style-name="P8"><text:tab/>the natural earthly side and </text:p>
      <text:p text:style-name="P8"><text:tab/>the supernatural, other-worldly side, with the super-natural dominating. </text:p>
      <text:p text:style-name="P8">Augustine viewed man as having fallen from God's grace through original sin but retaining free will and responsibility for his actions.</text:p>
      <text:p text:style-name="P8">Virtue is possible, but to have real value it must be prompted by faith.</text:p>
      <text:p text:style-name="P8"/>
      <text:p text:style-name="P8"/>
      <text:p text:style-name="P8"/>
      <text:p text:style-name="P8"/>
      <text:p text:style-name="P8">Saint Thomas Aquinas (1225-1274). </text:p>
      <text:p text:style-name="P8">Aquinas <text:s/>rediscovered Aristotle, Christianized his philosophy, and made it the basis of the philosophical outlook of the later middle ages. </text:p>
      <text:p text:style-name="P8">Aquinas's greatest works were Summa Theologica and Summa Contra Gentes.</text:p>
      <text:p text:style-name="P8">Aquinas aimed at demonstrating the harmony between Aristotle and Christianity.</text:p>
      <text:p text:style-name="P8">He taught that ethics has two dimensions-</text:p>
      <text:p text:style-name="P8"><text:tab/><text:tab/>the natural and </text:p>
      <text:p text:style-name="P8"><text:tab/><text:tab/>the theological. </text:p>
      <text:p text:style-name="P9">Natural ethics, as detailed by Aristotle, consists of the development of reason and practice</text:p>
      <text:p text:style-name="P9">in living morally and leads to earthly happiness. </text:p>
      <text:p text:style-name="P4">Theological ethics consists of achieving the virtues of faith, hope, and charity through God's grace and leads to eternal life with God. </text:p>
      <text:p text:style-name="P8">Aquinas believed that the Natural Law-the divine law as written in the heart of man can be discovered by reason and cultivated by conscience. </text:p>
      <text:p text:style-name="P8">By allowing people to turn to secular knowledge without guilt, </text:p>
      <text:p text:style-name="P8">Aquinas prepared the way for the emergence of a more scientific view of humanity <text:s/>and of ethics.</text:p>
      <text:p text:style-name="P8"/>
      <text:p text:style-name="P8"/>
      <text:p text:style-name="P8"/>
      <text:p text:style-name="P8"/>
      <text:p text:style-name="P8"/>
      <text:p text:style-name="P8"/>
      <text:p text:style-name="P8"/>
      <text:p text:style-name="P8"/>
      <text:p text:style-name="P10"><text:soft-page-break/>THE MODERN PERIOD <text:span text:style-name="T3">(1500 to the present.)</text:span></text:p>
      <text:p text:style-name="P8"/>
      <text:p text:style-name="P8">The Protestant Reformation challenged the supremacy of the "Roman Catholic church</text:p>
      <text:p text:style-name="P8">and introduced the idea of each person interpreting the Bible for himself or</text:p>
      <text:p text:style-name="P10">herself. </text:p>
      <text:p text:style-name="P10">The impact of this idea was increased with the invention of the printing</text:p>
      <text:p text:style-name="P10">press and the shift from Latin to the vernacular. </text:p>
      <text:p text:style-name="P10">Finally, and perhaps most importantly, the work of scientists like Copernicus, Galileo, and Harvey turned the attention of philosophers from theological to scientific explanations.</text:p>
      <text:p text:style-name="P10"/>
      <text:p text:style-name="P10"/>
      <text:p text:style-name="P10"/>
      <text:p text:style-name="P10">Thomas Hobbes (1588-1679) </text:p>
      <text:p text:style-name="P10"/>
      <text:p text:style-name="P10">Thomas Hobbes (1588-1679) was the first thinker to systematically approach ethics from a scientific viewpoint. </text:p>
      <text:p text:style-name="P10">Hobbes, whose major philosophical work was Leviathan, argued that the notion of mechanistic materialism that was central to the physics of the time applied to ethics as well. </text:p>
      <text:p text:style-name="P10">He attempted to demonstrate that in humanity's natural (primitive) condition the rule of self-preservation produces a morality based on self-interest. </text:p>
      <text:p text:style-name="P10">In that condition, Hobbes reasoned, the concepts of right and wrong do not exist; they only begin to exist when civil society is formed.</text:p>
      <text:p text:style-name="P10">The only way civil society can control the pursuit of individuals' self-interest and the conflict that such pursuit inevitably generates is to have everyone give allegiance to the sovereign.</text:p>
      <text:p text:style-name="P10">Hobbes believed in the Golden Rule, but he also believed that people could not be trusted to practice it. </text:p>
      <text:p text:style-name="P10">With too much at stake for each person to follow his or her conscience, the sovereign power-whether "monarch or assembly"-must ensure "the safety of the people."</text:p>
      <text:p text:style-name="P10"/>
      <text:p text:style-name="P10"/>
      <text:p text:style-name="P10">There was strong reaction against Hobbes' ethical perspective</text:p>
      <text:p text:style-name="P10">human beings are not at the mercy of their drive for self-preservation. </text:p>
      <text:p text:style-name="P10">They have a moral faculty, a specific intellectual guide that enables them to tell right from wrong. Several different ways of describing that moral faculty were advanced. </text:p>
      <text:p text:style-name="P10">Some described it as intuition, others as a moral sense (a natural affection for virtue), and still others as conscience.</text:p>
      <text:p text:style-name="P8"/>
      <text:p text:style-name="P8"/>
      <text:p text:style-name="P11">David Hume (1711-1766) </text:p>
      <text:p text:style-name="P11"/>
      <text:p text:style-name="P8">In the early eighteenth-century David Hume (1711-1766) proposed an ethical theory that was in some ways reminiscent of John Locke's theory in the previous century. </text:p>
      <text:p text:style-name="P11"><text:span text:style-name="T4">Locke (1632-1704) </text:span>had argued that pleasure is the standard of moral judgment. </text:p>
      <text:p text:style-name="P11">Sensations of pleasure or pain he reasoned, lead us to reflect and form views of justice and goodness and thus develop a system of moral judgment.</text:p>
      <text:p text:style-name="P11">Hume believed that the standard of moral judgment is two-sided. </text:p>
      <text:p text:style-name="P11">One part of it is objective-the consequences of the action in question. </text:p>
      <text:p text:style-name="P11">The other part, the dominant part, is subjective-a feeling of pleasure. </text:p>
      <text:p text:style-name="P11">(Like most hedonistic philosophers Hume did not approve of doing anything we wish. He believed that every human being possesses a tendency to be more pleased by benefiting others <text:span text:style-name="T5">t</text:span>han by being selfish and self-indulgent.) </text:p>
      <text:p text:style-name="P11">In Hume's theory reason alone cannot answer moral questions. </text:p>
      <text:p text:style-name="P11"><text:soft-page-break/>But a "moral sentiment" that chooses what is useful or pleasant can and does do so.</text:p>
      <text:p text:style-name="P11"/>
      <text:p text:style-name="P11"/>
      <text:p text:style-name="P11"/>
      <text:p text:style-name="P12">Immanuel Kant<text:span text:style-name="T6">(1724-1804)</text:span></text:p>
      <text:p text:style-name="P12"/>
      <text:p text:style-name="P12">Immanuel Kant is one of the most influential philosophers in the history of ethics, and his work is considered the very basis of modern ethical discussion. </text:p>
      <text:p text:style-name="P12">His ethical theory is known as <text:span text:style-name="Strong_20_Emphasis">Deontology</text:span> — which comes from the Greek word <text:span text:style-name="Emphasis">deon</text:span>, meaning duty.</text:p>
      <text:p text:style-name="P12"><text:s/>The central idea of Kant's ethics is that morality must be grounded in <text:span text:style-name="Strong_20_Emphasis">pure reason</text:span>, not in emotion or feeling. </text:p>
      <text:p text:style-name="P12">For Kant, acting morally has nothing to do with how you feel about a situation — it is entirely about whether your action follows a rational, logical principle.</text:p>
      <text:p text:style-name="P12">At the heart of Kant's moral philosophy is the concept of <text:span text:style-name="Strong_20_Emphasis">"Good Will."</text:span></text:p>
      <text:p text:style-name="P12">Kant believed that the only thing in the world that is unconditionally good is a good will — meaning the intention to do what is right simply because it is right, not for any other personal benefit or emotional reason. </text:p>
      <text:p text:style-name="P12">This good will serves as the foundational imperative of all moral action. </text:p>
      <text:p text:style-name="P12">If a person does the right thing for the wrong reason — such as to impress others or to avoid punishment — Kant would say that action has no genuine moral worth.</text:p>
      <text:p text:style-name="P12">Kant also believed that <text:span text:style-name="Strong_20_Emphasis">happiness is achieved through reason</text:span>, not through the pursuit of pleasure or the satisfaction of desires. </text:p>
      <text:p text:style-name="P12">In a civilized society, human beings are regarded as rational beings — and it is precisely this rationality that gives them their dignity and moral status. </text:p>
      <text:p text:style-name="P12">Finally, Kant argued that natural law operates as what he called <text:span text:style-name="Strong_20_Emphasis">categorical imperativeness</text:span> — meaning there are absolute, universal moral commands that every rational person is obligated to follow, in every situation, without exception.</text:p>
      <text:h text:style-name="P3" text:outline-level="2">Kant's Categorical Imperative</text:h>
      <text:p text:style-name="P12">The Categorical Imperative is Kant's supreme principle of morality — </text:p>
      <text:p text:style-name="P12">a universal rule derived entirely from reason that tells us how we must act in all circumstances. </text:p>
      <text:p text:style-name="P12">It is "categorical" because it is unconditional — it does not say "do this if you want that outcome." It simply says: this is what you must do, regardless of consequences.</text:p>
      <text:p text:style-name="P12">Kant expressed this imperative in<text:span text:style-name="T7"> three </text:span>key formulations. </text:p>
      <text:p text:style-name="P12">The first is to <text:span text:style-name="Strong_20_Emphasis">act according to universal law</text:span> — before taking any action, you must ask yourself: "What if everyone in the world did exactly what I am about to do?" If the result would be a world that functions well , then the action is permissible. If the world would collapse into chaos or contradiction, then the action is wrong. </text:p>
      <text:p text:style-name="P12"><text:soft-page-break/>The second formulation is to always <text:span text:style-name="Strong_20_Emphasis">treat humans as ends, not merely as means</text:span> — meaning you must never use another person simply as a tool or instrument for achieving your own goals. Every human being has intrinsic worth and dignity that must always be respected. </text:p>
      <text:p text:style-name="P12">The third formulation is that <text:span text:style-name="Strong_20_Emphasis">duty gives moral worth</text:span> to an action — the rightness or wrongness of what you do is not determined by the outcome it produces, but by whether it was done out of a sense of moral duty. An act done from duty is morally worthy; the same act done from selfishness or convenience is not.</text:p>
      <text:h text:style-name="Heading_20_2" text:outline-level="2"/>
      <text:h text:style-name="Heading_20_2" text:outline-level="2"/>
      <text:h text:style-name="P1" text:outline-level="2">John Stuart Mill (1806–1873)</text:h>
      <text:p text:style-name="P2"/>
      <text:p text:style-name="P12">John Stuart Mill represents a fundamentally different approach to ethics from Kant. </text:p>
      <text:p text:style-name="P12">Where Kant focused on duty and intention, Mill focused entirely on <text:span text:style-name="Strong_20_Emphasis">consequences</text:span>. </text:p>
      <text:p text:style-name="P12">His ethical theory is called <text:span text:style-name="Strong_20_Emphasis">Utilitarianism</text:span>, which falls under the broader category of <text:span text:style-name="Strong_20_Emphasis">Teleology</text:span> — meaning ethics that is concerned with ends and outcomes rather than rules and duties. </text:p>
      <text:p text:style-name="P12">Mill was deeply inspired by two earlier thinkers — </text:p>
      <text:p text:style-name="P12"><text:tab/>his father <text:span text:style-name="Strong_20_Emphasis">James Mill</text:span> and the philosopher <text:span text:style-name="Strong_20_Emphasis">Jeremy Bentham</text:span> — who had laid the early foundations of utilitarian thought.</text:p>
      <text:p text:style-name="P12">The core principle of Mill's Utilitarianism is straightforward: </text:p>
      <text:p text:style-name="P12">the rightness or wrongness of any action is determined entirely by its <text:span text:style-name="Strong_20_Emphasis">consequences</text:span>.</text:p>
      <text:p text:style-name="P12">An action is morally right if it produces good outcomes, and </text:p>
      <text:p text:style-name="P12">morally wrong if it produces bad ones. </text:p>
      <text:p text:style-name="P12">This is why Mill's ethics is also described as <text:span text:style-name="Strong_20_Emphasis">Hedonist</text:span> — because the standard by which he measures good and bad consequences is <text:span text:style-name="Strong_20_Emphasis">pleasure and happiness</text:span>. </text:p>
      <text:p text:style-name="P12">For Mill, the ultimate goal of any moral action should be to produce the greatest amount of happiness for the greatest number of people. </text:p>
      <text:p text:style-name="P12">Pleasure and happiness are not just desirable — they are the fundamental standard of all moral judgment.</text:p>
      <text:h text:style-name="Heading_20_2" text:outline-level="2"/>
      <text:h text:style-name="P1" text:outline-level="2">Mill's Two Types of Motivation</text:h>
      <text:p text:style-name="P12">Mill also explored the question of <text:span text:style-name="Emphasis">why</text:span> people act morally — what motivates human beings to do good. </text:p>
      <text:p text:style-name="P12">He identified two distinct types of motivation. </text:p>
      <text:p text:style-name="P12"><text:soft-page-break/>The first is <text:span text:style-name="Strong_20_Emphasis">external motivation</text:span> — acting morally because of outside pressures, such as wanting to earn a friend's approval or fearing punishment, whether from society or from God's wrath. This type of motivation comes from outside the individual and is driven by reward and fear.</text:p>
      <text:p text:style-name="P12">The second and deeper type is <text:span text:style-name="Strong_20_Emphasis">internal motivation</text:span> — which Mill described as an inner feeling of humanity. This is a genuine, inward sense of moral obligation that a person feels not because of outside pressure, but because they have developed a sincere concern for other people and for doing what is right.</text:p>
      <text:p text:style-name="P12">Importantly, Mill believed that this internal motivation is not something people are simply born with — it is something we <text:span text:style-name="Strong_20_Emphasis">learn from society.</text:span></text:p>
      <text:p text:style-name="P12">Through our social experiences, relationships, education, and cultural life, we gradually develop this inner moral sense that guides us to act well even when no one is watching and no external reward or punishment is involved.</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THE CLASSICAL PERIOD</text:p>
      <text:h text:style-name="Heading_20_3" text:outline-level="3">Socrates — "The Unexamined Life is Not Worth Living"</text:h>
      <text:p text:style-name="Text_20_body">Socrates used questioning to expose vague or inconsistent thinking — this is <text:span text:style-name="Strong_20_Emphasis">code review and debugging</text:span> in CSE.</text:p>
      <text:p text:style-name="Quotations"><text:span text:style-name="Strong_20_Emphasis">Real CSE Example:</text:span> When a developer writes <text:span text:style-name="Source_20_Text">if (x = 5)</text:span> instead of <text:span text:style-name="Source_20_Text">if (x == 5)</text:span>, a good code reviewer (like Socrates) doesn't just say "it's wrong" — they ask <text:span text:style-name="Emphasis">"what were you intending here?"</text:span> and expose the logical inconsistency. Tools like <text:span text:style-name="Strong_20_Emphasis">ESLint</text:span>, <text:span text:style-name="Strong_20_Emphasis">SonarQube</text:span>, and <text:span text:style-name="Strong_20_Emphasis">GitHub PRs</text:span> are literally Socratic methods built into software engineering pipelines.</text:p>
      <text:p text:style-name="Horizontal_20_Line"/>
      <text:h text:style-name="Heading_20_3" text:outline-level="3">Plato — World of Ideas (Abstract Forms)</text:h>
      <text:p text:style-name="Text_20_body">Plato believed the real world is made of <text:span text:style-name="Strong_20_Emphasis">abstract, perfect, unchanging ideas</text:span>, not physical things.</text:p>
      <text:p text:style-name="Quotations"><text:span text:style-name="Strong_20_Emphasis">Real CSE Example:</text:span> This is <text:span text:style-name="Strong_20_Emphasis">Object-Oriented Programming (OOP) and Abstraction</text:span>. A <text:span text:style-name="Source_20_Text">Car</text:span> class is Plato's <text:span text:style-name="Emphasis">Form of Car</text:span> — it's the perfect abstract template. Every actual car object (<text:span text:style-name="Source_20_Text">myCar</text:span>, <text:span text:style-name="Source_20_Text">yourCar</text:span>) is just an imperfect physical instance of that ideal form. Interfaces in Java/C# are pure Platonic forms — they define what something <text:span text:style-name="Emphasis">must be</text:span>, with no physical implementation.</text:p>
      <text:p text:style-name="Horizontal_20_Line"/>
      <text:h text:style-name="Heading_20_3" text:outline-level="3">Aristotle — "No Form Without Matter"</text:h>
      <text:p text:style-name="Text_20_body">Aristotle rejected abstract forms and said goodness is found <text:span text:style-name="Strong_20_Emphasis">in actual daily activities</text:span> — virtue is a <text:span text:style-name="Emphasis">midpoint</text:span> between extremes.</text:p>
      <text:p text:style-name="Quotations"><text:span text:style-name="Strong_20_Emphasis">Real CSE Example:</text:span> This is <text:span text:style-name="Strong_20_Emphasis">algorithmic balance and optimization</text:span>. In system design, Aristotle's "golden mean" is literally the engineer's trade-off:</text:p>
      <text:list text:style-name="L1">
        <text:list-item>
          <text:p text:style-name="P14">Too little memory → crashes (defect) </text:p>
        </text:list-item>
        <text:list-item>
          <text:p text:style-name="P14">Too much memory allocated → wasteful (excess) </text:p>
        </text:list-item>
        <text:list-item>
          <text:p text:style-name="P13">Right amount → virtue (optimal design) </text:p>
        </text:list-item>
      </text:list>
      <text:p text:style-name="Quotations">This also maps to <text:span text:style-name="Strong_20_Emphasis">Agile development</text:span> — Aristotle wouldn't write all docs upfront (Waterfall excess) or zero docs (Kanban defect). He'd write <text:span text:style-name="Emphasis">just enough</text:span> documentation.</text:p>
      <text:p text:style-name="Horizontal_20_Line"/>
      <text:h text:style-name="Heading_20_3" text:outline-level="3">Epicureans vs. Stoics — Hedonism vs. Duty</text:h>
      <text:p text:style-name="Text_20_body">Epicureans maximized pleasure; Stoics followed reason and duty regardless of feeling.</text:p>
      <text:p text:style-name="Quotations"><text:span text:style-name="Strong_20_Emphasis">Real CSE Example:</text:span></text:p>
      <text:list text:style-name="L2">
        <text:list-item>
          <text:p text:style-name="P16"><text:span text:style-name="Strong_20_Emphasis">Hedonist developers</text:span> write whatever code <text:span text:style-name="Emphasis">feels</text:span> fast to ship (tech debt, spaghetti code) </text:p>
        </text:list-item>
        <text:list-item>
          <text:p text:style-name="P15"><text:span text:style-name="Strong_20_Emphasis">Stoic developers</text:span> follow <text:span text:style-name="Strong_20_Emphasis">clean code principles</text:span>, SOLID principles, and proper documentation even when deadlines are painful </text:p>
        </text:list-item>
      </text:list>
      <text:p text:style-name="Quotations"><text:soft-page-break/>The eternal battle in every tech company: <text:span text:style-name="Emphasis">"Let's just ship it"</text:span> (Epicurean) vs. <text:span text:style-name="Emphasis">"Let's write unit tests first"</text:span> (Stoic).</text:p>
      <text:p text:style-name="Horizontal_20_Line"/>
      <text:h text:style-name="Heading_20_2" text:outline-level="2">THE MEDIEVAL PERIOD</text:h>
      <text:h text:style-name="Heading_20_3" text:outline-level="3">Aquinas — Natural Law Discoverable by Reason</text:h>
      <text:p text:style-name="Text_20_body">Aquinas said divine law is written in nature and can be found through <text:span text:style-name="Strong_20_Emphasis">rational examination</text:span>.</text:p>
      <text:p text:style-name="Quotations"><text:span text:style-name="Strong_20_Emphasis">Real CSE Example:</text:span> This is <text:span text:style-name="Strong_20_Emphasis">algorithm discovery and mathematical proofs</text:span> — the laws of computation (like P vs NP, Turing completeness, Big-O complexity) <text:span text:style-name="Emphasis">exist in nature</text:span>, and computer scientists discover them through pure reason, just as Aquinas described. Dijkstra didn't <text:span text:style-name="Emphasis">invent</text:span> the shortest path — he <text:span text:style-name="Emphasis">discovered</text:span> a law already present in the mathematics of graphs.</text:p>
      <text:p text:style-name="Horizontal_20_Line"/>
      <text:h text:style-name="Heading_20_2" text:outline-level="2">THE MODERN PERIOD</text:h>
      <text:h text:style-name="Heading_20_3" text:outline-level="3">Hobbes — Self-Interest Without Rules Creates Chaos</text:h>
      <text:p text:style-name="Text_20_body">Hobbes said without a sovereign enforcing rules, everyone acts in self-interest and society collapses.</text:p>
      <text:p text:style-name="Quotations"><text:span text:style-name="Strong_20_Emphasis">Real CSE Example:</text:span> This is <text:span text:style-name="Strong_20_Emphasis">cybersecurity and internet governance</text:span>. Without protocols, firewalls, and laws:</text:p>
      <text:list text:style-name="L3">
        <text:list-item>
          <text:p text:style-name="P18">The internet would be a Hobbesian "war of all against all" — DDoS attacks, data theft, ransomware, spam </text:p>
        </text:list-item>
        <text:list-item>
          <text:p text:style-name="P18"><text:span text:style-name="Strong_20_Emphasis">TCP/IP, HTTPS, OAuth, and JWT</text:span> are the "sovereign" — the agreed-upon rules that make cooperation possible </text:p>
        </text:list-item>
        <text:list-item>
          <text:p text:style-name="P17">Without authentication systems (the sovereign), every API would be exploited purely out of self-interest </text:p>
        </text:list-item>
      </text:list>
      <text:p text:style-name="Horizontal_20_Line"/>
      <text:h text:style-name="Heading_20_3" text:outline-level="3">Hume — Moral Judgment is Both Objective + Subjective</text:h>
      <text:p text:style-name="Text_20_body">Hume said morality has an objective part (consequences) AND a subjective part (human feeling/sentiment).</text:p>
      <text:p text:style-name="Quotations"><text:span text:style-name="Strong_20_Emphasis">Real CSE Example:</text:span> This is <text:span text:style-name="Strong_20_Emphasis">UI/UX design ethics</text:span>. A dark pattern (like hiding the "unsubscribe" button) may be <text:span text:style-name="Emphasis">objectively</text:span> functional — it works, it's technically correct. But the <text:span text:style-name="Emphasis">subjective moral sentiment</text:span> of users judges it as manipulative and wrong. <text:span text:style-name="Strong_20_Emphasis">Hume would say</text:span>: measure the consequences (user trust drops, churn rises) AND the feeling (users feel tricked). This is exactly how companies like Apple frame their <text:span text:style-name="Strong_20_Emphasis">Human Interface Guidelines</text:span> — balancing objective functionality with subjective user dignity.</text:p>
      <text:p text:style-name="Horizontal_20_Line"/>
      <text:h text:style-name="Heading_20_3" text:outline-level="3"><text:soft-page-break/>Kant — Deontology &amp; Categorical Imperative <text:s/>(Most Relevant to CSE Ethics)</text:h>
      <text:p text:style-name="Text_20_body"><text:span text:style-name="T8">Kant said: act only according to rules you'd want </text:span><text:span text:style-name="Emphasis"><text:span text:style-name="T8">everyone</text:span></text:span><text:span text:style-name="T8"> to follow. Treat people as ends, never merely as means.</text:span></text:p>
      <text:p text:style-name="Quotations"><text:span text:style-name="Strong_20_Emphasis">Real CSE Example 1 — AI Ethics:</text:span> If an AI model scrapes data without user consent, Kant's first formulation asks: <text:span text:style-name="Emphasis">"What if every company did this?"</text:span> → The internet becomes untrustworthy. This is exactly why <text:span text:style-name="Strong_20_Emphasis">GDPR</text:span> and <text:span text:style-name="Strong_20_Emphasis">AI Ethics frameworks</text:span> exist. Kant's categorical imperative is literally the foundation of privacy law.</text:p>
      <text:p text:style-name="Quotations"><text:span text:style-name="Strong_20_Emphasis">Real CSE Example 2 — Software Piracy:</text:span> A developer asks: <text:span text:style-name="Emphasis">"Should I use this cracked library?"</text:span> Kant says: if everyone did this, software companies couldn't survive → no more software → contradiction. Therefore it is morally wrong, regardless of whether you get caught.</text:p>
      <text:p text:style-name="Quotations"><text:span text:style-name="Strong_20_Emphasis">Real CSE Example 3 — Treating Users as Ends:</text:span> Facebook's early business model used users as <text:span text:style-name="Emphasis">means</text:span> (selling their data). Kant would condemn this. Modern <text:span text:style-name="Strong_20_Emphasis">Privacy-by-Design</text:span> principles in software engineering directly implement Kant's second formulation — users have intrinsic dignity and must not be exploited as data sources.</text:p>
      <text:p text:style-name="Horizontal_20_Line"/>
      <text:h text:style-name="Heading_20_3" text:outline-level="3">Mill — Utilitarianism &amp; Consequentialism <text:s/>(The Engineer's Go-To Ethics)</text:h>
      <text:p text:style-name="Text_20_body">Mill said: an action is right if it produces the <text:span text:style-name="Strong_20_Emphasis">greatest happiness for the greatest number</text:span>.</text:p>
      <text:p text:style-name="Quotations"><text:span text:style-name="Strong_20_Emphasis">Real CSE Example 1 — Search Algorithms:</text:span> Google's PageRank was utilitarian — rank results that give the <text:span text:style-name="Emphasis">most benefit to the most users</text:span>. Every recommendation system (Netflix, YouTube, Spotify) is a utilitarian machine: maximize aggregate satisfaction.</text:p>
      <text:p text:style-name="Quotations"><text:span text:style-name="Strong_20_Emphasis">Real CSE Example 2 — Trolley Problem in Self-Driving Cars:</text:span> If an autonomous vehicle must choose between hitting one pedestrian or five, it's a pure Millian calculation. Tesla, Waymo, and other AV companies literally had to encode utilitarian decisions into their systems — and faced enormous ethical backlash for it.</text:p>
      <text:p text:style-name="Quotations"><text:span text:style-name="Strong_20_Emphasis">Real CSE Example 3 — Internal vs External Motivation:</text:span> Mill's internal motivation maps to <text:span text:style-name="Strong_20_Emphasis">developer intrinsic motivation</text:span> — senior engineers who write clean code not because a manager is watching, but because they've internalized professional values. This is what separates a <text:span text:style-name="Strong_20_Emphasis">craftsman developer</text:span> from a <text:span text:style-name="Strong_20_Emphasis">ticket-closer developer</text:span>.</text:p>
      <text:p text:style-name="Horizontal_20_Line"/>
      <text:h text:style-name="Heading_20_2" text:outline-level="2">🧠 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hilosopher</text:p>
            </table:table-cell>
            <table:table-cell table:style-name="Table1.A1" office:value-type="string">
              <text:p text:style-name="Table_20_Heading">Core Idea</text:p>
            </table:table-cell>
            <table:table-cell table:style-name="Table1.A1" office:value-type="string">
              <text:p text:style-name="Table_20_Heading">CSE Equivalent</text:p>
            </table:table-cell>
          </table:table-row>
        </table:table-header-rows>
        <table:table-row>
          <table:table-cell table:style-name="Table1.A1" office:value-type="string">
            <text:p text:style-name="Table_20_Contents">Socrates</text:p>
          </table:table-cell>
          <table:table-cell table:style-name="Table1.A1" office:value-type="string">
            <text:p text:style-name="Table_20_Contents">Question everything</text:p>
          </table:table-cell>
          <table:table-cell table:style-name="Table1.A1" office:value-type="string">
            <text:p text:style-name="Table_20_Contents">Code review, debugging, testing</text:p>
          </table:table-cell>
        </table:table-row>
        <table:table-row>
          <table:table-cell table:style-name="Table1.A1" office:value-type="string">
            <text:p text:style-name="Table_20_Contents">Plato</text:p>
          </table:table-cell>
          <table:table-cell table:style-name="Table1.A1" office:value-type="string">
            <text:p text:style-name="Table_20_Contents">Abstract ideal forms</text:p>
          </table:table-cell>
          <table:table-cell table:style-name="Table1.A1" office:value-type="string">
            <text:p text:style-name="Table_20_Contents">OOP, interfaces, abstraction</text:p>
          </table:table-cell>
        </table:table-row>
        <table:table-row>
          <table:table-cell table:style-name="Table1.A1" office:value-type="string">
            <text:p text:style-name="Table_20_Contents">Aristotle</text:p>
          </table:table-cell>
          <table:table-cell table:style-name="Table1.A1" office:value-type="string">
            <text:p text:style-name="Table_20_Contents">Virtue = balance</text:p>
          </table:table-cell>
          <table:table-cell table:style-name="Table1.A1" office:value-type="string">
            <text:p text:style-name="Table_20_Contents">System design trade-offs, Agile</text:p>
          </table:table-cell>
        </table:table-row>
        <table:table-row>
          <table:table-cell table:style-name="Table1.A1" office:value-type="string">
            <text:p text:style-name="Table_20_Contents">Hobbes</text:p>
          </table:table-cell>
          <table:table-cell table:style-name="Table1.A1" office:value-type="string">
            <text:p text:style-name="Table_20_Contents">Rules prevent chaos</text:p>
          </table:table-cell>
          <table:table-cell table:style-name="Table1.A1" office:value-type="string">
            <text:p text:style-name="Table_20_Contents">Cybersecurity, protocols, governance</text:p>
          </table:table-cell>
        </table:table-row>
        <table:table-row>
          <table:table-cell table:style-name="Table1.A1" office:value-type="string">
            <text:p text:style-name="Table_20_Contents">Hume</text:p>
          </table:table-cell>
          <table:table-cell table:style-name="Table1.A1" office:value-type="string">
            <text:p text:style-name="Table_20_Contents">Objective + subjective judgment</text:p>
          </table:table-cell>
          <table:table-cell table:style-name="Table1.A1" office:value-type="string">
            <text:p text:style-name="Table_20_Contents">UX ethics, dark patterns</text:p>
          </table:table-cell>
        </table:table-row>
        <table:table-row>
          <table:table-cell table:style-name="Table1.A1" office:value-type="string">
            <text:p text:style-name="Table_20_Contents">Kant</text:p>
          </table:table-cell>
          <table:table-cell table:style-name="Table1.A1" office:value-type="string">
            <text:p text:style-name="Table_20_Contents">Duty-based universal rules</text:p>
          </table:table-cell>
          <table:table-cell table:style-name="Table1.A1" office:value-type="string">
            <text:p text:style-name="Table_20_Contents">GDPR, AI ethics, privacy-by-design</text:p>
          </table:table-cell>
        </table:table-row>
        <table:table-row>
          <table:table-cell table:style-name="Table1.A1" office:value-type="string">
            <text:p text:style-name="Table_20_Contents">Mill</text:p>
          </table:table-cell>
          <table:table-cell table:style-name="Table1.A1" office:value-type="string">
            <text:p text:style-name="Table_20_Contents">Greatest good for greatest number</text:p>
          </table:table-cell>
          <table:table-cell table:style-name="Table1.A1" office:value-type="string">
            <text:p text:style-name="Table_20_Contents">Recommendation systems, AV ethics</text:p>
          </table:table-cell>
        </table:table-row>
      </table:table>
      <text:p text:style-name="Text_20_body"><text:soft-page-break/>The entire history of ethics your document covers is <text:span text:style-name="Strong_20_Emphasis">actively being re-enacted in CSE today</text:span> — every AI model trained, every system designed, and every policy written is a new chapter in this same philosophical story.</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2:14:44.781961455</meta:creation-date>
    <dc:date>2026-04-29T10:22:02.713859376</dc:date>
    <meta:editing-duration>PT43M30S</meta:editing-duration>
    <meta:editing-cycles>4</meta:editing-cycles>
    <meta:generator>LibreOffice/24.2.7.2$Linux_X86_64 LibreOffice_project/420$Build-2</meta:generator>
    <meta:document-statistic meta:table-count="1" meta:image-count="0" meta:object-count="0" meta:page-count="11" meta:paragraph-count="237" meta:word-count="3411" meta:character-count="21709" meta:non-whitespace-character-count="18334"/>
  </office:meta>
</office:document-meta>
</file>