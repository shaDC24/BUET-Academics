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78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2.44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757in" table:align="left"/>
    </style:style>
    <style:style style:name="Table2.A" style:family="table-column">
      <style:table-column-properties style:column-width="1.1201in"/>
    </style:style>
    <style:style style:name="Table2.B" style:family="table-column">
      <style:table-column-properties style:column-width="3.755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7951in" table:align="left"/>
    </style:style>
    <style:style style:name="Table3.A" style:family="table-column">
      <style:table-column-properties style:column-width="2.6903in"/>
    </style:style>
    <style:style style:name="Table3.B" style:family="table-column">
      <style:table-column-properties style:column-width="3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6215in"/>
    </style:style>
    <style:style style:name="Table4.B" style:family="table-column">
      <style:table-column-properties style:column-width="6.07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1278in" table:align="left"/>
    </style:style>
    <style:style style:name="Table5.A" style:family="table-column">
      <style:table-column-properties style:column-width="0.6382in"/>
    </style:style>
    <style:style style:name="Table5.B" style:family="table-column">
      <style:table-column-properties style:column-width="2.6799in"/>
    </style:style>
    <style:style style:name="Table5.C" style:family="table-column">
      <style:table-column-properties style:column-width="2.809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6201in" table:align="left"/>
    </style:style>
    <style:style style:name="Table6.A" style:family="table-column">
      <style:table-column-properties style:column-width="0.8889in"/>
    </style:style>
    <style:style style:name="Table6.B" style:family="table-column">
      <style:table-column-properties style:column-width="1.4903in"/>
    </style:style>
    <style:style style:name="Table6.C" style:family="table-column">
      <style:table-column-properties style:column-width="1.24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2903in" table:align="left"/>
    </style:style>
    <style:style style:name="Table7.A" style:family="table-column">
      <style:table-column-properties style:column-width="1.2361in"/>
    </style:style>
    <style:style style:name="Table7.B" style:family="table-column">
      <style:table-column-properties style:column-width="2.05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1896in" table:align="left"/>
    </style:style>
    <style:style style:name="Table8.A" style:family="table-column">
      <style:table-column-properties style:column-width="1.0146in"/>
    </style:style>
    <style:style style:name="Table8.B" style:family="table-column">
      <style:table-column-properties style:column-width="0.8563in"/>
    </style:style>
    <style:style style:name="Table8.C" style:family="table-column">
      <style:table-column-properties style:column-width="0.7653in"/>
    </style:style>
    <style:style style:name="Table8.D" style:family="table-column">
      <style:table-column-properties style:column-width="0.8701in"/>
    </style:style>
    <style:style style:name="Table8.E" style:family="table-column">
      <style:table-column-properties style:column-width="1.6833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fo:background-color="#fff5c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a4c15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a4c15"/>
    </style:style>
    <style:style style:name="P5" style:family="paragraph" style:parent-style-name="Table_20_Contents">
      <style:text-properties fo:background-color="#ffff00"/>
    </style:style>
    <style:style style:name="P6" style:family="paragraph" style:parent-style-name="Table_20_Contents">
      <style:text-properties fo:background-color="#fff5ce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>
      <style:text-properties fo:background-color="#ffff00"/>
    </style:style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in" fo:margin-bottom="0in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7">
      <style:paragraph-properties fo:margin-top="0in" fo:margin-bottom="0in" style:contextual-spacing="false"/>
      <style:text-properties fo:background-color="#dee6ef"/>
    </style:style>
    <style:style style:name="P44" style:family="paragraph" style:parent-style-name="Text_20_body" style:list-style-name="L7">
      <style:text-properties fo:background-color="#dee6ef"/>
    </style:style>
    <style:style style:name="P45" style:family="paragraph" style:parent-style-name="Text_20_body">
      <style:text-properties fo:background-color="#dee6ef"/>
    </style:style>
    <style:style style:name="P46" style:family="paragraph" style:parent-style-name="Text_20_body" style:list-style-name="L15">
      <style:paragraph-properties fo:margin-top="0in" fo:margin-bottom="0in" style:contextual-spacing="false"/>
      <style:text-properties fo:background-color="#dee6ef"/>
    </style:style>
    <style:style style:name="P47" style:family="paragraph" style:parent-style-name="Text_20_body" style:list-style-name="L15">
      <style:text-properties fo:background-color="#dee6ef"/>
    </style:style>
    <style:style style:name="P48" style:family="paragraph" style:parent-style-name="Text_20_body" style:list-style-name="L17">
      <style:paragraph-properties fo:margin-top="0in" fo:margin-bottom="0in" style:contextual-spacing="false"/>
      <style:text-properties fo:background-color="#dee6ef"/>
    </style:style>
    <style:style style:name="P49" style:family="paragraph" style:parent-style-name="Text_20_body" style:list-style-name="L18">
      <style:paragraph-properties fo:margin-top="0in" fo:margin-bottom="0in" style:contextual-spacing="false"/>
      <style:text-properties fo:background-color="#fff5ce"/>
    </style:style>
    <style:style style:name="P50" style:family="paragraph" style:parent-style-name="Text_20_body" style:list-style-name="L18">
      <style:text-properties fo:background-color="#fff5ce"/>
    </style:style>
    <style:style style:name="P51" style:family="paragraph" style:parent-style-name="Text_20_body" style:list-style-name="L19">
      <style:paragraph-properties fo:margin-top="0in" fo:margin-bottom="0in" style:contextual-spacing="false"/>
      <style:text-properties fo:background-color="#fff5ce"/>
    </style:style>
    <style:style style:name="P52" style:family="paragraph" style:parent-style-name="Text_20_body" style:list-style-name="L20">
      <style:paragraph-properties fo:margin-top="0in" fo:margin-bottom="0in" style:contextual-spacing="false"/>
      <style:text-properties fo:background-color="#fff5ce"/>
    </style:style>
    <style:style style:name="P53" style:family="paragraph" style:parent-style-name="Text_20_body">
      <style:text-properties fo:background-color="#fff5ce"/>
    </style:style>
    <style:style style:name="P54" style:family="paragraph" style:parent-style-name="Text_20_body" style:list-style-name="L22">
      <style:paragraph-properties fo:margin-top="0in" fo:margin-bottom="0in" style:contextual-spacing="false"/>
      <style:text-properties fo:background-color="#fff5ce"/>
    </style:style>
    <style:style style:name="P55" style:family="paragraph" style:parent-style-name="Text_20_body" style:list-style-name="L21"/>
    <style:style style:name="P56" style:family="paragraph" style:parent-style-name="Text_20_body" style:list-style-name="L21">
      <style:paragraph-properties fo:margin-top="0in" fo:margin-bottom="0in" style:contextual-spacing="false"/>
    </style:style>
    <style:style style:name="P57" style:family="paragraph" style:parent-style-name="Text_20_body" style:list-style-name="L22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dee6ef" loext:char-shading-value="0"/>
    </style:style>
    <style:style style:name="T4" style:family="text">
      <style:text-properties fo:background-color="#dee6ef" loext:char-shading-value="0"/>
    </style:style>
    <style:style style:name="T5" style:family="text">
      <style:text-properties fo:background-color="#fff5ce" loext:char-shading-value="0"/>
    </style:style>
    <style:style style:name="T6" style:family="text">
      <style:text-properties fo:background-color="#fff5ce" loext:char-shading-value="0"/>
    </style:style>
    <style:style style:name="T7" style:family="text">
      <style:text-properties officeooo:rsid="001a4c1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plexing vs Multiple Access &amp; FDM </text:h>
      <text:p text:style-name="Horizontal_20_Line"/>
      <text:h text:style-name="Heading_20_2" text:outline-level="2">🔷 Part 1: Multiplexing vs Multiple Access</text:h>
      <text:h text:style-name="Heading_20_3" text:outline-level="3">📡 Multiplexing কী?</text:h>
      <text:p text:style-name="Text_20_body">কল্পনা করো একটা <text:span text:style-name="Strong_20_Emphasis">highway</text:span> আছে। অনেকগুলো গাড়ি (signals) একসাথে যেতে চায়। Multiplexing হলো সেই system যেটা এই সব গাড়িগুলোকে <text:span text:style-name="Strong_20_Emphasis">একটাই রাস্তায় একসাথে পাঠানোর ব্যবস্থা করে।</text:span></text:p>
      <text:p text:style-name="Quotations"><text:span text:style-name="Strong_20_Emphasis">Multiplexing</text:span> = Multiple analog/digital signals → combine → single signal → shared medium দিয়ে transmit</text:p>
      <text:p text:style-name="Text_20_body"><text:span text:style-name="Strong_20_Emphasis">কে করে?</text:span> → Sender/Transmitter নিজেই সব signal combine করে পাঠায়। Receiver আলাদা করে নেয়।</text:p>
      <text:p text:style-name="Horizontal_20_Line"/>
      <text:h text:style-name="Heading_20_3" text:outline-level="3">👥 Multiple Access কী?</text:h>
      <text:p text:style-name="Text_20_body">এখন ধরো <text:span text:style-name="Strong_20_Emphasis">অনেক আলাদা আলাদা user</text:span> আছে। তাদের সবার signal আলাদা আলাদা জায়গা থেকে আসছে। একটাই medium (যেমন বাতাস, cable) share করতে হবে।</text:p>
      <text:p text:style-name="Quotations"><text:span text:style-name="Strong_20_Emphasis">Multiple Access</text:span> = Manages করে কিভাবে <text:s/>multiple users একটা common transmission medium share করবে</text:p>
      <text:p text:style-name="Text_20_body"><text:span text:style-name="Strong_20_Emphasis">কে করে?</text:span> → Users নিজেরা coordinate করে (বা system manage করে) কে কখন/কোথায় পাঠাবে।</text:p>
      <text:p text:style-name="Horizontal_20_Line"/>
      <text:h text:style-name="Heading_20_3" text:outline-level="3">🔑 মূল পার্থক্য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বিষয়</text:p>
            </table:table-cell>
            <table:table-cell table:style-name="Table1.A1" office:value-type="string">
              <text:p text:style-name="Table_20_Heading">Multiplexing</text:p>
            </table:table-cell>
            <table:table-cell table:style-name="Table1.A1" office:value-type="string">
              <text:p text:style-name="Table_20_Heading">Multiple Access</text:p>
            </table:table-cell>
          </table:table-row>
        </table:table-header-rows>
        <table:table-row>
          <table:table-cell table:style-name="Table1.A1" office:value-type="string">
            <text:p text:style-name="Table_20_Contents">কে control করে</text:p>
          </table:table-cell>
          <table:table-cell table:style-name="Table1.A1" office:value-type="string">
            <text:p text:style-name="Table_20_Contents">একটা central system/device</text:p>
          </table:table-cell>
          <table:table-cell table:style-name="Table1.A1" office:value-type="string">
            <text:p text:style-name="Table_20_Contents">Multiple independent users</text:p>
          </table:table-cell>
        </table:table-row>
        <table:table-row>
          <table:table-cell table:style-name="Table1.A1" office:value-type="string">
            <text:p text:style-name="Table_20_Contents">উদ্দেশ্য</text:p>
          </table:table-cell>
          <table:table-cell table:style-name="Table1.A1" office:value-type="string">
            <text:p text:style-name="Table_20_Contents">Signals combine করা</text:p>
          </table:table-cell>
          <table:table-cell table:style-name="Table1.A1" office:value-type="string">
            <text:p text:style-name="Table_20_Contents">Users-দের মধ্যে medium share করা</text:p>
          </table:table-cell>
        </table:table-row>
        <table:table-row>
          <table:table-cell table:style-name="Table1.A1" office:value-type="string">
            <text:p text:style-name="Table_20_Contents">উদাহরণ</text:p>
          </table:table-cell>
          <table:table-cell table:style-name="Table1.A1" office:value-type="string">
            <text:p text:style-name="Table_20_Contents">Cable TV, telephone trunk</text:p>
          </table:table-cell>
          <table:table-cell table:style-name="Table1.A1" office:value-type="string">
            <text:p text:style-name="Table_20_Contents">WiFi, mobile network</text:p>
          </table:table-cell>
        </table:table-row>
        <table:table-row>
          <table:table-cell table:style-name="Table1.A1" office:value-type="string">
            <text:p text:style-name="Table_20_Contents">Signal source</text:p>
          </table:table-cell>
          <table:table-cell table:style-name="Table1.A1" office:value-type="string">
            <text:p text:style-name="Table_20_Contents">একই জায়গা থেকে</text:p>
          </table:table-cell>
          <table:table-cell table:style-name="Table1.A1" office:value-type="string">
            <text:p text:style-name="Table_20_Contents">আলাদা আলাদা জায়গা থেকে</text:p>
          </table:table-cell>
        </table:table-row>
      </table:table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🔷 Part 2: Frequency Division Multiplexing (FDM)</text:h>
      <text:h text:style-name="Heading_20_3" text:outline-level="3">🎯 মূল Concept</text:h>
      <text:p text:style-name="Text_20_body">Image-এ লেখা আছে:</text:p>
      <text:list text:style-name="L1">
        <text:list-item>
          <text:p text:style-name="P9">Signal → 0–5 kHz (এটা original signal এর bandwidth) </text:p>
        </text:list-item>
        <text:list-item>
          <text:p text:style-name="P9">অনেকগুলো signal কে certain <text:span text:style-name="Strong_20_Emphasis">carrier frequency</text:span> দিয়ে modulate করা হয় </text:p>
        </text:list-item>
        <text:list-item>
          <text:p text:style-name="P8">একটা medium এর ভেতর দিয়ে multiple signal pass করতে হবে </text:p>
        </text:list-item>
      </text:list>
      <text:p text:style-name="Text_20_body"><text:span text:style-name="Strong_20_Emphasis">FDM এর idea:</text:span> পুরো <text:s/>available frequency spectrum কে <text:span text:style-name="Strong_20_Emphasis">আলাদা আলাদা ভাগ</text:span> করে দাও। প্রতিটা signal একটা করে ভাগ (frequency band) পাবে।</text:p>
      <text:p text:style-name="Horizontal_20_Line"/>
      <text:h text:style-name="Heading_20_3" text:outline-level="3">📶 FDM কিভাবে কাজ করে — Step by Step</text:h>
      <text:p text:style-name="Text_20_body"><text:span text:style-name="Strong_20_Emphasis">Step 1: Original Signals</text:span> ধরো তিনটা signal আছে, প্রতিটা 0–5 kHz bandwidth এর:</text:p>
      <text:p text:style-name="Preformatted_20_Text"><text:span text:style-name="Source_20_Text">Signal 1: 0–5 kHz</text:span></text:p>
      <text:p text:style-name="Preformatted_20_Text"><text:span text:style-name="Source_20_Text">Signal 2: 0–5 kHz <text:s/></text:span></text:p>
      <text:p text:style-name="P2"><text:span text:style-name="Source_20_Text">Signal 3: 0–5 kHz</text:span></text:p>
      <text:p text:style-name="Text_20_body">এগুলো directly পাঠানো যাবে না, কারণ সব একই frequency-তে আছে → overlap হবে।</text:p>
      <text:p text:style-name="Text_20_body"><text:span text:style-name="Strong_20_Emphasis">Step 2: Modulation (Different Carrier Frequencies)</text:span></text:p>
      <text:p text:style-name="Text_20_body">প্রতিটা signal কে আলাদা <text:span text:style-name="Strong_20_Emphasis">carrier frequency</text:span> দিয়ে modulate করা হয়:</text:p>
      <text:p text:style-name="Preformatted_20_Text"><text:span text:style-name="Source_20_Text">Signal 1 × carrier 100 kHz → 97.5–102.5 kHz এ shift হলো</text:span></text:p>
      <text:p text:style-name="Preformatted_20_Text"><text:span text:style-name="Source_20_Text">Signal 2 × carrier 110 kHz → 107.5–112.5 kHz এ shift হলো <text:s/></text:span></text:p>
      <text:p text:style-name="P2"><text:span text:style-name="Source_20_Text">Signal 3 × carrier 120 kHz → 117.5–122.5 kHz এ shift হলো</text:span></text:p>
      <text:p text:style-name="Text_20_body">Image-এ ঠিক এটাই দেখানো হয়েছে —<text:span text:style-name="T2"> 100, 110, 120 হলো subcarrier frequencies।</text:span></text:p>
      <text:p text:style-name="Text_20_body"><text:span text:style-name="Strong_20_Emphasis">Step 3: Guard Band</text:span></text:p>
      <text:p text:style-name="Text_20_body">Image-এ দেখো দুটো signal এর মাঝে ছোট ফাঁকা জায়গা আছে — এটাই <text:span text:style-name="Strong_20_Emphasis">Guard Band</text:span>।</text:p>
      <text:p text:style-name="Preformatted_20_Text"><text:span text:style-name="Source_20_Text">|--Signal 1--|--guard--|--Signal 2--|--guard--|--Signal 3--|</text:span></text:p>
      <text:p text:style-name="P2"><text:span text:style-name="Source_20_Text"><text:s text:c="4"/>100 kHz <text:s text:c="13"/>110 kHz <text:s text:c="14"/>120 kHz</text:span></text:p>
      <text:p text:style-name="P20">Guard Band কেন? → Interference ঠেকাতে! Adjacent signals যেন overlap না করে।</text:p>
      <text:p text:style-name="Text_20_body"><text:span text:style-name="Strong_20_Emphasis">Step 4: Combine করে পাঠাও</text:span></text:p>
      <text:p text:style-name="Text_20_body">তিনটা<text:span text:style-name="T2"> modulated signal কে </text:span><text:span text:style-name="Strong_20_Emphasis"><text:span text:style-name="T2">add</text:span></text:span><text:span text:style-name="T2"> করে একটাই signal বানাও → একটা medium দিয়ে পাঠা</text:span>ও।</text:p>
      <text:p text:style-name="Text_20_body"><text:span text:style-name="Strong_20_Emphasis">Step 5: Receiver এ Separate করো</text:span></text:p>
      <text:p text:style-name="Text_20_body"><text:soft-page-break/>Receiver-এ <text:span text:style-name="Strong_20_Emphasis">bandpass filter</text:span> ব্যবহার করা হয়:</text:p>
      <text:list text:style-name="L2">
        <text:list-item>
          <text:p text:style-name="P11">Filter 1: শুধু 97.5–102.5 kHz pass করবে → Signal 1 পাবে </text:p>
        </text:list-item>
        <text:list-item>
          <text:p text:style-name="P11">Filter 2: শুধু 107.5–112.5 kHz pass করবে → Signal 2 পাবে </text:p>
        </text:list-item>
        <text:list-item>
          <text:p text:style-name="P10">Filter 3: শুধু 117.5–122.5 kHz pass করবে → Signal 3 পাবে </text:p>
        </text:list-item>
      </text:list>
      <text:p text:style-name="Text_20_body">তারপর demodulate করলে original signal ফিরে পাওয়া যাবে।</text:p>
      <text:p text:style-name="Horizontal_20_Line"/>
      <text:h text:style-name="Heading_20_3" text:outline-level="3">📋 FDM এর Key Points (Image থেকে)</text:h>
      <text:p text:style-name="Text_20_body"><text:span text:style-name="Strong_20_Emphasis">1. Different Carrier Frequency:</text:span></text:p>
      <text:list text:style-name="L3">
        <text:list-item>
          <text:p text:style-name="P13">প্রতিটা signal কে আলাদা carrier দিয়ে modulate করা হয় </text:p>
        </text:list-item>
        <text:list-item>
          <text:p text:style-name="P13">এই carriers কে বলা হয় <text:span text:style-name="Strong_20_Emphasis">subcarriers</text:span> </text:p>
        </text:list-item>
        <text:list-item>
          <text:p text:style-name="P12">Image এ: 100, 110, 120 → তিনটা subcarrier </text:p>
        </text:list-item>
      </text:list>
      <text:p text:style-name="Text_20_body"><text:span text:style-name="Strong_20_Emphasis">2. Adequate Separation:</text:span></text:p>
      <text:list text:style-name="L4">
        <text:list-item>
          <text:p text:style-name="P15">Subcarriers এর মধ্যে যথেষ্ট gap রাখতে হবে </text:p>
        </text:list-item>
        <text:list-item>
          <text:p text:style-name="P14">যেন modulated signals এর spectrum overlap না করে </text:p>
        </text:list-item>
      </text:list>
      <text:p text:style-name="Text_20_body"><text:span text:style-name="Strong_20_Emphasis">3. Different Modulation:</text:span></text:p>
      <text:list text:style-name="L5">
        <text:list-item>
          <text:p text:style-name="P17">প্রতিটা signal আলাদা ধরনের modulation use করতে পারে </text:p>
        </text:list-item>
        <text:list-item>
          <text:p text:style-name="P16">কেউ AM, কেউ FM, কেউ PM use করতে পারে </text:p>
        </text:list-item>
      </text:list>
      <text:p text:style-name="Text_20_body"><text:span text:style-name="Strong_20_Emphasis">4. Guard Band:</text:span></text:p>
      <text:list text:style-name="L6">
        <text:list-item>
          <text:p text:style-name="P19">দুটো adjacent signal এর মধ্যে ছোট frequency gap </text:p>
        </text:list-item>
        <text:list-item>
          <text:p text:style-name="P19">Interference রোধ করে </text:p>
        </text:list-item>
        <text:list-item>
          <text:p text:style-name="P18">Receiver এ signal separation সহজ করে </text:p>
        </text:list-item>
      </text:list>
      <text:p text:style-name="Horizontal_20_Line"/>
      <text:h text:style-name="Heading_20_3" text:outline-level="3">🌍 FDM এর Real Life উদাহরণ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pplication</text:p>
            </table:table-cell>
            <table:table-cell table:style-name="Table2.A1" office:value-type="string">
              <text:p text:style-name="Table_20_Heading">কিভাবে FDM ব্যবহার হয়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FM Radio</text:span></text:p>
          </table:table-cell>
          <table:table-cell table:style-name="Table2.A1" office:value-type="string">
            <text:p text:style-name="Table_20_Contents">প্রতিটা station আলাদা frequency (88.1, 92.4 MHz etc.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able TV</text:span></text:p>
          </table:table-cell>
          <table:table-cell table:style-name="Table2.A1" office:value-type="string">
            <text:p text:style-name="Table_20_Contents">প্রতিটা channel আলাদা frequency ban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SL Internet</text:span></text:p>
          </table:table-cell>
          <table:table-cell table:style-name="Table2.A1" office:value-type="string">
            <text:p text:style-name="Table_20_Contents">Voice ও data আলাদা frequency band use করে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ld Telephone</text:span></text:p>
          </table:table-cell>
          <table:table-cell table:style-name="Table2.A1" office:value-type="string">
            <text:p text:style-name="Table_20_Contents">Multiple calls একটা cable দিয়ে</text:p>
          </table:table-cell>
        </table:table-row>
      </table:table>
      <text:p text:style-name="Horizontal_20_Line"/>
      <text:p text:style-name="Text_20_body"/>
      <text:h text:style-name="Heading_20_3" text:outline-level="3"><text:soft-page-break/>✅ FDM এর সুবিধা ও অসুবিধা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সুবিধা</text:p>
            </table:table-cell>
            <table:table-cell table:style-name="Table3.A1" office:value-type="string">
              <text:p text:style-name="Table_20_Heading">অসুবিধা</text:p>
            </table:table-cell>
          </table:table-row>
        </table:table-header-rows>
        <table:table-row>
          <table:table-cell table:style-name="Table3.A1" office:value-type="string">
            <text:p text:style-name="Table_20_Contents">Simple concept</text:p>
          </table:table-cell>
          <table:table-cell table:style-name="Table3.A1" office:value-type="string">
            <text:p text:style-name="P5">Bandwidth waste (guard band এর জন্য)</text:p>
          </table:table-cell>
        </table:table-row>
        <table:table-row>
          <table:table-cell table:style-name="Table3.A1" office:value-type="string">
            <text:p text:style-name="Table_20_Contents">সব signals একসাথে চলে (no waiting)</text:p>
          </table:table-cell>
          <table:table-cell table:style-name="Table3.A1" office:value-type="string">
            <text:p text:style-name="Table_20_Contents">Interference হওয়ার সম্ভাবনা</text:p>
          </table:table-cell>
        </table:table-row>
        <table:table-row>
          <table:table-cell table:style-name="Table3.A1" office:value-type="string">
            <text:p text:style-name="P5">Analog signals এর জন্য ideal</text:p>
          </table:table-cell>
          <table:table-cell table:style-name="Table3.A1" office:value-type="string">
            <text:p text:style-name="Table_20_Contents">সব users কে fixed bandwidth দেওয়া হয়</text:p>
          </table:table-cell>
        </table:table-row>
        <table:table-row>
          <table:table-cell table:style-name="Table3.A1" office:value-type="string">
            <text:p text:style-name="P5">No synchronization দরকার</text:p>
          </table:table-cell>
          <table:table-cell table:style-name="Table3.A1" office:value-type="string">
            <text:p text:style-name="P5">কেউ use না করলেও bandwidth reserved থাকে</text:p>
          </table:table-cell>
        </table:table-row>
      </table:table>
      <text:p text:style-name="Horizontal_20_Line"/>
      <text:h text:style-name="Heading_20_3" text:outline-level="3"/>
      <text:h text:style-name="Heading_20_1" text:outline-level="1">Time Division Multiplexing (TDM) &amp; TDMA </text:h>
      <text:p text:style-name="Horizontal_20_Line"/>
      <text:h text:style-name="Heading_20_2" text:outline-level="2">🔷 Part 1: TDM এর মূল Concept (Image 1)</text:h>
      <text:h text:style-name="Heading_20_3" text:outline-level="3">TDM কী?</text:h>
      <text:p text:style-name="Text_20_body">FDM এ frequency ভাগ করা হয়। TDM এ <text:span text:style-name="Strong_20_Emphasis">সময় (time) ভাগ করা হয়।</text:span></text:p>
      <text:p text:style-name="Quotations"><text:span text:style-name="Strong_20_Emphasis">TDM = </text:span><text:span text:style-name="Strong_20_Emphasis"><text:span text:style-name="T2">Time কে different channels এর মধ্যে divide করো</text:span></text:span></text:p>
      <text:p text:style-name="Text_20_body">Image এ লেখা উদাহরণ:</text:p>
      <text:p text:style-name="Preformatted_20_Text"><text:span text:style-name="Source_20_Text">1 second time → 0.5s <text:s/>→ A signal কে দিচ্ছে</text:span></text:p>
      <text:p text:style-name="P2"><text:span text:style-name="Source_20_Text"><text:s text:c="15"/>→ 0.5s <text:s/>→ B signal কে দিচ্ছে</text:span></text:p>
      <text:p text:style-name="P20">মানে একই channel এ A আর B পালা করে সময় পায়।</text:p>
      <text:p text:style-name="Horizontal_20_Line"/>
      <text:h text:style-name="Heading_20_3" text:outline-level="3">Pulse Modulation — দুই ধরনের</text:h>
      <text:p text:style-name="Text_20_body"><text:span text:style-name="Strong_20_Emphasis"><text:span text:style-name="T2">PWM (Pulse Width Modulation):</text:span></text:span></text:p>
      <text:list text:style-name="L7">
        <text:list-item>
          <text:p text:style-name="P21">Image এ দেখো → দুটো rectangular pulse আছে </text:p>
        </text:list-item>
        <text:list-item>
          <text:p text:style-name="P21">Amplitude এর উপর depend করে <text:span text:style-name="Strong_20_Emphasis">width</text:span> change হয় </text:p>
        </text:list-item>
        <text:list-item>
          <text:p text:style-name="P43">Signal এর amplitude বেশি → pulse চওড়া হয় </text:p>
        </text:list-item>
        <text:list-item>
          <text:p text:style-name="P44">Signal এর amplitude কম → pulse সরু হয় </text:p>
        </text:list-item>
      </text:list>
      <text:p text:style-name="Text_20_body"><text:span text:style-name="Strong_20_Emphasis"><text:span text:style-name="T2">PAM (Pulse Amplitude Modulation):</text:span></text:span></text:p>
      <text:list text:style-name="L8">
        <text:list-item>
          <text:p text:style-name="P23">Analog signal এর amplitude এর উপর base করে <text:span text:style-name="Strong_20_Emphasis">pulse এর amplitude</text:span> define করা হয় </text:p>
        </text:list-item>
        <text:list-item>
          <text:p text:style-name="P23">Height change হয় (image এ "height change রে" লেখা) </text:p>
        </text:list-item>
        <text:list-item>
          <text:p text:style-name="P22">Image এর diagram এ g₁(t) এবং g₂(t) দুটো আলাদা signal </text:p>
        </text:list-item>
      </text:list>
      <text:h text:style-name="Heading_20_3" text:outline-level="3"><text:soft-page-break/>গুরুত্বপূর্ণ কথা:</text:h>
      <text:p text:style-name="Quotations"><text:span text:style-name="T4">Analog signal এ </text:span><text:span text:style-name="Strong_20_Emphasis"><text:span text:style-name="T4">ফাঁকা জায়গা নাই</text:span></text:span><text:span text:style-name="T4"> actually (time domain এ) কিন্তু pulse modulation করলে </text:span><text:span text:style-name="Strong_20_Emphasis"><text:span text:style-name="T4">ফাঁকে ফাঁকে</text:span></text:span><text:span text:style-name="T4"> অন্য signal ঢোকানো যায়!</text:span></text:p>
      <text:p text:style-name="Text_20_body">এটাই TDM এর চাবিকাঠি — pulse এর মাঝের ফাঁকা সময়ে অন্য signal পাঠাও।</text:p>
      <text:p text:style-name="Horizontal_20_Line"/>
      <text:h text:style-name="Heading_20_2" text:outline-level="2">🔷 Part 2: Bit Interleaving vs Word Interleaving (Image 2)</text:h>
      <text:h text:style-name="Heading_20_3" text:outline-level="3">(a) Bit Interleaving</text:h>
      <text:p text:style-name="P2"><text:span text:style-name="Source_20_Text">Output: A₁ B₁ C₁ D₁ A₂ B₂ C₂ D₂ A₃ B₃ C₃ D₃ A₄ B₄ C₄ D₄</text:span></text:p>
      <text:list text:style-name="L9">
        <text:list-item>
          <text:p text:style-name="P25">চারটা channel A, B, C, D আছে </text:p>
        </text:list-item>
        <text:list-item>
          <text:p text:style-name="P25">প্রতিটা channel থেকে <text:span text:style-name="Strong_20_Emphasis">একটা করে bit</text:span> নিয়ে পাঠানো হয় </text:p>
        </text:list-item>
        <text:list-item>
          <text:p text:style-name="P24">Rotary switch এর মতো ঘুরতে থাকে → A থেকে ১ bit, B থেকে ১ bit... </text:p>
        </text:list-item>
      </text:list>
      <text:p text:style-name="Text_20_body"><text:span text:style-name="Strong_20_Emphasis">সমস্যা কী?</text:span></text:p>
      <text:list text:style-name="L10">
        <text:list-item>
          <text:p text:style-name="P27">সব channel এর <text:span text:style-name="Strong_20_Emphasis"><text:span text:style-name="T4">bit rate same হতে হবে</text:span></text:span> </text:p>
        </text:list-item>
        <text:list-item>
          <text:p text:style-name="P27">Video + Audio একসাথে দিতে চাইলে সমস্যা: </text:p>
          <text:list>
            <text:list-item>
              <text:p text:style-name="P27">Video channel এ অনেক বেশি data → slow audio channel এর জন্য wait করতে হবে </text:p>
            </text:list-item>
            <text:list-item>
              <text:p text:style-name="P26">Optical fiber (fast) আর Coaxial cable (slow) একসাথে ব্যবহার করা যাবে না </text:p>
            </text:list-item>
          </text:list>
        </text:list-item>
      </text:list>
      <text:p text:style-name="Horizontal_20_Line"/>
      <text:h text:style-name="Heading_20_3" text:outline-level="3">(b) Word Interleaving</text:h>
      <text:p text:style-name="P2"><text:span text:style-name="Source_20_Text">Output: A₁A₂A₃A₄ B₁B₂B₃B₄ C₁C₂C₃C₄ D₁D₂D₃D₄</text:span></text:p>
      <text:list text:style-name="L11">
        <text:list-item>
          <text:p text:style-name="P29">একটা channel থেকে একবারে <text:span text:style-name="Strong_20_Emphasis">একটা পুরো word (multiple bits)</text:span> নেওয়া হয় </text:p>
        </text:list-item>
        <text:list-item>
          <text:p text:style-name="P28">সব A এর bits → তারপর সব B এর bits → তারপর C → তারপর D </text:p>
        </text:list-item>
      </text:list>
      <text:p text:style-name="Text_20_body"><text:span text:style-name="Strong_20_Emphasis">সুবিধা:</text:span></text:p>
      <text:list text:style-name="L12">
        <text:list-item>
          <text:p text:style-name="P31">Channel গুলোর bit rate আলাদা হলেও চলে </text:p>
        </text:list-item>
        <text:list-item>
          <text:p text:style-name="P30">Video + Audio মিলিয়ে দেওয়া সহজ </text:p>
        </text:list-item>
      </text:list>
      <text:p text:style-name="Horizontal_20_Line"/>
      <text:h text:style-name="Heading_20_2" text:outline-level="2">🔷 Part 3: Unequal Data Rates (Image 3)</text:h>
      <text:h text:style-name="Heading_20_3" text:outline-level="3">(c) High Rate Channel এর সমস্যা</text:h>
      <text:p text:style-name="Text_20_body">Image এ:</text:p>
      <text:list text:style-name="L13">
        <text:list-item>
          <text:p text:style-name="P33"><text:span text:style-name="Strong_20_Emphasis"><text:span text:style-name="T4">A → High rate channel → rate = 3r</text:span></text:span><text:span text:style-name="T4"> </text:span></text:p>
        </text:list-item>
        <text:list-item>
          <text:p text:style-name="P32"><text:span text:style-name="Strong_20_Emphasis"><text:span text:style-name="T4">B, C, D → Low rate channel → rate = r</text:span></text:span><text:span text:style-name="T4"> </text:span></text:p>
        </text:list-item>
      </text:list>
      <text:p text:style-name="P2"><text:soft-page-break/><text:span text:style-name="Source_20_Text">Output: A₁ B₁ A₂ C₁ A₃ D₁ A₄ B₂ A₅ C₂ A₆ D₂</text:span></text:p>
      <text:p text:style-name="P45">A channel এর data বেশি তাই সে বেশি slot পায়। B, C, D মিলে A এর সমান।</text:p>
      <text:p text:style-name="Quotations"><text:span text:style-name="Strong_20_Emphasis"><text:span text:style-name="T4">A এর সব data satisfy হবে</text:span></text:span><text:span text:style-name="T4"> — মানে A কে বেশি time দেওয়া হচ্ছে।</text:span></text:p>
      <text:p text:style-name="Horizontal_20_Line"/>
      <text:h text:style-name="Heading_20_3" text:outline-level="3">(d) Mixed Rate — Different Implementation</text:h>
      <text:list text:style-name="L14">
        <text:list-item>
          <text:p text:style-name="P35">B, C, D কে আলাদাভাবে mix করা হয় → তারপর A এর সাথে combine </text:p>
        </text:list-item>
        <text:list-item>
          <text:p text:style-name="P34"><text:span text:style-name="Strong_20_Emphasis">Result same, কিন্তু circuit implementation আলাদা</text:span> </text:p>
        </text:list-item>
      </text:list>
      <text:p text:style-name="Text_20_body"><text:span text:style-name="Strong_20_Emphasis">সমস্যা:</text:span></text:p>
      <text:list text:style-name="L15">
        <text:list-item>
          <text:p text:style-name="P46">Synchronize করতে হবে </text:p>
        </text:list-item>
        <text:list-item>
          <text:p text:style-name="P46">Optical cable তে synchronize করা যায় না সহজে </text:p>
        </text:list-item>
        <text:list-item>
          <text:p text:style-name="P46">Coaxial cable তে sync করা যায় </text:p>
        </text:list-item>
        <text:list-item>
          <text:p text:style-name="P47">Physical medium এর অনেক conditions থাকে </text:p>
        </text:list-item>
      </text:list>
      <text:p text:style-name="Horizontal_20_Line"/>
      <text:h text:style-name="Heading_20_2" text:outline-level="2">🔷 Part 4: Synchronization এবং Framing (Image 4)</text:h>
      <text:h text:style-name="Heading_20_3" text:outline-level="3">বাস্তব সমস্যা — Temperature!</text:h>
      <text:p text:style-name="Text_20_body">Image এ গাছের diagram দেখো:</text:p>
      <text:list text:style-name="L16">
        <text:list-item>
          <text:p text:style-name="P37">Temperature 1°C drop হলে </text:p>
        </text:list-item>
        <text:list-item>
          <text:p text:style-name="P37">Electricity conduction rate কমে </text:p>
        </text:list-item>
        <text:list-item>
          <text:p text:style-name="P37">Signal rate slow হয় </text:p>
        </text:list-item>
        <text:list-item>
          <text:p text:style-name="P36">বাকিগুলো ঠিক থাকে → <text:span text:style-name="Strong_20_Emphasis">Sync কীভাবে হবে?</text:span> </text:p>
        </text:list-item>
      </text:list>
      <text:p text:style-name="Text_20_body">এই কারণেই Framing দরকার!</text:p>
      <text:p text:style-name="Horizontal_20_Line"/>
      <text:h text:style-name="Heading_20_3" text:outline-level="3">Frame Structure</text:h>
      <text:p text:style-name="Text_20_body">Image এ দেখো চারটা row (4টা channel এর জন্য):</text:p>
      <text:p text:style-name="Preformatted_20_Text"><text:span text:style-name="Source_20_Text">Row 0: M₀ [48] Cₐ [48] F₀ [48] Cₐ [48] Cₐ [48] F₁ [48] <text:s/>← A channel</text:span></text:p>
      <text:p text:style-name="Preformatted_20_Text"><text:span text:style-name="Source_20_Text">Row 1: M₁ [48] C_B [48] F₀ [48] C_B [48] C_B [48] F₁ [48] <text:s/>← B channel <text:s/></text:span></text:p>
      <text:p text:style-name="Preformatted_20_Text"><text:span text:style-name="Source_20_Text">Row 2: M₁ [48] C_C [48] F₀ [48] C_C [48] C_C [48] F₁ [48] <text:s/>← C channel</text:span></text:p>
      <text:p text:style-name="P2"><text:span text:style-name="Source_20_Text">Row 3: M₁ [48] C_D [48] F₀ [48] C_D [48] C_D [48] F₁ [48] <text:s/>← D channel</text:span></text:p>
      <text:p text:style-name="Text_20_body"><text:span text:style-name="Strong_20_Emphasis">প্রতিটা element এর মানে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ymbol</text:p>
            </table:table-cell>
            <table:table-cell table:style-name="Table4.A1" office:value-type="string">
              <text:p text:style-name="Table_20_Heading">মানে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M₀, M₁</text:span></text:p>
          </table:table-cell>
          <table:table-cell table:style-name="Table4.A1" office:value-type="string">
            <text:p text:style-name="Table_20_Contents">Overhead bit — synchronization এর জন্য। M₀=0, বাকিগুলো=1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[48]</text:span></text:p>
          </table:table-cell>
          <table:table-cell table:style-name="Table4.A1" office:value-type="string">
            <text:p text:style-name="Table_20_Contents">48টা data bit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trong_20_Emphasis">C</text:span></text:p>
          </table:table-cell>
          <table:table-cell table:style-name="Table4.A1" office:value-type="string">
            <text:p text:style-name="Table_20_Contents">Extra bit — channel কোনটা fast/slow সেটা বুঝতে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₀, F₁</text:span></text:p>
          </table:table-cell>
          <table:table-cell table:style-name="Table4.A1" office:value-type="string">
            <text:p text:style-name="P6">Frame synchronization bit — receiver এর সাথে sender এর clock ঠিক আছে কিনা check করে</text:p>
          </table:table-cell>
        </table:table-row>
      </table:table>
      <text:p text:style-name="Horizontal_20_Line"/>
      <text:h text:style-name="Heading_20_3" text:outline-level="3">Bit/Byte Stuffing</text:h>
      <text:list text:style-name="L17">
        <text:list-item>
          <text:p text:style-name="P39">C bit → Extra bit send করে </text:p>
        </text:list-item>
        <text:list-item>
          <text:p text:style-name="P39">কোনো bit ফাঁকা রাখতে সেই info রাখে </text:p>
        </text:list-item>
        <text:list-item>
          <text:p text:style-name="P48">যখন channel কোনোটা fast/slow হয়ে যায় → C bit দিয়ে জানানো হয় </text:p>
        </text:list-item>
        <text:list-item>
          <text:p text:style-name="P38"><text:span text:style-name="T4">এটাকে বলে </text:span><text:span text:style-name="Strong_20_Emphasis"><text:span text:style-name="T4">Bit/Byte Stuffing</text:span></text:span><text:span text:style-name="T4"> </text:span></text:p>
        </text:list-item>
      </text:list>
      <text:p text:style-name="Text_20_body"><text:span text:style-name="Strong_20_Emphasis">F bit এর কাজ:</text:span></text:p>
      <text:list text:style-name="L18">
        <text:list-item>
          <text:p text:style-name="P49">Word এর ভেতরে synchronization ঠিক আছে কিনা check </text:p>
        </text:list-item>
        <text:list-item>
          <text:p text:style-name="P50">Receiver এর সাথে sender এর clock okay কিনা verify </text:p>
        </text:list-item>
      </text:list>
      <text:p text:style-name="P1"/>
      <text:h text:style-name="Heading_20_2" text:outline-level="2">🔷 Part 5: TDMA — Time Division Multiple Access (Images 5, 6)</text:h>
      <text:h text:style-name="Heading_20_3" text:outline-level="3">TDM vs TDMA পার্থক্য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/>
            </table:table-cell>
            <table:table-cell table:style-name="Table5.A1" office:value-type="string">
              <text:p text:style-name="Table_20_Heading">TDM</text:p>
            </table:table-cell>
            <table:table-cell table:style-name="Table5.A1" office:value-type="string">
              <text:p text:style-name="Table_20_Heading">TDMA</text:p>
            </table:table-cell>
          </table:table-row>
        </table:table-header-rows>
        <table:table-row>
          <table:table-cell table:style-name="Table5.A1" office:value-type="string">
            <text:p text:style-name="Table_20_Contents">কে</text:p>
          </table:table-cell>
          <table:table-cell table:style-name="Table5.A1" office:value-type="string">
            <text:p text:style-name="Table_20_Contents">একটা system নিজেই সব combine করে</text:p>
          </table:table-cell>
          <table:table-cell table:style-name="Table5.A1" office:value-type="string">
            <text:p text:style-name="Table_20_Contents">Multiple আলাদা users share করে</text:p>
          </table:table-cell>
        </table:table-row>
        <table:table-row>
          <table:table-cell table:style-name="Table5.A1" office:value-type="string">
            <text:p text:style-name="Table_20_Contents">Control</text:p>
          </table:table-cell>
          <table:table-cell table:style-name="Table5.A1" office:value-type="string">
            <text:p text:style-name="Table_20_Contents">Centralized</text:p>
          </table:table-cell>
          <table:table-cell table:style-name="Table5.A1" office:value-type="string">
            <text:p text:style-name="Table_20_Contents">Distributed</text:p>
          </table:table-cell>
        </table:table-row>
        <table:table-row>
          <table:table-cell table:style-name="Table5.A1" office:value-type="string">
            <text:p text:style-name="Table_20_Contents">উদাহরণ</text:p>
          </table:table-cell>
          <table:table-cell table:style-name="Table5.A1" office:value-type="string">
            <text:p text:style-name="Table_20_Contents">Telephone trunk line</text:p>
          </table:table-cell>
          <table:table-cell table:style-name="Table5.A1" office:value-type="string">
            <text:p text:style-name="Table_20_Contents">Mobile network (GSM)</text:p>
          </table:table-cell>
        </table:table-row>
      </table:table>
      <text:p text:style-name="Horizontal_20_Line"/>
      <text:h text:style-name="Heading_20_3" text:outline-level="3">TDMA কী? (Image 6)</text:h>
      <text:p text:style-name="Quotations">একটা channel কে multiple user share করে <text:span text:style-name="Strong_20_Emphasis">time এর ভাগে ভাগে</text:span></text:p>
      <text:p text:style-name="Text_20_body">Image 5 এর diagram:</text:p>
      <text:list text:style-name="L19">
        <text:list-item>
          <text:p text:style-name="P41">একটা central node আছে </text:p>
        </text:list-item>
        <text:list-item>
          <text:p text:style-name="P41">অনেকগুলো line connect হচ্ছে </text:p>
        </text:list-item>
        <text:list-item>
          <text:p text:style-name="P51">TDMA তে capacity র বেশি user যাচ্ছে! </text:p>
        </text:list-item>
        <text:list-item>
          <text:p text:style-name="P41">4টার বেশি line রাখছে </text:p>
        </text:list-item>
        <text:list-item>
          <text:p text:style-name="P40"><text:span text:style-name="Strong_20_Emphasis">Resource utilization better হচ্ছে</text:span> </text:p>
        </text:list-item>
      </text:list>
      <text:p text:style-name="Horizontal_20_Line"/>
      <text:h text:style-name="Heading_20_3" text:outline-level="3"><text:soft-page-break/>TDMA এর চালাক ব্যবহার (Image 6)</text:h>
      <text:p text:style-name="Text_20_body">Key insight:</text:p>
      <text:p text:style-name="Quotations"><text:span text:style-name="Strong_20_Emphasis">সব incoming channels সবসময় active থাকে না</text:span> — কেউ data পাঠাচ্ছে, কেউ idle আছে</text:p>
      <text:p text:style-name="Text_20_body">এই observation থেকে TDMA এর সুবিধা:</text:p>
      <text:list text:style-name="L20">
        <text:list-item>
          <text:p text:style-name="P52">Idle channel এর time অন্যরা use করতে পারে </text:p>
        </text:list-item>
        <text:list-item>
          <text:p text:style-name="P52">Traffic pattern ও statistics দেখে multiple channel accept করা যায় </text:p>
        </text:list-item>
        <text:list-item>
          <text:p text:style-name="P42"><text:span text:style-name="T6">4টা physical channel এর জায়গায় 6-7 জন user চালানো যাচ্ছে</text:span>! </text:p>
        </text:list-item>
      </text:list>
      <text:p text:style-name="Text_20_body"><text:span text:style-name="Strong_20_Emphasis">উদাহরণ:</text:span> GSM Mobile Network</text:p>
      <text:p text:style-name="Preformatted_20_Text"><text:span text:style-name="Source_20_Text">একটা frequency band → 8টা time slot</text:span></text:p>
      <text:p text:style-name="Preformatted_20_Text"><text:span text:style-name="Source_20_Text">8 জন user পালা করে প্রতিটা slot use করে</text:span></text:p>
      <text:p text:style-name="P2"><text:span text:style-name="Source_20_Text">কেউ কথা না বললে → সেই slot অন্যরা নেয়</text:span></text:p>
      <text:p text:style-name="Horizontal_20_Line"/>
      <text:h text:style-name="Heading_20_2" text:outline-level="2">📊 সম্পূর্ণ TDM Summary</text:h>
      <text:p text:style-name="Preformatted_20_Text"><text:span text:style-name="Source_20_Text">TDM</text:span></text:p>
      <text:p text:style-name="Preformatted_20_Text"><text:span text:style-name="Source_20_Text">├── Analog TDM (PAM based)</text:span></text:p>
      <text:p text:style-name="Preformatted_20_Text"><text:span text:style-name="Source_20_Text">│ <text:s text:c="2"/>└── Pulse এর ফাঁকে অন্য signal</text:span></text:p>
      <text:p text:style-name="Preformatted_20_Text"><text:span text:style-name="Source_20_Text">│</text:span></text:p>
      <text:p text:style-name="Preformatted_20_Text"><text:span text:style-name="Source_20_Text">├── Digital TDM</text:span></text:p>
      <text:p text:style-name="Preformatted_20_Text"><text:span text:style-name="Source_20_Text">│ <text:s text:c="2"/>├── Bit Interleaving → একটা একটা bit নেওয়া</text:span></text:p>
      <text:p text:style-name="Preformatted_20_Text"><text:span text:style-name="Source_20_Text">│ <text:s text:c="2"/>└── Word Interleaving → পুরো word নেওয়া</text:span></text:p>
      <text:p text:style-name="Preformatted_20_Text"><text:span text:style-name="Source_20_Text">│</text:span></text:p>
      <text:p text:style-name="Preformatted_20_Text"><text:span text:style-name="Source_20_Text">├── Synchronization</text:span></text:p>
      <text:p text:style-name="Preformatted_20_Text"><text:span text:style-name="Source_20_Text">│ <text:s text:c="2"/>├── Frame bits (M, F)</text:span></text:p>
      <text:p text:style-name="Preformatted_20_Text"><text:span text:style-name="Source_20_Text">│ <text:s text:c="2"/>├── Overhead bits</text:span></text:p>
      <text:p text:style-name="Preformatted_20_Text"><text:span text:style-name="Source_20_Text">│ <text:s text:c="2"/>└── Bit/Byte Stuffing (C bits)</text:span></text:p>
      <text:p text:style-name="Preformatted_20_Text"><text:span text:style-name="Source_20_Text">│</text:span></text:p>
      <text:p text:style-name="Preformatted_20_Text"><text:span text:style-name="Source_20_Text">└── TDMA (Multiple Access version)</text:span></text:p>
      <text:p text:style-name="Preformatted_20_Text"><text:span text:style-name="Source_20_Text"><text:s text:c="4"/>├── Idle channel এর slot reuse</text:span></text:p>
      <text:p text:style-name="P2"><text:span text:style-name="Source_20_Text"><text:s text:c="4"/>└── Traffic statistics based allocation</text:span></text:p>
      <text:p text:style-name="Horizontal_20_Line"/>
      <text:h text:style-name="Heading_20_2" text:outline-level="2">💡 FDM vs TDM — এক নজরে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বিষয়</text:p>
            </table:table-cell>
            <table:table-cell table:style-name="Table6.A1" office:value-type="string">
              <text:p text:style-name="Table_20_Heading">FDM</text:p>
            </table:table-cell>
            <table:table-cell table:style-name="Table6.A1" office:value-type="string">
              <text:p text:style-name="Table_20_Heading">TDM</text:p>
            </table:table-cell>
          </table:table-row>
        </table:table-header-rows>
        <table:table-row>
          <table:table-cell table:style-name="Table6.A1" office:value-type="string">
            <text:p text:style-name="Table_20_Contents">কী ভাগ হয়</text:p>
          </table:table-cell>
          <table:table-cell table:style-name="Table6.A1" office:value-type="string">
            <text:p text:style-name="Table_20_Contents">Frequency</text:p>
          </table:table-cell>
          <table:table-cell table:style-name="Table6.A1" office:value-type="string">
            <text:p text:style-name="Table_20_Contents">Time</text:p>
          </table:table-cell>
        </table:table-row>
        <table:table-row>
          <table:table-cell table:style-name="Table6.A1" office:value-type="string">
            <text:p text:style-name="Table_20_Contents">Signal type</text:p>
          </table:table-cell>
          <table:table-cell table:style-name="Table6.A1" office:value-type="string">
            <text:p text:style-name="Table_20_Contents">Analog ভালো</text:p>
          </table:table-cell>
          <table:table-cell table:style-name="Table6.A1" office:value-type="string">
            <text:p text:style-name="Table_20_Contents">Digital ভালো</text:p>
          </table:table-cell>
        </table:table-row>
        <table:table-row>
          <table:table-cell table:style-name="Table6.A1" office:value-type="string">
            <text:p text:style-name="Table_20_Contents">Interference</text:p>
          </table:table-cell>
          <table:table-cell table:style-name="Table6.A1" office:value-type="string">
            <text:p text:style-name="Table_20_Contents">Guard band লাগে</text:p>
          </table:table-cell>
          <table:table-cell table:style-name="Table6.A1" office:value-type="string">
            <text:p text:style-name="Table_20_Contents">Sync লাগে</text:p>
          </table:table-cell>
        </table:table-row>
        <table:table-row>
          <table:table-cell table:style-name="Table6.A1" office:value-type="string">
            <text:p text:style-name="Table_20_Contents">উদাহরণ</text:p>
          </table:table-cell>
          <table:table-cell table:style-name="Table6.A1" office:value-type="string">
            <text:p text:style-name="Table_20_Contents">FM Radio, Cable TV</text:p>
          </table:table-cell>
          <table:table-cell table:style-name="Table6.A1" office:value-type="string">
            <text:p text:style-name="Table_20_Contents">Telephone, GSM</text:p>
          </table:table-cell>
        </table:table-row>
      </table:table>
      <text:p text:style-name="Text_20_body"/>
      <text:p text:style-name="Text_20_body"/>
      <text:p text:style-name="Text_20_body"/>
      <text:h text:style-name="Heading_20_3" text:outline-level="3"><text:soft-page-break/>🔷 সব মিলিয়ে একটা Complete Example</text:h>
      <text:p text:style-name="Text_20_body"><text:span text:style-name="Strong_20_Emphasis">Setup:</text:span> 3টা channel, প্রতিটা 4 bits/frame</text:p>
      <text:p text:style-name="Text_20_body"/>
      <text:p text:style-name="Text_20_body">Channel A data: 1010 | 1100 | 0011</text:p>
      <text:p text:style-name="Text_20_body">Channel B data: 0101 | 1111 | 0000 <text:s/></text:p>
      <text:p text:style-name="Text_20_body">Channel C data: 1001 | 0110 | 1010</text:p>
      <text:p text:style-name="Text_20_body"/>
      <text:p text:style-name="Text_20_body">Frame তৈরি (Bit Interleaving + Framing bit):</text:p>
      <text:p text:style-name="Text_20_body">Frame 1: [F=1] A₁B₁C₁ A₂B₂C₂ A₃B₃C₃ A₄B₄C₄</text:p>
      <text:p text:style-name="Text_20_body"><text:s text:c="7"/>= [1] <text:s text:c="2"/>1,0,1 <text:s text:c="2"/>0,1,0 <text:s text:c="2"/>1,0,0 <text:s text:c="2"/>0,1,1</text:p>
      <text:p text:style-name="Text_20_body"/>
      <text:p text:style-name="Text_20_body">Transmitted: 1 | 1 0 1 | 0 1 0 | 1 0 0 | 0 1 1</text:p>
      <text:p text:style-name="Text_20_body"/>
      <text:p text:style-name="Text_20_body">Frame 2: [F=0] A₁B₁C₁ A₂B₂C₂ A₃B₃C₃ A₄B₄C₄</text:p>
      <text:p text:style-name="Text_20_body"><text:s text:c="7"/>= [0] <text:s text:c="2"/>1,1,0 <text:s text:c="2"/>1,1,1 <text:s text:c="2"/>0,1,1 <text:s text:c="2"/>0,1,0</text:p>
      <text:p text:style-name="Text_20_body"/>
      <text:p text:style-name="Text_20_body">Transmitted: 0 | 1 1 0 | 1 1 1 | 0 1 1 | 0 1 0</text:p>
      <text:p text:style-name="Text_20_body"/>
      <text:p text:style-name="Text_20_body">Receiver এ:</text:p>
      <text:p text:style-name="Text_20_body">Received: 1|101010100011 | 0|110111011010 | ...</text:p>
      <text:p text:style-name="Text_20_body"><text:s text:c="10"/>↑ ← 12 bits → <text:s text:c="2"/>↑ ← 12 bits →</text:p>
      <text:p text:style-name="Text_20_body"><text:s text:c="9"/>F=1 <text:s text:c="12"/>F=0</text:p>
      <text:p text:style-name="Text_20_body"/>
      <text:p text:style-name="Text_20_body">F pattern: 1,0,1,0... ✓ Synchronized!</text:p>
      <text:p text:style-name="Text_20_body"/>
      <text:p text:style-name="Text_20_body">Frame 1 decode:</text:p>
      <text:p text:style-name="Text_20_body">Position 1,4,7,10 → Channel A: 1,0,1,0 ✓</text:p>
      <text:p text:style-name="Text_20_body">Position 2,5,8,11 → Channel B: 0,1,0,1 ✓</text:p>
      <text:p text:style-name="Text_20_body">Position 3,6,9,12 → Channel C: 1,0,0,1 ✓</text:p>
      <text:p text:style-name="Standard"/>
      <text:p text:style-name="Standard"/>
      <text:p text:style-name="Standard"/>
      <text:p text:style-name="Standard"/>
      <text:h text:style-name="Heading_20_1" text:outline-level="1"><text:soft-page-break/>OFDM &amp; CDMA — বিস্তারিত ব্যাখ্যা</text:h>
      <text:p text:style-name="Horizontal_20_Line"/>
      <text:h text:style-name="Heading_20_2" text:outline-level="2">🔷 Part 1: OFDM — Orthogonal Frequency Division Modulation</text:h>
      <text:h text:style-name="Heading_20_3" text:outline-level="3">মূল সমস্যা (Image 1)</text:h>
      <text:p text:style-name="Text_20_body">ধরো তোমার কাছে <text:span text:style-name="Strong_20_Emphasis">16s</text:span> (16 symbols) data আছে। একটা carrier দিয়ে পাঠাতে হবে।</text:p>
      <text:p text:style-name="Text_20_body"><text:span text:style-name="Strong_20_Emphasis">Normal way (Sequential):</text:span></text:p>
      <text:p text:style-name="Preformatted_20_Text"><text:span text:style-name="Source_20_Text">→ একটা একটা করে পাঠাও</text:span></text:p>
      <text:p text:style-name="P2"><text:span text:style-name="Source_20_Text">→ সময় লাগে: 16 units</text:span></text:p>
      <text:p text:style-name="Text_20_body"><text:span text:style-name="Strong_20_Emphasis">কিন্তু 8s কে দুটো ভাগে পাঠাতে চাইলে:</text:span></text:p>
      <text:p text:style-name="Preformatted_20_Text"><text:span text:style-name="Source_20_Text">fc₁ দিয়ে: 8s পাঠাও</text:span></text:p>
      <text:p text:style-name="Preformatted_20_Text"><text:span text:style-name="Source_20_Text">fc₂ দিয়ে: 8s পাঠাও</text:span></text:p>
      <text:p text:style-name="Preformatted_20_Text"><text:span text:style-name="Source_20_Text">→ 2টা carrier লাগবে</text:span></text:p>
      <text:p text:style-name="P2"><text:span text:style-name="Source_20_Text">→ Bandwidth double লাগবে ← সমস্যা!</text:span></text:p>
      <text:p text:style-name="Text_20_body">Image এ এই সমস্যাই দেখানো হয়েছে। তাহলে সমাধান কী?</text:p>
      <text:p text:style-name="Horizontal_20_Line"/>
      <text:h text:style-name="Heading_20_3" text:outline-level="3">OFDM এর সমাধান — Orthogonality! (Image 2)</text:h>
      <text:p text:style-name="Text_20_body"><text:span text:style-name="Strong_20_Emphasis">Key Insight:</text:span> Fourier Series এ sine ও cosine <text:span text:style-name="Strong_20_Emphasis">orthogonal</text:span> — মানে একটা আরেকটার সাথে <text:span text:style-name="Strong_20_Emphasis">mathematically independent</text:span>।</text:p>
      <text:p text:style-name="P2"><text:span text:style-name="Source_20_Text">∫ sin(2πf₁t) × sin(2πf₂t) dt = 0 <text:s/>(যদি f₁ ≠ f₂)</text:span></text:p>
      <text:p text:style-name="Text_20_body">এই property use করলে <text:span text:style-name="Strong_20_Emphasis">subcarriers overlap করলেও interference হয় না!</text:span></text:p>
      <text:p text:style-name="Horizontal_20_Line"/>
      <text:h text:style-name="Heading_20_3" text:outline-level="3">OFDM কীভাবে কাজ করে — Step by Step</text:h>
      <text:p text:style-name="Text_20_body"><text:span text:style-name="Strong_20_Emphasis">Step 1: Data ভাগ করো</text:span></text:p>
      <text:p text:style-name="Preformatted_20_Text"><text:span text:style-name="Source_20_Text">Original data: 1 0 1 1 0 0 1 0 1 1 0 1 0 0 1 1 <text:s/>(16 bits)</text:span></text:p>
      <text:p text:style-name="Preformatted_20_Text"><text:span text:style-name="Source_20_Text"><text:s text:c="15"/>↓ parallel এ ভাগ করো</text:span></text:p>
      <text:p text:style-name="Preformatted_20_Text"><text:span text:style-name="Source_20_Text">Subcarrier 1: <text:s/>1 0 1 1 <text:s/>(4 bits)</text:span></text:p>
      <text:p text:style-name="Preformatted_20_Text"><text:span text:style-name="Source_20_Text">Subcarrier 2: <text:s/>0 0 1 0 <text:s/>(4 bits)</text:span></text:p>
      <text:p text:style-name="Preformatted_20_Text"><text:span text:style-name="Source_20_Text">Subcarrier 3: <text:s/>1 1 0 1 <text:s/>(4 bits)</text:span></text:p>
      <text:p text:style-name="P2"><text:span text:style-name="Source_20_Text">Subcarrier 4: <text:s/>0 0 1 1 <text:s/>(4 bits)</text:span></text:p>
      <text:p text:style-name="Text_20_body"><text:span text:style-name="Strong_20_Emphasis">Step 2: প্রতিটা subcarrier এ QAM apply করো</text:span></text:p>
      <text:p text:style-name="Preformatted_20_Text"><text:span text:style-name="Source_20_Text">fc₁ + QAM → subcarrier 1 এর data modulate</text:span></text:p>
      <text:p text:style-name="Preformatted_20_Text"><text:span text:style-name="Source_20_Text">fc₂ + QAM → subcarrier 2 এর data modulate</text:span></text:p>
      <text:p text:style-name="Preformatted_20_Text"><text:span text:style-name="Source_20_Text">fc₃ + QAM → subcarrier 3 এর data modulate</text:span></text:p>
      <text:p text:style-name="P2"><text:span text:style-name="Source_20_Text">fc₄ + QAM → subcarrier 4 এর data modulate</text:span></text:p>
      <text:p text:style-name="Text_20_body"><text:soft-page-break/><text:span text:style-name="Strong_20_Emphasis">QAM কেন?</text:span></text:p>
      <text:list text:style-name="L21">
        <text:list-item>
          <text:p text:style-name="P56">QAM = Quadrature Amplitude Modulation </text:p>
        </text:list-item>
        <text:list-item>
          <text:p text:style-name="P56">একটা cos দিয়ে modulate + একটা sin দিয়ে modulate </text:p>
        </text:list-item>
        <text:list-item>
          <text:p text:style-name="P56">cos ও sin orthogonal → <text:span text:style-name="Strong_20_Emphasis">Both sideband use করা যায়</text:span> </text:p>
        </text:list-item>
        <text:list-item>
          <text:p text:style-name="P55">Bandwidth better utilize হয় </text:p>
        </text:list-item>
      </text:list>
      <text:p text:style-name="Text_20_body"><text:span text:style-name="Strong_20_Emphasis">Step 3: সব একসাথে পাঠাও</text:span></text:p>
      <text:p text:style-name="P2"><text:span text:style-name="Source_20_Text">Transmitted = fc₁_signal + fc₂_signal + fc₃_signal + fc₄_signal</text:span></text:p>
      <text:p text:style-name="Text_20_body">সব একসাথে parallel এ যাচ্ছে → <text:span text:style-name="Strong_20_Emphasis">4 times faster!</text:span> (Image 2 এ এটাই দেখানো)</text:p>
      <text:p text:style-name="Horizontal_20_Line"/>
      <text:h text:style-name="Heading_20_3" text:outline-level="3">5G তে কতটা Carrier?</text:h>
      <text:p text:style-name="Text_20_body">Image 2 এ লেখা:</text:p>
      <text:p text:style-name="Quotations"><text:span text:style-name="Strong_20_Emphasis"><text:span text:style-name="T6">5G → 4096টা পর্যন্ত carrier use করা হয়, faster করার জন্য</text:span></text:span></text:p>
      <text:p text:style-name="Horizontal_20_Line"/>
      <text:h text:style-name="Heading_20_3" text:outline-level="3">Circuit Implementation এর সমস্যা ও সমাধান</text:h>
      <text:p text:style-name="Text_20_body"><text:span text:style-name="Strong_20_Emphasis">সমস্যা:</text:span></text:p>
      <text:p text:style-name="Preformatted_20_Text"><text:span text:style-name="Source_20_Text">4096টা carrier মানে 4096টা oscillator লাগবে</text:span></text:p>
      <text:p text:style-name="Preformatted_20_Text"><text:span text:style-name="Source_20_Text">→ প্রতিটা oscillator দিয়ে cos wave generate করবো</text:span></text:p>
      <text:p text:style-name="P2"><text:span text:style-name="Source_20_Text">→ Extremely costly &amp; complex!</text:span></text:p>
      <text:p text:style-name="Text_20_body"><text:span text:style-name="Strong_20_Emphasis">সমাধান: </text:span><text:span text:style-name="Strong_20_Emphasis"><text:span text:style-name="T6">IFFT (Inverse Fast Fourier Transform)</text:span></text:span></text:p>
      <text:p text:style-name="Preformatted_20_Text"><text:span text:style-name="Source_20_Text">Source signal → IFFT করো</text:span></text:p>
      <text:p text:style-name="Preformatted_20_Text"><text:span text:style-name="Source_20_Text"><text:s text:c="13"/>→ Real part পাবো (cos component)</text:span></text:p>
      <text:p text:style-name="Preformatted_20_Text"><text:span text:style-name="Source_20_Text"><text:s text:c="13"/>→ Imaginary part পাবো (sin component)</text:span></text:p>
      <text:p text:style-name="P2"><text:span text:style-name="Source_20_Text"><text:s text:c="13"/>→ এগুলো দিয়েই সব subcarrier এর signal তৈরি হয়!</text:span></text:p>
      <text:p text:style-name="Text_20_body">Receiver এ: FFT করলেই আলাদা আলাদা subcarrier এর data পাওয়া যাবে।</text:p>
      <text:p text:style-name="Horizontal_20_Line"/>
      <text:h text:style-name="Heading_20_3" text:outline-level="3">OFDM সারসংক্ষেপ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বিষয়</text:p>
            </table:table-cell>
            <table:table-cell table:style-name="Table7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7.A1" office:value-type="string">
            <text:p text:style-name="Table_20_Contents">কোথায় ব্যবহার</text:p>
          </table:table-cell>
          <table:table-cell table:style-name="Table7.A1" office:value-type="string">
            <text:p text:style-name="Table_20_Contents">5G, 4G LTE, WiFi, DSL</text:p>
          </table:table-cell>
        </table:table-row>
        <table:table-row>
          <table:table-cell table:style-name="Table7.A1" office:value-type="string">
            <text:p text:style-name="Table_20_Contents">Key idea</text:p>
          </table:table-cell>
          <table:table-cell table:style-name="Table7.A1" office:value-type="string">
            <text:p text:style-name="Table_20_Contents">Data parallel এ পাঠানো</text:p>
          </table:table-cell>
        </table:table-row>
        <table:table-row>
          <table:table-cell table:style-name="Table7.A1" office:value-type="string">
            <text:p text:style-name="Table_20_Contents">কেন overlap চলে</text:p>
          </table:table-cell>
          <table:table-cell table:style-name="Table7.A1" office:value-type="string">
            <text:p text:style-name="Table_20_Contents">Orthogonality</text:p>
          </table:table-cell>
        </table:table-row>
        <table:table-row>
          <table:table-cell table:style-name="Table7.A1" office:value-type="string">
            <text:p text:style-name="Table_20_Contents">Modulation</text:p>
          </table:table-cell>
          <table:table-cell table:style-name="Table7.A1" office:value-type="string">
            <text:p text:style-name="Table_20_Contents">QAM (cos + sin)</text:p>
          </table:table-cell>
        </table:table-row>
        <table:table-row>
          <table:table-cell table:style-name="Table7.A1" office:value-type="string">
            <text:p text:style-name="Table_20_Contents">Implementation</text:p>
          </table:table-cell>
          <table:table-cell table:style-name="Table7.A1" office:value-type="string">
            <text:p text:style-name="Table_20_Contents">IFFT/FFT</text:p>
          </table:table-cell>
        </table:table-row>
        <table:table-row>
          <table:table-cell table:style-name="Table7.A1" office:value-type="string">
            <text:p text:style-name="Table_20_Contents">Speed gain</text:p>
          </table:table-cell>
          <table:table-cell table:style-name="Table7.A1" office:value-type="string">
            <text:p text:style-name="Table_20_Contents">Subcarrier সংখ্যা × গুণ faster</text:p>
          </table:table-cell>
        </table:table-row>
      </table:table>
      <text:p text:style-name="Horizontal_20_Line"/>
      <text:h text:style-name="Heading_20_2" text:outline-level="2"><text:soft-page-break/>🔷 Part 2: CDMA — Code Division Multiple Access</text:h>
      <text:h text:style-name="Heading_20_3" text:outline-level="3">মূল Concept (Image 3)</text:h>
      <text:p text:style-name="Quotations">FDM = frequency ভাগ করে | TDM = time ভাগ করে | <text:span text:style-name="Strong_20_Emphasis">CDMA = code দিয়ে আলাদা করে</text:span></text:p>
      <text:p text:style-name="Text_20_body">সবাই <text:span text:style-name="Strong_20_Emphasis">একই সময়ে, একই frequency তে</text:span> পাঠায় — কিন্তু আলাদা <text:span text:style-name="Strong_20_Emphasis">secret code</text:span> দিয়ে!</text:p>
      <text:p text:style-name="Text_20_body"><text:span text:style-name="Strong_20_Emphasis">System Setup:</text:span></text:p>
      <text:p text:style-name="Preformatted_20_Text"><text:span text:style-name="Source_20_Text"><text:span text:style-name="T6">3টা transmitter আছে</text:span></text:span></text:p>
      <text:p text:style-name="Preformatted_20_Text"><text:span text:style-name="Source_20_Text"><text:span text:style-name="T6">প্রত্যেককে আলাদা code দেওয়া হয়</text:span></text:span></text:p>
      <text:p text:style-name="Preformatted_20_Text"><text:span text:style-name="Source_20_Text"><text:span text:style-name="T6">Receiver এর কাছে corresponding code থাকে</text:span></text:span></text:p>
      <text:p text:style-name="P2"><text:span text:style-name="Source_20_Text"><text:span text:style-name="T6">Transmitter encode করে পাঠায়</text:span></text:span></text:p>
      <text:p text:style-name="Text_20_body"><text:span text:style-name="Strong_20_Emphasis">Image 3 এর example:</text:span></text:p>
      <text:p text:style-name="Preformatted_20_Text"><text:span text:style-name="Source_20_Text">User 1: data = 00, <text:s/>code = 0101</text:span></text:p>
      <text:p text:style-name="Preformatted_20_Text"><text:span text:style-name="Source_20_Text">User 2: data = 10, <text:s/>code = 0011</text:span></text:p>
      <text:p text:style-name="P2"><text:span text:style-name="Source_20_Text">User 3: data = 11, <text:s/>code = 0000</text:span></text:p>
      <text:p text:style-name="Text_20_body"><text:span text:style-name="Strong_20_Emphasis">Code গুলো orthogonal:</text:span></text:p>
      <text:p text:style-name="P2"><text:span text:style-name="Source_20_Text">C₁ ⊥ C₂ ⊥ C₃ <text:s/>(পরস্পর orthogonal)</text:span></text:p>
      <text:p text:style-name="Text_20_body"><text:span text:style-name="Strong_20_Emphasis">Shared channel এ যা যায়:</text:span></text:p>
      <text:p text:style-name="P2"><text:span text:style-name="Source_20_Text">m₁C₁ + m₂C₂ + m₃C₃ <text:s/>(সব একসাথে মিলে)</text:span></text:p>
      <text:p text:style-name="Horizontal_20_Line"/>
      <text:h text:style-name="Heading_20_3" text:outline-level="3">Encoding Process (Image 4)</text:h>
      <text:p text:style-name="Text_20_body"><text:span text:style-name="Strong_20_Emphasis">Voltage Convention:</text:span></text:p>
      <text:p text:style-name="Preformatted_20_Text"><text:span text:style-name="Source_20_Text">0 → +1V</text:span></text:p>
      <text:p text:style-name="P2"><text:span text:style-name="Source_20_Text">1 → -1V</text:span></text:p>
      <text:h text:style-name="Heading_20_4" text:outline-level="4">User 1: data=00, code=0101</text:h>
      <text:p text:style-name="Text_20_body"><text:span text:style-name="Strong_20_Emphasis">Step 1: data bit কে code এর length এ repeat করো</text:span></text:p>
      <text:p text:style-name="Preformatted_20_Text"><text:span text:style-name="Source_20_Text">data = 00 → প্রতিটা bit কে 2 বার repeat (code length=4, data=2 bits)</text:span></text:p>
      <text:p text:style-name="Preformatted_20_Text"><text:span text:style-name="Source_20_Text">bit '0' → 0 0</text:span></text:p>
      <text:p text:style-name="Preformatted_20_Text"><text:span text:style-name="Source_20_Text">bit '0' → 0 0</text:span></text:p>
      <text:p text:style-name="P2"><text:span text:style-name="Source_20_Text">Repeated data: 0 0 | 0 0</text:span></text:p>
      <text:p text:style-name="Text_20_body"><text:span text:style-name="Strong_20_Emphasis">Step 2: XOR with code</text:span></text:p>
      <text:p text:style-name="P3"><text:span text:style-name="Source_20_Text">Data repeated: <text:s/>0 1 <text:s/>0 1 </text:span><text:span text:style-name="Source_20_Text">0 1 <text:s/>0 1 </text:span><text:span text:style-name="Source_20_Text"><text:s text:c="2"/>(প্রতিটা data bit এর জন্য code repeat)</text:span></text:p>
      <text:p text:style-name="Preformatted_20_Text"><text:span text:style-name="Source_20_Text"><text:s text:c="16"/>0 0 <text:s/>0 0 </text:span><text:span text:style-name="Source_20_Text"><text:span text:style-name="T7">0 0 <text:s/>0 0</text:span></text:span></text:p>
      <text:p text:style-name="P4"><text:span text:style-name="Source_20_Text">XOR result: <text:s text:c="4"/>0 1 <text:s/>0 1 </text:span><text:span text:style-name="Source_20_Text">0 1 <text:s/>0 1 </text:span><text:span text:style-name="Source_20_Text"><text:s text:c="2"/>→ sender 1 এর code ই থাকলো!</text:span></text:p>
      <text:p text:style-name="Text_20_body">এটাই spread spectrum — data টা code দিয়ে ছড়িয়ে দেওয়া হলো।</text:p>
      <text:h text:style-name="Heading_20_4" text:outline-level="4"><text:soft-page-break/>User 2: data=10, code=0011</text:h>
      <text:p text:style-name="P3"><text:span text:style-name="Source_20_Text"><text:span text:style-name="T7">0011 0011</text:span></text:span></text:p>
      <text:p text:style-name="P3"><text:span text:style-name="Source_20_Text"><text:span text:style-name="T7">1111 0000</text:span></text:span></text:p>
      <text:p text:style-name="P3"><text:span text:style-name="Source_20_Text"/></text:p>
      <text:p text:style-name="P2"><text:span text:style-name="Source_20_Text">XOR → 1 1 0 0 | 0 0 1 1</text:span></text:p>
      <text:h text:style-name="Heading_20_4" text:outline-level="4">User 3: data=11, code=0000</text:h>
      <text:p text:style-name="Preformatted_20_Text"><text:span text:style-name="Source_20_Text">Data '1' → 1 1 </text:span><text:span text:style-name="Source_20_Text"><text:span text:style-name="T7">1 1</text:span></text:span></text:p>
      <text:p text:style-name="Preformatted_20_Text"><text:span text:style-name="Source_20_Text">data '1' → 1 1 </text:span><text:span text:style-name="Source_20_Text"><text:span text:style-name="T7">1 1</text:span></text:span></text:p>
      <text:p text:style-name="Preformatted_20_Text"/>
      <text:p text:style-name="Preformatted_20_Text"><text:span text:style-name="Source_20_Text">XOR with code (0000):</text:span></text:p>
      <text:p text:style-name="Preformatted_20_Text"><text:span text:style-name="Source_20_Text">0 0 0 0 | 0 0 0 0</text:span></text:p>
      <text:p text:style-name="Preformatted_20_Text"><text:span text:style-name="Source_20_Text">1 1 1 1 | 1 1 1 1</text:span></text:p>
      <text:p text:style-name="Preformatted_20_Text"><text:span text:style-name="Source_20_Text">─────────────────</text:span></text:p>
      <text:p text:style-name="P2"><text:span text:style-name="Source_20_Text">XOR → 1 1 1 1 | 1 1 1 1</text:span></text:p>
      <text:p text:style-name="Horizontal_20_Line"/>
      <text:h text:style-name="Heading_20_3" text:outline-level="3">Channel এ সব মিলিয়ে যায়</text:h>
      <text:p text:style-name="Text_20_body"><text:span text:style-name="Strong_20_Emphasis">Voltage এ convert করে add করো:</text:span></text:p>
      <text:p text:style-name="Preformatted_20_Text"><text:span text:style-name="Source_20_Text">User 1 encoded: <text:s/>0 <text:s/>1 <text:s/>0 <text:s/>1 <text:s/>0 <text:s/>1 <text:s/>0 <text:s/>1 <text:s/>→ +1,-1,+1,-1,+1,-1,+1,-1</text:span></text:p>
      <text:p text:style-name="Preformatted_20_Text"><text:span text:style-name="Source_20_Text">User 2 encoded: <text:s/>1 <text:s/>1 <text:s/>0 <text:s/>0 <text:s/>0 <text:s/>0 <text:s/>1 <text:s/>1 <text:s/>→ -1,-1,+1,+1,+1,+1,-1,-1</text:span></text:p>
      <text:p text:style-name="Preformatted_20_Text"><text:span text:style-name="Source_20_Text">User 3 encoded: <text:s/>1 <text:s/>1 <text:s/>1 <text:s/>1 <text:s/>1 <text:s/>1 <text:s/>1 <text:s/>1 <text:s/>→ -1,-1,-1,-1,-1,-1,-1,-1</text:span></text:p>
      <text:p text:style-name="Preformatted_20_Text"><text:span text:style-name="Source_20_Text"><text:s text:c="17"/>────────────────────────────────────────────────</text:span></text:p>
      <text:p text:style-name="P2"><text:span text:style-name="Source_20_Text">Sum (channel): <text:s/>-1 <text:s/>-3 <text:s/>+1 <text:s/>-1 <text:s/>+1 <text:s/>-1 <text:s/>-1 <text:s/>-3</text:span></text:p>
      <text:p text:style-name="Text_20_body">এই mixed signal টাই channel দিয়ে যাচ্ছে।</text:p>
      <text:p text:style-name="Horizontal_20_Line"/>
      <text:h text:style-name="Heading_20_3" text:outline-level="3">Decoding Process (Image 5)</text:h>
      <text:p text:style-name="Text_20_body"><text:span text:style-name="Strong_20_Emphasis">Receiver 1 (C₁=0101 → +1,-1,+1,-1) যদি নিজের data বের করতে চায়:</text:span></text:p>
      <text:p text:style-name="Text_20_body"><text:span text:style-name="Strong_20_Emphasis">Step 1: Received signal কে নিজের code দিয়ে multiply করো</text:span></text:p>
      <text:p text:style-name="Preformatted_20_Text"><text:span text:style-name="Source_20_Text">Received: <text:s/>-1 <text:s/>-3 <text:s/>+1 <text:s/>-1 <text:s/>| <text:s/>+1 <text:s/>-1 <text:s/>-1 <text:s/>-3</text:span></text:p>
      <text:p text:style-name="Preformatted_20_Text"><text:span text:style-name="Source_20_Text">Code C₁: <text:s text:c="2"/>+1 <text:s/>-1 <text:s/>+1 <text:s/>-1 <text:s/>| <text:s/>+1 <text:s/>-1 <text:s/>+1 <text:s/>-1</text:span></text:p>
      <text:p text:style-name="Preformatted_20_Text"><text:span text:style-name="Source_20_Text"><text:s text:c="11"/>──────────────────────────────────</text:span></text:p>
      <text:p text:style-name="P2"><text:span text:style-name="Source_20_Text">Multiply: <text:s/>-1 <text:s/>+3 <text:s/>+1 <text:s/>+1 <text:s/>| <text:s/>+1 <text:s/>+1 <text:s/>-1 <text:s/>+3</text:span></text:p>
      <text:p text:style-name="Text_20_body"><text:span text:style-name="Strong_20_Emphasis">Step 2: Sum করো</text:span></text:p>
      <text:p text:style-name="Preformatted_20_Text"><text:span text:style-name="Source_20_Text">First half: <text:s/>-1+3+1+1 = +4</text:span></text:p>
      <text:p text:style-name="P2"><text:span text:style-name="Source_20_Text">Second half: +1+1-1+3 = +4</text:span></text:p>
      <text:p text:style-name="Text_20_body"><text:span text:style-name="Strong_20_Emphasis">Step 3: Code length (4) দিয়ে divide করো</text:span></text:p>
      <text:p text:style-name="Preformatted_20_Text"><text:span text:style-name="Source_20_Text">+4/4 = +1V → bit '0'</text:span></text:p>
      <text:p text:style-name="P2"><text:span text:style-name="Source_20_Text">+4/4 = +1V → bit '0'</text:span></text:p>
      <text:p text:style-name="Text_20_body"><text:span text:style-name="Strong_20_Emphasis">Result: 00 ✓ — User 1 এর original data পাওয়া গেছে!</text:span></text:p>
      <text:p text:style-name="Horizontal_20_Line"/>
      <text:p text:style-name="Text_20_body"><text:soft-page-break/><text:span text:style-name="Strong_20_Emphasis">Receiver 2 (C₂=0011 → +1,+1,-1,-1) নিজের data বের করবে:</text:span></text:p>
      <text:p text:style-name="Preformatted_20_Text"><text:span text:style-name="Source_20_Text">Received: <text:s/>-1 <text:s/>-3 <text:s/>+1 <text:s/>-1 <text:s/>| <text:s/>+1 <text:s/>-1 <text:s/>-1 <text:s/>-3</text:span></text:p>
      <text:p text:style-name="Preformatted_20_Text"><text:span text:style-name="Source_20_Text">Code C₂: <text:s text:c="2"/>+1 <text:s/>+1 <text:s/>-1 <text:s/>-1 <text:s/>| <text:s/>+1 <text:s/>+1 <text:s/>-1 <text:s/>-1</text:span></text:p>
      <text:p text:style-name="Preformatted_20_Text"><text:span text:style-name="Source_20_Text"><text:s text:c="11"/>──────────────────────────────────</text:span></text:p>
      <text:p text:style-name="Preformatted_20_Text"><text:span text:style-name="Source_20_Text">Multiply: <text:s/>-1 <text:s/>-3 <text:s/>-1 <text:s/>+1 <text:s/>| <text:s/>+1 <text:s/>-1 <text:s/>+1 <text:s/>+3</text:span></text:p>
      <text:p text:style-name="Preformatted_20_Text"><text:span text:style-name="Source_20_Text">Sum: <text:s text:c="6"/>-1-3-1+1 = -4 <text:s text:c="2"/>| <text:s/>+1-1+1+3 = +4</text:span></text:p>
      <text:p text:style-name="Preformatted_20_Text"><text:span text:style-name="Source_20_Text">Divide/4: <text:s/>= -1V (bit '1') | <text:s/>= +1V (bit '0')</text:span></text:p>
      <text:p text:style-name="P2"><text:span text:style-name="Source_20_Text">Result: 10 ✓ — User 2 এর data পাওয়া গেছে!</text:span></text:p>
      <text:p text:style-name="Horizontal_20_Line"/>
      <text:h text:style-name="Heading_20_3" text:outline-level="3">কেন এটা কাজ করে? — Orthogonality</text:h>
      <text:p text:style-name="Preformatted_20_Text"><text:span text:style-name="Source_20_Text">(m₁C₁ + m₂C₂ + m₃C₃) · C₁ = m₁(C₁·C₁) + m₂(C₂·C₁) + m₃(C₃·C₁)</text:span></text:p>
      <text:p text:style-name="Preformatted_20_Text"><text:span text:style-name="Source_20_Text"><text:s text:c="30"/>= m₁ × 1 + m₂ × 0 + m₃ × 0</text:span></text:p>
      <text:p text:style-name="P2"><text:span text:style-name="Source_20_Text"><text:s text:c="30"/>= m₁ ✓</text:span></text:p>
      <text:p text:style-name="Text_20_body">কারণ:</text:p>
      <text:p text:style-name="Preformatted_20_Text"><text:span text:style-name="Source_20_Text">C₁·C₁ = 1 <text:s/>(নিজের সাথে dot product = 1)</text:span></text:p>
      <text:p text:style-name="Preformatted_20_Text"><text:span text:style-name="Source_20_Text">C₂·C₁ = 0 <text:s/>(orthogonal codes এর dot product = 0)</text:span></text:p>
      <text:p text:style-name="P2"><text:span text:style-name="Source_20_Text">C₃·C₁ = 0 <text:s/>(orthogonal codes এর dot product = 0)</text:span></text:p>
      <text:p text:style-name="Text_20_body">শুধু নিজের data টাই বেরিয়ে আসে, বাকি সব cancel!</text:p>
      <text:p text:style-name="Horizontal_20_Line"/>
      <text:h text:style-name="Heading_20_3" text:outline-level="3">CDMA এর Military Application</text:h>
      <text:p text:style-name="Text_20_body">Image 4 এ লেখা:</text:p>
      <text:p text:style-name="Quotations"><text:span text:style-name="Strong_20_Emphasis">CDMA → low frequency তে jamming করা যায় না → Military application এর জন্য ভালো</text:span></text:p>
      <text:p text:style-name="P53">কারণ:</text:p>
      <text:list text:style-name="L22">
        <text:list-item>
          <text:p text:style-name="P54">Signal পুরো wide spectrum জুড়ে ছড়ানো (Spread Spectrum) </text:p>
        </text:list-item>
        <text:list-item>
          <text:p text:style-name="P54">Enemy জানে না কোন frequency তে signal আছে </text:p>
        </text:list-item>
        <text:list-item>
          <text:p text:style-name="P57"><text:span text:style-name="T6">Code না জানলে decrypt করা অসম্ভব</text:span> </text:p>
        </text:list-item>
      </text:list>
      <text:p text:style-name="Horizontal_20_Line"/>
      <text:h text:style-name="Heading_20_2" text:outline-level="2">📊 FDM vs TDM vs CDMA vs OFDM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7"/>
            </table:table-cell>
            <table:table-cell table:style-name="Table8.A1" office:value-type="string">
              <text:p text:style-name="Table_20_Heading">FDM</text:p>
            </table:table-cell>
            <table:table-cell table:style-name="Table8.A1" office:value-type="string">
              <text:p text:style-name="Table_20_Heading">TDM</text:p>
            </table:table-cell>
            <table:table-cell table:style-name="Table8.A1" office:value-type="string">
              <text:p text:style-name="Table_20_Heading">CDMA</text:p>
            </table:table-cell>
            <table:table-cell table:style-name="Table8.A1" office:value-type="string">
              <text:p text:style-name="Table_20_Heading">OFDM</text:p>
            </table:table-cell>
          </table:table-row>
        </table:table-header-rows>
        <table:table-row>
          <table:table-cell table:style-name="Table8.A1" office:value-type="string">
            <text:p text:style-name="Table_20_Contents">কী ভাগ হয়</text:p>
          </table:table-cell>
          <table:table-cell table:style-name="Table8.A1" office:value-type="string">
            <text:p text:style-name="Table_20_Contents">Frequency</text:p>
          </table:table-cell>
          <table:table-cell table:style-name="Table8.A1" office:value-type="string">
            <text:p text:style-name="Table_20_Contents">Time</text:p>
          </table:table-cell>
          <table:table-cell table:style-name="Table8.A1" office:value-type="string">
            <text:p text:style-name="Table_20_Contents">Code</text:p>
          </table:table-cell>
          <table:table-cell table:style-name="Table8.A1" office:value-type="string">
            <text:p text:style-name="Table_20_Contents">Frequency (orthogonal)</text:p>
          </table:table-cell>
        </table:table-row>
        <table:table-row>
          <table:table-cell table:style-name="Table8.A1" office:value-type="string">
            <text:p text:style-name="Table_20_Contents">Same time?</text:p>
          </table:table-cell>
          <table:table-cell table:style-name="Table8.A1" office:value-type="string">
            <text:p text:style-name="Table_20_Contents">✓</text:p>
          </table:table-cell>
          <table:table-cell table:style-name="Table8.A1" office:value-type="string">
            <text:p text:style-name="Table_20_Contents">✗</text:p>
          </table:table-cell>
          <table:table-cell table:style-name="Table8.A1" office:value-type="string">
            <text:p text:style-name="Table_20_Contents">✓</text:p>
          </table:table-cell>
          <table:table-cell table:style-name="Table8.A1" office:value-type="string">
            <text:p text:style-name="Table_20_Contents">✓</text:p>
          </table:table-cell>
        </table:table-row>
        <table:table-row>
          <table:table-cell table:style-name="Table8.A1" office:value-type="string">
            <text:p text:style-name="Table_20_Contents">Same freq?</text:p>
          </table:table-cell>
          <table:table-cell table:style-name="Table8.A1" office:value-type="string">
            <text:p text:style-name="Table_20_Contents">✗</text:p>
          </table:table-cell>
          <table:table-cell table:style-name="Table8.A1" office:value-type="string">
            <text:p text:style-name="Table_20_Contents">✓</text:p>
          </table:table-cell>
          <table:table-cell table:style-name="Table8.A1" office:value-type="string">
            <text:p text:style-name="Table_20_Contents">✓</text:p>
          </table:table-cell>
          <table:table-cell table:style-name="Table8.A1" office:value-type="string">
            <text:p text:style-name="Table_20_Contents">✓ (overlap)</text:p>
          </table:table-cell>
        </table:table-row>
        <table:table-row>
          <table:table-cell table:style-name="Table8.A1" office:value-type="string">
            <text:p text:style-name="Table_20_Contents">Guard needed</text:p>
          </table:table-cell>
          <table:table-cell table:style-name="Table8.A1" office:value-type="string">
            <text:p text:style-name="Table_20_Contents">Guard band</text:p>
          </table:table-cell>
          <table:table-cell table:style-name="Table8.A1" office:value-type="string">
            <text:p text:style-name="Table_20_Contents">Sync bits</text:p>
          </table:table-cell>
          <table:table-cell table:style-name="Table8.A1" office:value-type="string">
            <text:p text:style-name="Table_20_Contents">না</text:p>
          </table:table-cell>
          <table:table-cell table:style-name="Table8.A1" office:value-type="string">
            <text:p text:style-name="Table_20_Contents">না</text:p>
          </table:table-cell>
        </table:table-row>
        <table:table-row>
          <table:table-cell table:style-name="Table8.A1" office:value-type="string">
            <text:p text:style-name="Table_20_Contents">Usage</text:p>
          </table:table-cell>
          <table:table-cell table:style-name="Table8.A1" office:value-type="string">
            <text:p text:style-name="Table_20_Contents">Cable TV</text:p>
          </table:table-cell>
          <table:table-cell table:style-name="Table8.A1" office:value-type="string">
            <text:p text:style-name="Table_20_Contents">Telephone</text:p>
          </table:table-cell>
          <table:table-cell table:style-name="Table8.A1" office:value-type="string">
            <text:p text:style-name="Table_20_Contents">Military/3G</text:p>
          </table:table-cell>
          <table:table-cell table:style-name="Table8.A1" office:value-type="string">
            <text:p text:style-name="Table_20_Contents">4G/5G/WiFi</text:p>
          </table:table-cell>
        </table:table-row>
        <table:table-row>
          <table:table-cell table:style-name="Table8.A1" office:value-type="string">
            <text:p text:style-name="Table_20_Contents">Speed</text:p>
          </table:table-cell>
          <table:table-cell table:style-name="Table8.A1" office:value-type="string">
            <text:p text:style-name="Table_20_Contents">Medium</text:p>
          </table:table-cell>
          <table:table-cell table:style-name="Table8.A1" office:value-type="string">
            <text:p text:style-name="Table_20_Contents">Medium</text:p>
          </table:table-cell>
          <table:table-cell table:style-name="Table8.A1" office:value-type="string">
            <text:p text:style-name="Table_20_Contents">Medium</text:p>
          </table:table-cell>
          <table:table-cell table:style-name="Table8.A1" office:value-type="string">
            <text:p text:style-name="Table_20_Contents">Very High</text:p>
          </table:table-cell>
        </table:table-row>
      </table:table>
      <text:p text:style-name="Horizontal_20_Line"/>
      <text:h text:style-name="Heading_20_2" text:outline-level="2"><text:soft-page-break/>💡 মনে রাখার উপায়</text:h>
      <text:p text:style-name="Quotations"><text:span text:style-name="Strong_20_Emphasis">OFDM = বহুলেন highway যেখানে গাড়িগুলো পাশাপাশি চলে কিন্তু ধাক্কা লাগে না (orthogonal)</text:span></text:p>
      <text:p text:style-name="Quotations"><text:span text:style-name="Strong_20_Emphasis">CDMA = একই ঘরে অনেকে কথা বলছে আলাদা ভাষায় — নিজের ভাষা জানলেই বুঝবে, বাকি সব noise</text:span>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01:18:30.104759637</meta:creation-date>
    <dc:date>2026-05-02T01:58:34.648576752</dc:date>
    <meta:editing-duration>PT29M39S</meta:editing-duration>
    <meta:editing-cycles>4</meta:editing-cycles>
    <meta:generator>LibreOffice/24.2.7.2$Linux_X86_64 LibreOffice_project/420$Build-2</meta:generator>
    <meta:document-statistic meta:table-count="8" meta:image-count="0" meta:object-count="0" meta:page-count="15" meta:paragraph-count="465" meta:word-count="3183" meta:character-count="14115" meta:non-whitespace-character-count="11143"/>
  </office:meta>
</office:document-meta>
</file>